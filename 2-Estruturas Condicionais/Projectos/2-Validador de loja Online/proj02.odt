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2" style:family="paragraph" style:parent-style-name="Text_20_body">
      <style:paragraph-properties fo:line-height="114%"/>
      <style:text-properties fo:color="#1f1f1f" loext:opacity="100%" style:font-name="Google Sans Flex" fo:font-size="12.75pt" officeooo:rsid="001ef461"/>
    </style:style>
    <style:style style:name="P3" style:family="paragraph" style:parent-style-name="Text_20_body">
      <style:paragraph-properties fo:margin-left="0cm" fo:margin-right="0cm" fo:line-height="114%" fo:text-indent="0cm" style:auto-text-indent="false"/>
      <style:text-properties fo:color="#1f1f1f" loext:opacity="100%" style:font-name="Google Sans Flex" fo:font-size="12.75pt" officeooo:rsid="001ef461"/>
    </style:style>
    <style:style style:name="P4" style:family="paragraph" style:parent-style-name="Preformatted_20_Text">
      <style:paragraph-properties fo:margin-top="0cm" fo:margin-bottom="0.247cm" style:contextual-spacing="false" fo:line-height="114%"/>
      <style:text-properties fo:color="#1f1f1f" loext:opacity="100%" style:font-name="Google Sans Flex" fo:font-size="12.75pt" officeooo:rsid="001ef461"/>
    </style:style>
    <style:style style:name="P5" style:family="paragraph" style:parent-style-name="Text_20_body" style:list-style-name="L1">
      <style:paragraph-properties fo:line-height="114%"/>
      <style:text-properties fo:color="#1f1f1f" loext:opacity="100%" style:font-name="Google Sans Flex" fo:font-size="12.75pt" officeooo:rsid="001ef461"/>
    </style:style>
    <style:style style:name="P6" style:family="paragraph" style:parent-style-name="Text_20_body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7" style:family="paragraph" style:parent-style-name="Heading_20_3">
      <style:paragraph-properties fo:margin-top="0cm" fo:margin-bottom="0.247cm" style:contextual-spacing="false" fo:line-height="114%"/>
      <style:text-properties fo:color="#1f1f1f" loext:opacity="100%" style:font-name="Google Sans Flex" fo:font-size="12.75pt" fo:font-weight="normal" officeooo:rsid="001ef461"/>
    </style:style>
    <style:style style:name="P8" style:family="paragraph" style:parent-style-name="Heading_20_4">
      <style:paragraph-properties fo:margin-top="0cm" fo:margin-bottom="0.247cm" style:contextual-spacing="false" fo:line-height="114%"/>
      <style:text-properties fo:color="#1f1f1f" loext:opacity="100%" style:font-name="Google Sans Flex" fo:font-size="12.75pt" fo:font-weight="normal" officeooo:rsid="001ef461"/>
    </style:style>
    <style:style style:name="P9" style:family="paragraph" style:parent-style-name="Standard">
      <style:paragraph-properties fo:line-height="114%"/>
      <style:text-properties fo:font-variant="normal" fo:text-transform="none" fo:color="#1f1f1f" loext:opacity="100%" style:font-name="Google Sans Flex" fo:font-size="12.75pt" fo:letter-spacing="normal" fo:font-style="normal" fo:font-weight="normal" officeooo:rsid="001ef461"/>
    </style:style>
    <style:style style:name="P10" style:family="paragraph" style:parent-style-name="Text_20_body" style:list-style-name="L2">
      <style:paragraph-properties fo:line-height="114%"/>
      <style:text-properties fo:color="#1f1f1f" loext:opacity="100%" style:font-name="Google Sans Flex" fo:font-size="12.75pt" officeooo:rsid="001ef461"/>
    </style:style>
    <style:style style:name="P11" style:family="paragraph" style:parent-style-name="Quotations">
      <style:paragraph-properties fo:margin-top="0cm" fo:margin-bottom="0.247cm" style:contextual-spacing="false" fo:line-height="114%"/>
      <style:text-properties fo:color="#1f1f1f" loext:opacity="100%" style:font-name="Google Sans Flex" fo:font-size="12.75pt" officeooo:rsid="001ef461"/>
    </style:style>
    <style:style style:name="T1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💳 Próximo Cenário: Projeto 2 - O Validador de Loja Online</text:h>
      <text:p text:style-name="P2">Vamos ver se você mantém o escudo intocado neste segundo desafio. Modifiquei os dados do checkout:</text:p>
      <text:p text:style-name="P3">JavaScript</text:p>
      <text:p text:style-name="P4"><text:span text:style-name="Source_20_Text">const carrinhoItens = 0; // &lt;-- Mudei para 0!</text:span></text:p>
      <text:p text:style-name="P4"><text:span text:style-name="Source_20_Text">const cupomDesconto = "PROMO10"; </text:span></text:p>
      <text:p text:style-name="P4"><text:span text:style-name="Source_20_Text">let valorTotal = 250;</text:span></text:p>
      <text:p text:style-name="P4"/>
      <text:p text:style-name="P4"><text:span text:style-name="Source_20_Text">// 1. Validação do carrinho:</text:span></text:p>
      <text:p text:style-name="P4"><text:span text:style-name="Source_20_Text">if (carrinhoItens) {</text:span></text:p>
      <text:p text:style-name="P4"><text:span text:style-name="Source_20_Text"><text:s text:c="4"/>console.log("Carrinho válido! Processando cupão... 🛒");</text:span></text:p>
      <text:p text:style-name="P4"><text:span text:style-name="Source_20_Text"><text:s text:c="4"/></text:span></text:p>
      <text:p text:style-name="P4"><text:span text:style-name="Source_20_Text"><text:s text:c="4"/>// 2. Aplicação do cupão:</text:span></text:p>
      <text:p text:style-name="P4"><text:span text:style-name="Source_20_Text"><text:s text:c="4"/>switch (cupomDesconto) {</text:span></text:p>
      <text:p text:style-name="P4"><text:span text:style-name="Source_20_Text"><text:s text:c="8"/>case "PROMO10":</text:span></text:p>
      <text:p text:style-name="P4"><text:span text:style-name="Source_20_Text"><text:s text:c="12"/>valorTotal = valorTotal - 10;</text:span></text:p>
      <text:p text:style-name="P4"><text:span text:style-name="Source_20_Text"><text:s text:c="12"/>console.log("Cupão PROMO10 aplicado! 10€ de desconto.");</text:span></text:p>
      <text:p text:style-name="P4"><text:span text:style-name="Source_20_Text"><text:s text:c="12"/>break;</text:span></text:p>
      <text:p text:style-name="P4"><text:span text:style-name="Source_20_Text"><text:s text:c="8"/>case "FRETEGRATIS":</text:span></text:p>
      <text:p text:style-name="P4"><text:span text:style-name="Source_20_Text"><text:s text:c="12"/>console.log("Cupão FRETEGRATIS aplicado! Portes oferecidos.");</text:span></text:p>
      <text:p text:style-name="P4"><text:span text:style-name="Source_20_Text"><text:s text:c="12"/>break;</text:span></text:p>
      <text:p text:style-name="P4"><text:span text:style-name="Source_20_Text"><text:s text:c="8"/>default:</text:span></text:p>
      <text:p text:style-name="P4"><text:span text:style-name="Source_20_Text"><text:s text:c="12"/>console.log("Nenhum cupão válido inserido.");</text:span></text:p>
      <text:p text:style-name="P4"><text:span text:style-name="Source_20_Text"><text:s text:c="4"/>}</text:span></text:p>
      <text:p text:style-name="P4"><text:span text:style-name="Source_20_Text"><text:s text:c="4"/></text:span></text:p>
      <text:p text:style-name="P4"><text:span text:style-name="Source_20_Text"><text:s text:c="4"/>console.log("Total a pagar: " + valorTotal + "€");</text:span></text:p>
      <text:p text:style-name="P4"><text:span text:style-name="Source_20_Text">} else {</text:span></text:p>
      <text:p text:style-name="P4"><text:span text:style-name="Source_20_Text"><text:s text:c="4"/>console.log("Erro: Não pode finalizar a compra com o carrinho vazio! ❌");</text:span></text:p>
      <text:p text:style-name="P4"><text:soft-page-break/><text:span text:style-name="Source_20_Text">}</text:span></text:p>
      <text:h text:style-name="P1" text:outline-level="3">A Tua Missão de Análise:</text:h>
      <text:list text:style-name="L1">
        <text:list-item>
          <text:p text:style-name="P5">O <text:span text:style-name="Source_20_Text">if (carrinhoItens)</text:span> vai avaliar o número <text:span text:style-name="Source_20_Text">0</text:span>. Ele vai considerar isso <text:span text:style-name="T1">Truthy</text:span> ou <text:span text:style-name="T1">Falsy</text:span>?</text:p>
        </text:list-item>
        <text:list-item>
          <text:p text:style-name="P5">O computador vai chegar a ler o <text:span text:style-name="Source_20_Text">switch</text:span> do cupão ou vai saltar o bloco inteiro?</text:p>
        </text:list-item>
        <text:list-item>
          <text:p text:style-name="P5">Qual será a <text:span text:style-name="T1">mensagem exata</text:span> impressa na consola no final?</text:p>
        </text:list-item>
      </text:list>
      <text:p text:style-name="P6">Falsy. Vai saltar o bloco inteiro e vai imprimir: Erro: não pode Finalizar a compra com o carrinho vazio. Não entendi muito bem a logica do projecto embora eu tenha respondido.</text:p>
      <text:p text:style-name="P6"><text:span text:style-name="T1">Você acertou em cheio a resposta!</text:span> A mensagem na consola seria exatamente essa: <text:span text:style-name="Source_20_Text">Erro: Não pode finalizar a compra com o carrinho vazio! ❌</text:span>.</text:p>
      <text:p text:style-name="P2">No entanto, o mais importante na programação não é apenas acertar por intuição, é <text:span text:style-name="T1">compreender a mecânica por trás do código</text:span>. Vamos desmontar a lógica deste projeto passo a passo para que você perceba o "porquê" de tudo o que aconteceu ali.</text:p>
      <text:h text:style-name="P7" text:outline-level="3">🕵️‍♂️ Desmontando a Lógica da Loja Online</text:h>
      <text:p text:style-name="P2">Imagine que você está a programar o site da Amazon. O cliente clica no botão <text:span text:style-name="T1">"Finalizar Compra"</text:span>. Antes de o banco cobrar o dinheiro ou de o armazém embalar o produto, o seu código precisa de fazer perguntas de segurança.</text:p>
      <text:p text:style-name="P2">A primeira pergunta obrigatória é: <text:span text:style-name="T1">"O cliente tem alguma coisa dentro do carrinho?"</text:span></text:p>
      <text:h text:style-name="P8" text:outline-level="4">Passo 1: A Barreira de Segurança (<text:span text:style-name="Source_20_Text">if / else</text:span>)</text:h>
      <text:p text:style-name="P2">É aqui que entra o Truthy/Falsy. Em vez de escrever <text:span text:style-name="Source_20_Text">if (carrinhoItens &gt; 0)</text:span>, o JavaScript permite passar apenas a variável:</text:p>
      <text:p text:style-name="P9">JavaScript</text:p>
      <text:p text:style-name="P4"><text:span text:style-name="Source_20_Text">if (carrinhoItens) { ... }</text:span></text:p>
      <text:list text:style-name="L2">
        <text:list-item>
          <text:p text:style-name="P10">Como você bem disse, <text:span text:style-name="Source_20_Text">0</text:span> é <text:span text:style-name="T1">Falsy</text:span> (falso).</text:p>
        </text:list-item>
        <text:list-item>
          <text:p text:style-name="P10">Se é falso, significa que a condição do <text:span text:style-name="Source_20_Text">if</text:span> <text:span text:style-name="T1">não foi cumprida</text:span>.</text:p>
        </text:list-item>
        <text:list-item>
          <text:p text:style-name="P10"><text:soft-page-break/>O <text:span text:style-name="Source_20_Text">if</text:span> funciona como uma porta trancada. Se a condição falha, o computador <text:span text:style-name="T1">recusa-se a entrar</text:span> no bloco de código que está lá dentro (entre as primeiras <text:span text:style-name="Source_20_Text">{ }</text:span>).</text:p>
        </text:list-item>
      </text:list>
      <text:h text:style-name="P8" text:outline-level="4">Passo 2: O porquê de saltar o <text:span text:style-name="Source_20_Text">switch</text:span></text:h>
      <text:p text:style-name="P2">Como o carrinho estava vazio (<text:span text:style-name="Source_20_Text">0</text:span>), o computador saltou imediatamente para a alternativa, que é o bloco do <text:span text:style-name="Source_20_Text"><text:span text:style-name="T1">else</text:span></text:span>.</text:p>
      <text:p text:style-name="P2">Tudo o que estava dentro do <text:span text:style-name="Source_20_Text">if</text:span> — incluindo o <text:span text:style-name="Source_20_Text">switch</text:span> que calculava os descontos do cupão e a mensagem do total a pagar — foi <text:span text:style-name="T1">completamente ignorado</text:span>.</text:p>
      <text:p text:style-name="P11"><text:span text:style-name="T1">A Lógica do Negócio:</text:span> Pense bem, faria sentido o sistema perder tempo a calcular um desconto de 10€ (<text:span text:style-name="Source_20_Text">PROMO10</text:span>) ou a mostrar o preço final de 240€ se o cliente não tem nenhum produto para comprar? Não. Por isso, o <text:span text:style-name="Source_20_Text">switch</text:span> do cupão só deve ser lido se a primeira porta (<text:span text:style-name="Source_20_Text">if</text:span>) for aberta.</text:p>
      <text:p text:style-name="P2">Como a porta não abriu, ele foi direto para o <text:span text:style-name="Source_20_Text">else</text:span> e disparou o aviso de erro.</text:p>
      <text:p text:style-name="P2">Ficou mais claro agora como o <text:span text:style-name="Source_20_Text">if</text:span> serviu de "guarda-costas" para o resto do código não rodar à toa?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7T02:38:59.954183067</dc:date>
    <dc:creator>João António</dc:creator>
    <meta:editing-duration>PT4H15M49S</meta:editing-duration>
    <meta:editing-cycles>24</meta:editing-cycles>
    <meta:generator>LibreOffice/26.2.4.2$Linux_X86_64 LibreOffice_project/620$Build-2</meta:generator>
    <meta:document-statistic meta:table-count="0" meta:image-count="0" meta:object-count="0" meta:page-count="3" meta:paragraph-count="50" meta:word-count="554" meta:character-count="3272" meta:non-whitespace-character-count="2641"/>
  </office:meta>
</office:document-meta>
</file>