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Flex" svg:font-family="'Google Sans Flex', 'Google Sans', 'Helvetica Neue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1ef461"/>
    </style:style>
    <style:style style:name="P2" style:family="paragraph" style:parent-style-name="Text_20_body">
      <style:paragraph-properties fo:line-height="114%"/>
      <style:text-properties fo:color="#1f1f1f" loext:opacity="100%" style:font-name="Google Sans Flex" fo:font-size="12.75pt" officeooo:rsid="001ef461"/>
    </style:style>
    <style:style style:name="P3" style:family="paragraph" style:parent-style-name="Standard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1ef461"/>
    </style:style>
    <style:style style:name="P4" style:family="paragraph" style:parent-style-name="Preformatted_20_Text">
      <style:paragraph-properties fo:margin-top="0cm" fo:margin-bottom="0.247cm" style:contextual-spacing="false" fo:line-height="114%"/>
      <style:text-properties fo:color="#1f1f1f" loext:opacity="100%" style:font-name="Google Sans Flex" fo:font-size="12.75pt" officeooo:rsid="001ef461"/>
    </style:style>
    <style:style style:name="P5" style:family="paragraph" style:parent-style-name="Text_20_body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bold" officeooo:rsid="001ef461"/>
    </style:style>
    <style:style style:name="P6" style:family="paragraph" style:parent-style-name="Text_20_body" style:list-style-name="L1">
      <style:paragraph-properties fo:line-height="114%"/>
      <style:text-properties fo:color="#1f1f1f" loext:opacity="100%" style:font-name="Google Sans Flex" fo:font-size="12.75pt" officeooo:rsid="001ef461"/>
    </style:style>
    <style:style style:name="P7" style:family="paragraph" style:parent-style-name="Text_20_body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1ef461"/>
    </style:style>
    <style:style style:name="P8" style:family="paragraph" style:parent-style-name="Text_20_body">
      <style:paragraph-properties fo:line-height="114%"/>
      <style:text-properties fo:font-variant="normal" fo:text-transform="none" fo:color="#1f1f1f" loext:opacity="100%" style:font-name="Google Sans Text" fo:font-size="12.75pt" fo:letter-spacing="normal" fo:font-style="normal" fo:font-weight="normal" officeooo:rsid="001ef461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fo:color="#1f1f1f" loext:opacity="100%" style:font-name="Google Sans Flex" fo:font-size="12.75pt" officeooo:rsid="001ef461"/>
    </style:style>
    <style:style style:name="P10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1f1f1f" loext:opacity="100%" style:font-name="Google Sans Flex" fo:font-size="12.75pt" officeooo:rsid="001ef461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fo:color="#1f1f1f" loext:opacity="100%" style:font-name="Google Sans Text" fo:font-size="12.75pt" officeooo:rsid="001ef461"/>
    </style:style>
    <style:style style:name="P12" style:family="paragraph" style:parent-style-name="Quotations">
      <style:paragraph-properties fo:margin-left="1cm" fo:margin-right="1cm" fo:margin-top="0cm" fo:margin-bottom="0.499cm" style:contextual-spacing="false" fo:line-height="114%" fo:text-indent="0cm" style:auto-text-indent="false"/>
      <style:text-properties fo:color="#1f1f1f" loext:opacity="100%" style:font-name="Google Sans Flex" fo:font-size="12.75pt" officeooo:rsid="001ef461"/>
    </style:style>
    <style:style style:name="P13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fo:color="#1f1f1f" loext:opacity="100%" style:font-name="Google Sans Flex" fo:font-size="12.75pt" fo:font-weight="normal" officeooo:rsid="001ef461"/>
    </style:style>
    <style:style style:name="P14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1f1f1f" loext:opacity="100%" style:font-name="Google Sans Flex" fo:font-size="12.75pt" officeooo:rsid="001ef461"/>
    </style:style>
    <style:style style:name="P15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1f1f1f" loext:opacity="100%" style:font-name="Google Sans Text" fo:font-size="12.75pt" officeooo:rsid="001ef461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style:style style:name="T4" style:family="text">
      <style:text-properties fo:font-family="'Google Sans', sans-seri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🚗 Projeto 3: O Simulador de Uber/Bolt</text:h>
      <text:p text:style-name="P2">Se te sentires confortável, vamos ao último projeto para fechar este ciclo. Aqui testamos o preço da viagem com chuva.</text:p>
      <text:p text:style-name="P3">JavaScript</text:p>
      <text:p text:style-name="P4"><text:span text:style-name="Source_20_Text">const categoriaCarro = "Eco"; // &lt;-- Mudei para Eco!</text:span></text:p>
      <text:p text:style-name="P4"><text:span text:style-name="Source_20_Text">const estaAChover = false; <text:s text:c="3"/>// &lt;-- Mudei para false!</text:span></text:p>
      <text:p text:style-name="P4"><text:span text:style-name="Source_20_Text">let precoBase = 0;</text:span></text:p>
      <text:p text:style-name="P4"/>
      <text:p text:style-name="P4"><text:span text:style-name="Source_20_Text">// 1. Definição do preço base:</text:span></text:p>
      <text:p text:style-name="P4"><text:span text:style-name="Source_20_Text">switch (categoriaCarro) {</text:span></text:p>
      <text:p text:style-name="P4"><text:span text:style-name="Source_20_Text"><text:s text:c="4"/>case "Eco":</text:span></text:p>
      <text:p text:style-name="P4"><text:span text:style-name="Source_20_Text"><text:s text:c="8"/>precoBase = 5;</text:span></text:p>
      <text:p text:style-name="P4"><text:span text:style-name="Source_20_Text"><text:s text:c="8"/>break;</text:span></text:p>
      <text:p text:style-name="P4"><text:span text:style-name="Source_20_Text"><text:s text:c="4"/>case "Normal":</text:span></text:p>
      <text:p text:style-name="P4"><text:span text:style-name="Source_20_Text"><text:s text:c="8"/>precoBase = 8;</text:span></text:p>
      <text:p text:style-name="P4"><text:span text:style-name="Source_20_Text"><text:s text:c="8"/>break;</text:span></text:p>
      <text:p text:style-name="P4"><text:span text:style-name="Source_20_Text"><text:s text:c="4"/>case "Premium":</text:span></text:p>
      <text:p text:style-name="P4"><text:span text:style-name="Source_20_Text"><text:s text:c="8"/>precoBase = 15;</text:span></text:p>
      <text:p text:style-name="P4"><text:span text:style-name="Source_20_Text"><text:s text:c="8"/>break;</text:span></text:p>
      <text:p text:style-name="P4"><text:span text:style-name="Source_20_Text"><text:s text:c="4"/>default:</text:span></text:p>
      <text:p text:style-name="P4"><text:span text:style-name="Source_20_Text"><text:s text:c="8"/>precoBase = 7;</text:span></text:p>
      <text:p text:style-name="P4"><text:span text:style-name="Source_20_Text">}</text:span></text:p>
      <text:p text:style-name="P4"/>
      <text:p text:style-name="P4"><text:span text:style-name="Source_20_Text">// 2. Curto-circuito da Chuva:</text:span></text:p>
      <text:p text:style-name="P4"><text:span text:style-name="Source_20_Text">const multiplicadorChuva = estaAChover &amp;&amp; 1.5 || 1;</text:span></text:p>
      <text:p text:style-name="P4"/>
      <text:p text:style-name="P4"><text:span text:style-name="Source_20_Text">const precoFinal = precoBase * multiplicadorChuva;</text:span></text:p>
      <text:p text:style-name="P4"/>
      <text:p text:style-name="P4"><text:span text:style-name="Source_20_Text">console.log("Viagem " + categoriaCarro + " confirmada. Preço final: " + precoFinal + "€ 🚗");</text:span></text:p>
      <text:p text:style-name="P5"><text:soft-page-break/>A tua missão no último projeto:</text:p>
      <text:list text:style-name="L1">
        <text:list-item>
          <text:p text:style-name="P6">O <text:span text:style-name="Source_20_Text">switch</text:span> vai ativar qual <text:span text:style-name="Source_20_Text">case</text:span>? Qual será o valor do <text:span text:style-name="Source_20_Text">precoBase</text:span>?</text:p>
        </text:list-item>
        <text:list-item>
          <text:p text:style-name="P6">Olhe bem para o curto-circuito: <text:span text:style-name="Source_20_Text">estaAChover &amp;&amp; 1.5 || 1</text:span>. Sabendo que <text:span text:style-name="Source_20_Text">estaAChover</text:span> é <text:span text:style-name="Source_20_Text">false</text:span>, o que vai acontecer no <text:span text:style-name="Source_20_Text">&amp;&amp;</text:span>? E qual valor o <text:span text:style-name="Source_20_Text">||</text:span> vai acabar por guardar na variável <text:span text:style-name="Source_20_Text">multiplicadorChuva</text:span>?</text:p>
        </text:list-item>
        <text:list-item>
          <text:p text:style-name="P6">Qual será a mensagem final na consola?</text:p>
        </text:list-item>
      </text:list>
      <text:p text:style-name="P7">Eco, <text:s/>o precoBase sera 5. <text:s/>no &amp;&amp; o computador vai pular e o valor do multiplicadorChuva vai guardar o valor 1.</text:p>
      <text:p text:style-name="P8"><text:span text:style-name="T1">Análise cirúrgica! Excelente!</text:span> 🎯 Você pegou o funcionamento de um dos curto-circuitos mais complexos do JavaScript.</text:p>
      <text:p text:style-name="P9"><text:span text:style-name="T2">Vamos apenas afinar os detalhes técnicos do que aconteceu na linha </text:span><text:span text:style-name="Source_20_Text"><text:span text:style-name="T2">const multiplicadorChuva = estaAChover &amp;&amp; 1.5 || 1;</text:span></text:span><text:span text:style-name="T2"> para ficar 100% claro:</text:span></text:p>
      <text:list text:style-name="L2">
        <text:list-item>
          <text:p text:style-name="P10"><text:span text:style-name="T3">O bloqueio do </text:span><text:span text:style-name="Source_20_Text"><text:span text:style-name="T3">&amp;&amp;</text:span></text:span><text:span text:style-name="T3">:</text:span><text:span text:style-name="T2"> Como </text:span><text:span text:style-name="Source_20_Text"><text:span text:style-name="T2">estaAChover</text:span></text:span><text:span text:style-name="T2"> é </text:span><text:span text:style-name="Source_20_Text"><text:span text:style-name="T2">false</text:span></text:span><text:span text:style-name="T2">, o </text:span><text:span text:style-name="Source_20_Text"><text:span text:style-name="T2">&amp;&amp;</text:span></text:span><text:span text:style-name="T2"> faz curto-circuito imediatamente e devolve </text:span><text:span text:style-name="Source_20_Text"><text:span text:style-name="T2">false</text:span></text:span><text:span text:style-name="T2">, nem olhando para o </text:span><text:span text:style-name="Source_20_Text"><text:span text:style-name="T2">1.5</text:span></text:span><text:span text:style-name="T2">.</text:span></text:p>
        </text:list-item>
        <text:list-item>
          <text:p text:style-name="P10"><text:span text:style-name="T3">A salvação do </text:span><text:span text:style-name="Source_20_Text"><text:span text:style-name="T3">||</text:span></text:span><text:span text:style-name="T3">:</text:span><text:span text:style-name="T2"> A expressão fica resumida a </text:span><text:span text:style-name="Source_20_Text"><text:span text:style-name="T2">false || 1</text:span></text:span><text:span text:style-name="T2">. Como o </text:span><text:span text:style-name="Source_20_Text"><text:span text:style-name="T2">||</text:span></text:span><text:span text:style-name="T2"> ignora o </text:span><text:span text:style-name="Source_20_Text"><text:span text:style-name="T2">false</text:span></text:span><text:span text:style-name="T2"> (Falsy) e procura o primeiro valor verdadeiro (Truthy), ele salta para o </text:span><text:span text:style-name="Source_20_Text"><text:span text:style-name="T3">1</text:span></text:span><text:span text:style-name="T2"> e guarda-o na variável.</text:span></text:p>
        </text:list-item>
      </text:list>
      <text:p text:style-name="P9"><text:span text:style-name="T2">Como o </text:span><text:span text:style-name="Source_20_Text"><text:span text:style-name="T2">precoBase</text:span></text:span><text:span text:style-name="T2"> era </text:span><text:span text:style-name="T3">5</text:span><text:span text:style-name="T2"> e o </text:span><text:span text:style-name="Source_20_Text"><text:span text:style-name="T2">multiplicadorChuva</text:span></text:span><text:span text:style-name="T2"> passou a ser </text:span><text:span text:style-name="T3">1</text:span><text:span text:style-name="T2">:</text:span></text:p>
      <text:p text:style-name="P11">$5 \times 1 = 5$</text:p>
      <text:p text:style-name="P11">A mensagem final na consola será exatamente:</text:p>
      <text:p text:style-name="P12"><text:span text:style-name="Source_20_Text"><text:span text:style-name="T2">"Viagem Eco confirmada. Preço final: 5€ 🚗"</text:span></text:span></text:p>
      <text:h text:style-name="P13" text:outline-level="3">🏆 <text:span text:style-name="T4">Missão Cumprida com Distinção!</text:span></text:h>
      <text:p text:style-name="P11">Você fechou com chave de ouro toda a dinâmica de tomada de decisões, lógica booleana avançada e projetos práticos. O seu nível de leitura de código disparou desde que começámos!</text:p>
      <text:p text:style-name="P11">Agora que limpámos a mesa e consolidámos tudo, para onde quer direcionar o seu foco?</text:p>
      <text:list text:style-name="L3">
        <text:list-item>
          <text:p text:style-name="P14"><text:span text:style-name="T3">1. Avançar para os Loops / Laços de Repetição</text:span><text:span text:style-name="T2"> (</text:span><text:span text:style-name="Source_20_Text"><text:span text:style-name="T2">for</text:span></text:span><text:span text:style-name="T2"> e </text:span><text:span text:style-name="Source_20_Text"><text:span text:style-name="T2">while</text:span></text:span><text:span text:style-name="T2">), para aprender a fazer o computador repetir tarefas automaticamente (como processar uma lista de 100 produtos ou criar inimigos num jogo).</text:span></text:p>
        </text:list-item>
        <text:list-item>
          <text:p text:style-name="P15"><text:soft-page-break/><text:span text:style-name="T1">2. Criar mais um projeto de raiz</text:span>, mas desta vez escrito totalmente por si, do zero?</text:p>
        </text:list-item>
      </text:list>
      <text:p text:style-name="P11">Qual é o plano?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Flex" svg:font-family="'Google Sans Flex', 'Google Sans', 'Helvetica Neue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5T23:21:18.255979019</meta:creation-date>
    <dc:date>2026-06-27T03:04:22.827054828</dc:date>
    <dc:creator>João António</dc:creator>
    <meta:editing-duration>PT4H38M14S</meta:editing-duration>
    <meta:editing-cycles>27</meta:editing-cycles>
    <meta:generator>LibreOffice/26.2.4.2$Linux_X86_64 LibreOffice_project/620$Build-2</meta:generator>
    <meta:document-statistic meta:table-count="0" meta:image-count="0" meta:object-count="0" meta:page-count="3" meta:paragraph-count="43" meta:word-count="431" meta:character-count="2515" meta:non-whitespace-character-count="2057"/>
  </office:meta>
</office:document-meta>
</file>