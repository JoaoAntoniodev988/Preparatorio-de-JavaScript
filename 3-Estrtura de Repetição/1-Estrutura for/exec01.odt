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Standard">
      <style:paragraph-properties fo:margin-top="0cm" fo:margin-bottom="0.499cm" style:contextual-spacing="false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Text_20_body">
      <style:text-properties fo:font-weight="bold"/>
    </style:style>
    <style:style style:name="P5" style:family="paragraph" style:parent-style-name="Text_20_body" style:list-style-name="L2"/>
    <style:style style:name="P6" style:family="paragraph" style:parent-style-name="Standard">
      <style:paragraph-properties fo:margin-left="0cm" fo:margin-right="0cm" fo:margin-top="0cm" fo:margin-bottom="0.499cm" style:contextual-spacing="false" fo:text-indent="0cm" style:auto-text-indent="false"/>
    </style:style>
    <style:style style:name="P7" style:family="paragraph" style:parent-style-name="Text_20_body" style:list-style-name="L3"/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 style:list-style-name="L4"/>
    <style:style style:name="P10" style:family="paragraph" style:parent-style-name="Quotations">
      <style:text-properties fo:font-weight="bold"/>
    </style:style>
    <style:style style:name="P11" style:family="paragraph" style:parent-style-name="Heading_20_4">
      <style:text-properties fo:font-weight="bold"/>
    </style:style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P19" style:family="paragraph" style:parent-style-name="Text_20_body" style:list-style-name="L12"/>
    <style:style style:name="P20" style:family="paragraph" style:parent-style-name="Text_20_body" style:list-style-name="L13"/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ente escolha! O loop <text:span text:style-name="Source_20_Text">for</text:span> é a ferramenta perfeita quando sabemos <text:span text:style-name="T1">exatamente quantas vezes</text:span> queremos que o computador repita uma tarefa. Ela é chamada de "Estrutura Controlada por Contador" porque funciona literalmente com um contador que vai somando (ou subtraindo) a cada volta.</text:p>
      <text:h text:style-name="Heading_20_3" text:outline-level="3">🏛️ Para que serve o <text:span text:style-name="Source_20_Text">for</text:span> em Projetos Reais?</text:h>
      <text:p text:style-name="Text_20_body">No mundo real, o <text:span text:style-name="Source_20_Text">for</text:span> é usado sempre que lidamos com listas de dados ou repetições finitas:</text:p>
      <text:list text:style-name="L1">
        <text:list-item>
          <text:p text:style-name="P1"><text:span text:style-name="T1">Redes Sociais:</text:span> Percorrer uma lista de posts e mostrar os primeiros 10 no teu feed.</text:p>
        </text:list-item>
        <text:list-item>
          <text:p text:style-name="P1"><text:span text:style-name="T1">E-commerce:</text:span> Somar o preço de todos os produtos que estão no carrinho de compras.</text:p>
        </text:list-item>
        <text:list-item>
          <text:p text:style-name="P1"><text:span text:style-name="T1">Jogos:</text:span> Gerar 5 monstros na tela no início de uma fase.</text:p>
        </text:list-item>
      </text:list>
      <text:h text:style-name="Heading_20_3" text:outline-level="3">⚙️ A Anatomia do <text:span text:style-name="Source_20_Text">for</text:span></text:h>
      <text:p text:style-name="Text_20_body">A sintaxe do <text:span text:style-name="Source_20_Text">for</text:span> assusta ao início porque tem 3 comandos dentro dos mesmos parênteses, separados por <text:span text:style-name="T1">ponto e vírgula (</text:span><text:span text:style-name="Source_20_Text"><text:span text:style-name="T1">;</text:span></text:span><text:span text:style-name="T1">)</text:span>:</text:p>
      <text:p text:style-name="P2">JavaScript</text:p>
      <text:p text:style-name="Preformatted_20_Text"><text:span text:style-name="Source_20_Text">for (inicialização; condição; incremento) {</text:span></text:p>
      <text:p text:style-name="Preformatted_20_Text"><text:span text:style-name="Source_20_Text"><text:s text:c="4"/>// Código que vai ser repetido</text:span></text:p>
      <text:p text:style-name="P3"><text:span text:style-name="Source_20_Text">}</text:span></text:p>
      <text:p text:style-name="Standard">Vamos ver isto com um exemplo real. Imagina que queres que o computador conte de 1 até 3:</text:p>
      <text:p text:style-name="P2">JavaScript</text:p>
      <text:p text:style-name="Preformatted_20_Text"><text:span text:style-name="Source_20_Text">for (let i = 1; i &lt;= 3; i++) {</text:span></text:p>
      <text:p text:style-name="Preformatted_20_Text"><text:span text:style-name="Source_20_Text"><text:s text:c="4"/>console.log("Volta número: " + i);</text:span></text:p>
      <text:p text:style-name="P3"><text:span text:style-name="Source_20_Text">}</text:span></text:p>
      <text:p text:style-name="P4">O que está a acontecer ali dentro?</text:p>
      <text:list text:style-name="L2">
        <text:list-item>
          <text:p text:style-name="P5"><text:span text:style-name="Source_20_Text"><text:span text:style-name="T1">let i = 1;</text:span></text:span><text:span text:style-name="T1"> (Inicialização):</text:span> Criamos uma variável chamada <text:span text:style-name="Source_20_Text">i</text:span> (de <text:span text:style-name="T2">index</text:span> ou indicador) que começa no número 1. Isto só roda <text:span text:style-name="T1">uma vez</text:span>, logo no início.</text:p>
        </text:list-item>
        <text:list-item>
          <text:p text:style-name="P5"><text:span text:style-name="Source_20_Text"><text:span text:style-name="T1">i &lt;= 3;</text:span></text:span><text:span text:style-name="T1"> (Condição):</text:span> Antes de cada volta, o computador pergunta: "<text:span text:style-name="Source_20_Text">i</text:span> ainda é menor ou igual a 3?". Se for <text:span text:style-name="Source_20_Text">true</text:span>, ele faz a volta. Se for <text:span text:style-name="Source_20_Text">false</text:span>, o loop para imediatamente.</text:p>
        </text:list-item>
        <text:list-item>
          <text:p text:style-name="P5"><text:span text:style-name="Source_20_Text"><text:span text:style-name="T1">i++</text:span></text:span><text:span text:style-name="T1"> (Incremento):</text:span> No final de cada volta, o computador adiciona +1 ao valor de <text:span text:style-name="Source_20_Text">i</text:span> (lembras-te do <text:span text:style-name="Source_20_Text">i++</text:span> que aprendemos?).</text:p>
        </text:list-item>
      </text:list>
      <text:p text:style-name="Text_20_body">O resultado na consola seria:</text:p>
      <text:p text:style-name="Quotations"><text:span text:style-name="Source_20_Text">Volta número: 1</text:span> <text:span text:style-name="Source_20_Text">Volta número: 2</text:span> <text:span text:style-name="Source_20_Text">Volta número: 3</text:span></text:p>
      <text:h text:style-name="Heading_20_3" text:outline-level="3">🏋️‍♂️ Exercício 1: O Lançador de Foguetes</text:h>
      <text:p text:style-name="Text_20_body">Vamos começar a praticar a leitura. Um engenheiro da NASA escreveu este código para fazer a contagem decrescente de um foguete, mas o loop está a funcionar ao contrário (em contagem decrescente!).</text:p>
      <text:p text:style-name="P6">JavaScript</text:p>
      <text:p text:style-name="Preformatted_20_Text"><text:soft-page-break/><text:span text:style-name="Source_20_Text">for (let i = 5; i &gt;= 1; i--) {</text:span></text:p>
      <text:p text:style-name="Preformatted_20_Text"><text:span text:style-name="Source_20_Text"><text:s text:c="4"/>console.log(i + "...");</text:span></text:p>
      <text:p text:style-name="Preformatted_20_Text"><text:span text:style-name="Source_20_Text">}</text:span></text:p>
      <text:p text:style-name="P3"><text:span text:style-name="Source_20_Text">console.log("Descolar! 🚀");</text:span></text:p>
      <text:p text:style-name="P4">A tua missão no Exercício 1:</text:p>
      <text:list text:style-name="L3">
        <text:list-item>
          <text:p text:style-name="P7">A variável <text:span text:style-name="Source_20_Text">i</text:span> começa em que número?</text:p>
        </text:list-item>
        <text:list-item>
          <text:p text:style-name="P7">Em cada volta, o que faz o comando <text:span text:style-name="Source_20_Text">i--</text:span>?</text:p>
        </text:list-item>
        <text:list-item>
          <text:p text:style-name="P7">Quais serão os números impressos na consola antes da mensagem "Descolar!"?</text:p>
        </text:list-item>
      </text:list>
      <text:p text:style-name="Standard">5. subtrai 1. <text:s/>5...</text:p>
      <text:p text:style-name="Standard">4...</text:p>
      <text:p text:style-name="Standard">3...</text:p>
      <text:p text:style-name="Standard">2...</text:p>
      <text:p text:style-name="Standard">1…</text:p>
      <text:p text:style-name="Standard"/>
      <text:p text:style-name="Text_20_body"><text:span text:style-name="T1">Perfeito! Resposta impecável!</text:span> 🚀</text:p>
      <text:p text:style-name="Text_20_body">Você entendeu perfeitamente a lógica da contagem decrescente. O <text:span text:style-name="Source_20_Text">i--</text:span> vai retirando 1 ao contador a cada volta, e o loop para assim que o <text:span text:style-name="Source_20_Text">i</text:span> deixa de ser maior ou igual a 1.</text:p>
      <text:h text:style-name="Heading_20_3" text:outline-level="3">🏋️‍♂️ Exercício 2: O Acumulador (Somatório de Pontos)</text:h>
      <text:p text:style-name="Text_20_body">Em projetos reais, o <text:span text:style-name="Source_20_Text">for</text:span> não serve apenas para mostrar números, ele serve para <text:span text:style-name="T1">acumular</text:span> valores.</text:p>
      <text:p text:style-name="Text_20_body">Imagina que estás a programar um jogo e queres somar os pontos que o jogador ganhou em 4 rondas seguidas.</text:p>
      <text:p text:style-name="P8">JavaScript</text:p>
      <text:p text:style-name="Preformatted_20_Text"><text:span text:style-name="Source_20_Text">let pontuacaoTotal = 0;</text:span></text:p>
      <text:p text:style-name="Preformatted_20_Text"/>
      <text:p text:style-name="Preformatted_20_Text"><text:span text:style-name="Source_20_Text">for (let i = 1; i &lt;= 4; i++) {</text:span></text:p>
      <text:p text:style-name="Preformatted_20_Text"><text:span text:style-name="Source_20_Text"><text:s text:c="4"/>pontuacaoTotal = pontuacaoTotal + 10;</text:span></text:p>
      <text:p text:style-name="Preformatted_20_Text"><text:span text:style-name="Source_20_Text">}</text:span></text:p>
      <text:p text:style-name="Preformatted_20_Text"/>
      <text:p text:style-name="P3"><text:span text:style-name="Source_20_Text">console.log("Pontuação Final: " + pontuacaoTotal + " pontos! 🏆");</text:span></text:p>
      <text:p text:style-name="P4">A tua missão no Exercício 2:</text:p>
      <text:list text:style-name="L4">
        <text:list-item>
          <text:p text:style-name="P9">O loop vai dar quantas voltas no total?</text:p>
        </text:list-item>
        <text:list-item>
          <text:p text:style-name="P9">A cada volta, quantos pontos são somados à <text:span text:style-name="Source_20_Text">pontuacaoTotal</text:span>?</text:p>
        </text:list-item>
        <text:list-item>
          <text:p text:style-name="P9">Qual será o valor final impresso na consola?</text:p>
        </text:list-item>
      </text:list>
      <text:p text:style-name="Standard">o loop vai dar 4 voltas no total. 10 <text:s/>pontos. 40 pontos. Eu tenho dificuldade de ler a expressa dos exercicios propostos. como eu vou ler: <text:s/>for (let i = 1; i &lt;= 4; i++) {</text:p>
      <text:p text:style-name="Standard"><text:s text:c="4"/>pontuacaoTotal = pontuacaoTotal + 10;</text:p>
      <text:p text:style-name="Standard">}</text:p>
      <text:p text:style-name="Standard"/>
      <text:p text:style-name="Text_20_body"><text:span text:style-name="T1">Acertou em cheio no resultado!</text:span> São 4 voltas, 10 pontos por volta, totalizando <text:span text:style-name="T1">40 pontos</text:span>.</text:p>
      <text:p text:style-name="Text_20_body"><text:soft-page-break/>Validar as suas respostas é ótimo, mas a sua dúvida sobre <text:span text:style-name="T1">como ler a expressão</text:span> é a chave de ouro para dominar a programação de verdade. Esse código parece uma sopa de letras ao início, por isso vamos aprender a lê-lo como se fosse uma história em português.</text:p>
      <text:h text:style-name="Heading_20_3" text:outline-level="3">📖 Como ler o <text:span text:style-name="Source_20_Text">for</text:span> em "Português Claro"</text:h>
      <text:p text:style-name="Text_20_body">Sempre que vir a linha: <text:span text:style-name="Source_20_Text">for (let i = 1; i &lt;= 4; i++)</text:span>, leia mentalmente assim:</text:p>
      <text:p text:style-name="P10">"Cria um contador que começa em 1. Enquanto esse contador for menor ou igual a 4, faz o que está lá dentro e, no fim de cada volta, soma-lhe 1."</text:p>
      <text:h text:style-name="Heading_20_3" text:outline-level="3">🕵️‍♂️ O "Filme" Passo a Passo (O que o computador faz)</text:h>
      <text:p text:style-name="Text_20_body">Para não se perder na leitura, divida a linha em 3 partes e imagine o computador a executar os passos nesta ordem:</text:p>
      <text:h text:style-name="P11" text:outline-level="4">1ª Volta (A Preparação)</text:h>
      <text:list text:style-name="L5">
        <text:list-item>
          <text:p text:style-name="P12"><text:span text:style-name="T1">O computador lê:</text:span> <text:span text:style-name="Source_20_Text">let i = 1;</text:span> ➔ <text:span text:style-name="T2">"Ok, o meu contador </text:span><text:span text:style-name="Source_20_Text"><text:span text:style-name="T2">i</text:span></text:span><text:span text:style-name="T2"> vale 1."</text:span></text:p>
        </text:list-item>
        <text:list-item>
          <text:p text:style-name="P12"><text:span text:style-name="T1">O computador pergunta:</text:span> <text:span text:style-name="Source_20_Text">i &lt;= 4;</text:span> ➔ <text:span text:style-name="T2">"1 é menor ou igual a 4? Sim (True)!"</text:span> * <text:span text:style-name="T1">O computador entra e faz a ação:</text:span> <text:span text:style-name="Source_20_Text">pontuacaoTotal = pontuacaoTotal + 10;</text:span> ➔ O total que era 0 passa a ser <text:span text:style-name="T1">10</text:span>.</text:p>
        </text:list-item>
        <text:list-item>
          <text:p text:style-name="P12"><text:span text:style-name="T1">O computador faz o incremento:</text:span> <text:span text:style-name="Source_20_Text">i++</text:span> ➔ O contador <text:span text:style-name="Source_20_Text">i</text:span> ganha mais um e passa a valer <text:span text:style-name="T1">2</text:span>.</text:p>
        </text:list-item>
      </text:list>
      <text:h text:style-name="P11" text:outline-level="4">2ª Volta</text:h>
      <text:list text:style-name="L6">
        <text:list-item>
          <text:p text:style-name="P13"><text:span text:style-name="T2">(A parte </text:span><text:span text:style-name="Source_20_Text"><text:span text:style-name="T2">let i = 1</text:span></text:span><text:span text:style-name="T2"> já não é lida, só serviu para começar)</text:span></text:p>
        </text:list-item>
        <text:list-item>
          <text:p text:style-name="P13"><text:span text:style-name="T1">O computador pergunta:</text:span> <text:span text:style-name="Source_20_Text">i &lt;= 4;</text:span> ➔ <text:span text:style-name="T2">"2 é menor ou igual a 4? Sim!"</text:span></text:p>
        </text:list-item>
        <text:list-item>
          <text:p text:style-name="P13"><text:span text:style-name="T1">Ação:</text:span> Soma mais 10. O total passa para <text:span text:style-name="T1">20</text:span>.</text:p>
        </text:list-item>
        <text:list-item>
          <text:p text:style-name="P13"><text:span text:style-name="T1">Incremento:</text:span> <text:span text:style-name="Source_20_Text">i++</text:span> ➔ O contador <text:span text:style-name="Source_20_Text">i</text:span> passa a valer <text:span text:style-name="T1">3</text:span>.</text:p>
        </text:list-item>
      </text:list>
      <text:h text:style-name="P11" text:outline-level="4">3ª Volta</text:h>
      <text:list text:style-name="L7">
        <text:list-item>
          <text:p text:style-name="P14"><text:span text:style-name="T1">O computador pergunta:</text:span> <text:span text:style-name="Source_20_Text">i &lt;= 4;</text:span> ➔ <text:span text:style-name="T2">"3 é menor ou igual a 4? Sim!"</text:span></text:p>
        </text:list-item>
        <text:list-item>
          <text:p text:style-name="P14"><text:span text:style-name="T1">Ação:</text:span> Soma mais 10. O total passa para <text:span text:style-name="T1">30</text:span>.</text:p>
        </text:list-item>
        <text:list-item>
          <text:p text:style-name="P14"><text:span text:style-name="T1">Incremento:</text:span> <text:span text:style-name="Source_20_Text">i++</text:span> ➔ O contador <text:span text:style-name="Source_20_Text">i</text:span> passa a valer <text:span text:style-name="T1">4</text:span>.</text:p>
        </text:list-item>
      </text:list>
      <text:h text:style-name="P11" text:outline-level="4">4ª Volta</text:h>
      <text:list text:style-name="L8">
        <text:list-item>
          <text:p text:style-name="P15"><text:span text:style-name="T1">O computador pergunta:</text:span> <text:span text:style-name="Source_20_Text">i &lt;= 4;</text:span> ➔ <text:span text:style-name="T2">"4 é menor ou igual a 4? Sim, é igual!"</text:span></text:p>
        </text:list-item>
        <text:list-item>
          <text:p text:style-name="P15"><text:span text:style-name="T1">Ação:</text:span> Soma mais 10. O total passa para <text:span text:style-name="T1">40</text:span>.</text:p>
        </text:list-item>
        <text:list-item>
          <text:p text:style-name="P15"><text:span text:style-name="T1">Incremento:</text:span> <text:span text:style-name="Source_20_Text">i++</text:span> ➔ O contador <text:span text:style-name="Source_20_Text">i</text:span> passa a valer <text:span text:style-name="T1">5</text:span>.</text:p>
        </text:list-item>
      </text:list>
      <text:h text:style-name="P11" text:outline-level="4">O Fim do Loop</text:h>
      <text:list text:style-name="L9">
        <text:list-item>
          <text:p text:style-name="P16"><text:span text:style-name="T1">O computador pergunta:</text:span> <text:span text:style-name="Source_20_Text">i &lt;= 4;</text:span> ➔ <text:span text:style-name="T2">"5 é menor ou igual a 4? </text:span><text:span text:style-name="T3">Não (False)!</text:span><text:span text:style-name="T2">"</text:span></text:p>
        </text:list-item>
        <text:list-item>
          <text:p text:style-name="P16"><text:soft-page-break/>🛑 <text:span text:style-name="T1">O loop quebra!</text:span> O computador salta para fora das chavetas <text:span text:style-name="Source_20_Text">{}</text:span> e avança para o resto do programa.</text:p>
        </text:list-item>
      </text:list>
      <text:h text:style-name="Heading_20_3" text:outline-level="3">🏋️‍♂️ Exercício 3: Treinar a Leitura</text:h>
      <text:p text:style-name="Text_20_body">Vamos praticar esta nova forma de ler. Tente ler o código abaixo em voz alta usando a nossa "tradução" e diga-me o resultado.</text:p>
      <text:p text:style-name="P8">JavaScript</text:p>
      <text:p text:style-name="Preformatted_20_Text"><text:span text:style-name="Source_20_Text">let quantidadeDeErros = 0;</text:span></text:p>
      <text:p text:style-name="Preformatted_20_Text"/>
      <text:p text:style-name="Preformatted_20_Text"><text:span text:style-name="Source_20_Text">for (let i = 1; i &lt; 3; i++) {</text:span></text:p>
      <text:p text:style-name="Preformatted_20_Text"><text:span text:style-name="Source_20_Text"><text:s text:c="4"/>quantidadeDeErros = quantidadeDeErros + 1;</text:span></text:p>
      <text:p text:style-name="Preformatted_20_Text"><text:span text:style-name="Source_20_Text">}</text:span></text:p>
      <text:p text:style-name="Preformatted_20_Text"/>
      <text:p text:style-name="P3"><text:span text:style-name="Source_20_Text">console.log("Erros detetados: " + quantidadeDeErros);</text:span></text:p>
      <text:p text:style-name="Text_20_body"><text:span text:style-name="T1">Muita atenção à condição:</text:span> Repare que agora não diz <text:span text:style-name="Source_20_Text">i &lt;= 3</text:span> (menor ou igual), diz apenas <text:span text:style-name="Source_20_Text"><text:span text:style-name="T1">i &lt; 3</text:span></text:span> (menor estrito que 3).</text:p>
      <text:list text:style-name="L10">
        <text:list-item>
          <text:p text:style-name="P17">Como lê a linha do <text:span text:style-name="Source_20_Text">for</text:span> em português?</text:p>
        </text:list-item>
        <text:list-item>
          <text:p text:style-name="P17">O contador <text:span text:style-name="Source_20_Text">i</text:span> vai chegar a valer 3 dentro do loop?</text:p>
        </text:list-item>
        <text:list-item>
          <text:p text:style-name="P17">Qual será o valor final de <text:span text:style-name="Source_20_Text">quantidadeDeErros</text:span> impresso na consola?</text:p>
        </text:list-item>
      </text:list>
      <text:p text:style-name="Standard">Cria um contador que vai valer 1 enquanto o contador for menor a 3 acrescenta +1. Não. 2.</text:p>
      <text:p text:style-name="P4"/>
      <text:p text:style-name="Text_20_body"><text:span text:style-name="T1">Exclente! Você leu a instrução perfeitamente!</text:span> 👏</text:p>
      <text:p text:style-name="Text_20_body">A sua tradução mental foi precisa: <text:span text:style-name="T2">"Cria um contador que começa em 1, e enquanto ele for menor que 3, faz a ação e acrescenta 1"</text:span>.</text:p>
      <text:p text:style-name="Text_20_body">Como a condição era <text:span text:style-name="Source_20_Text">i &lt; 3</text:span> (menor estrito), quando o <text:span text:style-name="Source_20_Text">i</text:span> passou a valer 3, o computador perguntou: <text:span text:style-name="T2">"3 é menor que 3?"</text:span> A resposta foi <text:span text:style-name="T1">Não (False)</text:span>, o que fez o loop parar imediatamente.</text:p>
      <text:p text:style-name="Text_20_body">Por isso, o loop deu apenas <text:span text:style-name="T1">2 voltas</text:span> (para <text:span text:style-name="Source_20_Text">i = 1</text:span> e <text:span text:style-name="Source_20_Text">i = 2</text:span>) e o resultado final foi exatamente <text:span text:style-name="T1">2</text:span>.</text:p>
      <text:h text:style-name="Heading_20_3" text:outline-level="3">🏋️‍♂️ Exercício 4: O Multiplicador (A Tabuada)</text:h>
      <text:p text:style-name="Text_20_body">Agora que já domina a leitura do <text:span text:style-name="Source_20_Text">for</text:span>, vamos ver como o próprio contador <text:span text:style-name="Source_20_Text">i</text:span> pode ser usado dentro da ação.</text:p>
      <text:p text:style-name="Text_20_body">Imagina que estás a criar uma aplicação escolar para ensinar a <text:span text:style-name="T1">tabuada do 5</text:span>.</text:p>
      <text:p text:style-name="P8">JavaScript</text:p>
      <text:p text:style-name="Preformatted_20_Text"><text:span text:style-name="Source_20_Text">for (let i = 1; i &lt;= 3; i++) {</text:span></text:p>
      <text:p text:style-name="Preformatted_20_Text"><text:span text:style-name="Source_20_Text"><text:s text:c="4"/>let resultado = 5 * i;</text:span></text:p>
      <text:p text:style-name="Preformatted_20_Text"><text:span text:style-name="Source_20_Text"><text:s text:c="4"/>console.log("5 x " + i + " = " + resultado);</text:span></text:p>
      <text:p text:style-name="P3"><text:span text:style-name="Source_20_Text">}</text:span></text:p>
      <text:p text:style-name="P4">A tua missão no Exercício 4:</text:p>
      <text:list text:style-name="L11">
        <text:list-item>
          <text:p text:style-name="P18">Traduz a linha do <text:span text:style-name="Source_20_Text">for</text:span> para português claro.</text:p>
        </text:list-item>
        <text:list-item>
          <text:p text:style-name="P18"><text:soft-page-break/>Na <text:span text:style-name="T1">primeira volta</text:span>, o <text:span text:style-name="Source_20_Text">i</text:span> vale 1. Qual será a conta feita e o que aparece no ecrã?</text:p>
        </text:list-item>
        <text:list-item>
          <text:p text:style-name="P18">Quais serão as <text:span text:style-name="T1">3 linhas de texto</text:span> que vão aparecer na consola no final deste loop?</text:p>
        </text:list-item>
      </text:list>
      <text:p text:style-name="Standard">cria uma contador que vai valer 1 caso o contador for menor ou igual a 3, acrescenta 1. A conta feita sera 5 e aparecera no ecra 5 x 1 = 5. <text:s/></text:p>
      <text:p text:style-name="Standard"/>
      <text:p text:style-name="Standard">5 x 1 = 5</text:p>
      <text:p text:style-name="Standard"><text:s/>5 x 2 = 10</text:p>
      <text:p text:style-name="Standard">5 x 3 = 15</text:p>
      <text:p text:style-name="Standard"/>
      <text:p text:style-name="Text_20_body"><text:span text:style-name="T1">Absolutamente perfeito! Nota 10!</text:span> 💯</text:p>
      <text:p text:style-name="Text_20_body">A tua leitura está impecável e os resultados estão totalmente corretos. Reparaste em como o próprio contador <text:span text:style-name="Source_20_Text">i</text:span> mudou a cada volta (<text:span text:style-name="Source_20_Text">1</text:span>, <text:span text:style-name="Source_20_Text">2</text:span>, <text:span text:style-name="Source_20_Text">3</text:span>) e alterou o resultado da multiplicação automaticamente? É exatamente assim que se gera uma tabuada inteira em milissegundos!</text:p>
      <text:h text:style-name="Heading_20_3" text:outline-level="3">👑 Nível Concluído: O Senhor dos Contadores!</text:h>
      <text:p text:style-name="Text_20_body">Dominas agora a mecânica do <text:span text:style-name="Source_20_Text">for</text:span>: sabe inicializar, sabe ler a condição de paragem e sabe como o incremento funciona passo a passo.</text:p>
      <text:p text:style-name="Text_20_body">Antes de passarmos para os projetos práticos com loops, temos a nossa pergunta de ouro da praxe.</text:p>
      <text:h text:style-name="Heading_20_3" text:outline-level="3">❓ A Nossa Pergunta Habitual: Para que serve o <text:span text:style-name="Source_20_Text">for</text:span> combinado com Arrays (Listas) em Projetos Reais?</text:h>
      <text:p text:style-name="Text_20_body">Nos exemplos anteriores, usamos números fixos (como contar até 3 ou 4). Mas, no mundo real, nós não sabemos de antemão quantos elementos existem.</text:p>
      <text:p text:style-name="Text_20_body">Imagina o feed do Instagram: hoje podes ter 10 fotos novas para ver, mas amanhã podes ter 50. O <text:span text:style-name="Source_20_Text">for</text:span> serve para ler <text:span text:style-name="T1">listas dinâmicas</text:span> (chamadas de <text:span text:style-name="T1">Arrays</text:span> em programação).</text:p>
      <text:list text:style-name="L12">
        <text:list-item>
          <text:p text:style-name="P19"><text:span text:style-name="T1">Exemplo Prático:</text:span> Em vez de dizer <text:span text:style-name="Source_20_Text">i &lt;= 10</text:span>, nós dizemos ao computador: <text:span text:style-name="Source_20_Text">i &lt; listaDeProdutos.length</text:span> (que significa: "corre o loop tantas vezes quanto o tamanho total desta lista").</text:p>
        </text:list-item>
        <text:list-item>
          <text:p text:style-name="P19">Se a lista tiver 3 produtos, ele dá 3 voltas. Se tiver 500, ele dá 500 voltas. O código é o mesmo, mas adapta-se ao tamanho real dos dados.</text:p>
        </text:list-item>
      </text:list>
      <text:h text:style-name="Heading_20_3" text:outline-level="3">🚀 O Próximo Passo</text:h>
      <text:p text:style-name="Text_20_body">Agora que já dominas a estrutura controlada por contador, o que preferes fazer?</text:p>
      <text:list text:style-name="L13">
        <text:list-item>
          <text:p text:style-name="P20"><text:span text:style-name="T1">1. Criar um miniprojeto prático</text:span> para veres o <text:span text:style-name="Source_20_Text">for</text:span> a trabalhar com uma lista real de dados (ex: calcular o total de uma fatura de supermercado ou listar os utilizadores online).</text:p>
        </text:list-item>
        <text:list-item>
          <text:p text:style-name="P20"><text:span text:style-name="T1">2. Aprender o primo do </text:span><text:span text:style-name="Source_20_Text"><text:span text:style-name="T1">for</text:span></text:span><text:span text:style-name="T1">:</text:span> O loop <text:span text:style-name="Source_20_Text"><text:span text:style-name="T1">while</text:span></text:span> (Estrutura Controlada por Condição), que serve para quando <text:span text:style-name="T2">não sabemos</text:span> quantas voltas vai dar (ex: repetir o jogo até o jogador morrer).</text:p>
        </text:list-item>
      </text:list>
      <text:p text:style-name="Text_20_body">Qual escolhes?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7T03:16:52.239945892</meta:creation-date>
    <dc:date>2026-06-27T04:15:40.976354203</dc:date>
    <dc:creator>João António</dc:creator>
    <meta:editing-duration>PT57M58S</meta:editing-duration>
    <meta:editing-cycles>8</meta:editing-cycles>
    <meta:generator>LibreOffice/26.2.4.2$Linux_X86_64 LibreOffice_project/620$Build-2</meta:generator>
    <meta:document-statistic meta:table-count="0" meta:image-count="0" meta:object-count="0" meta:page-count="5" meta:paragraph-count="132" meta:word-count="1684" meta:character-count="8611" meta:non-whitespace-character-count="7060"/>
  </office:meta>
</office:document-meta>
</file>