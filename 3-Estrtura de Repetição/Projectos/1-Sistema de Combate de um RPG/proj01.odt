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8:02:29.055393073</dc:date>
    <dc:creator>João António</dc:creator>
    <meta:editing-duration>PT3H39M27S</meta:editing-duration>
    <meta:editing-cycles>22</meta:editing-cycles>
    <meta:generator>LibreOffice/26.2.4.2$Linux_X86_64 LibreOffice_project/6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