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6" style:family="paragraph" style:parent-style-name="Heading_20_4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bold" officeooo:rsid="001ef461"/>
    </style:style>
    <style:style style:name="P7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P8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style:style style:name="T2" style:family="text">
      <style:text-properties officeooo:rsid="0031839d"/>
    </style:style>
    <style:style style:name="T3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stou muito entusiasmado com este passo!</text:span> Passar da teoria para a criação de projetos é onde a magia da programação acontece e onde o conhecimento se fixa para sempre.</text:p>
      <text:p text:style-name="P2">Para celebrarmos esta nova fase, vamos criar <text:span text:style-name="T1">dois miniprojetos práticos</text:span>. Eu dou-te o cenário, mostro-te o código com algumas partes em falta (ou desafios) e tu vais usar tudo o que aprendeste (loops, <text:span text:style-name="Source_20_Text">if</text:span>, <text:span text:style-name="Source_20_Text">break</text:span>, <text:span text:style-name="Source_20_Text">continue</text:span>) para os resolver.</text:p>
      <text:h text:style-name="P3" text:outline-level="3">🛒 Projeto 1: A Caixa Registadora Automática</text:h>
      <text:p text:style-name="P2">Imagina que estás a programar o sistema de um supermercado. O cliente vai passando os produtos. O sistema deve somar os valores, mas se um produto custar mais do que <text:span text:style-name="T1">100€</text:span>, o sistema deve ignorá-lo por segurança (precisa de autorização do gerente) usando o <text:span text:style-name="Source_20_Text">continue</text:span>. Se o total da fatura atingir ou passar os <text:span text:style-name="T1">200€</text:span>, o loop deve parar imediatamente usando o <text:span text:style-name="Source_20_Text">break</text:span> para não estourar o limite de crédito do cliente.</text:p>
      <text:p text:style-name="P2">Olha para o código abaixo:</text:p>
      <text:p text:style-name="P4"><text:span text:style-name="T2">J</text:span>avaScript</text:p>
      <text:p text:style-name="P5"><text:span text:style-name="Source_20_Text">const carrinhoDeCompras = [10, 20, 150, 30, 50, 80];</text:span></text:p>
      <text:p text:style-name="P5"><text:span text:style-name="Source_20_Text">let totalFatura = 0;</text:span></text:p>
      <text:p text:style-name="P5"/>
      <text:p text:style-name="P5"><text:span text:style-name="Source_20_Text">for (const preco of carrinhoDeCompras) {</text:span></text:p>
      <text:p text:style-name="P5"><text:span text:style-name="Source_20_Text"><text:s text:c="4"/>// Regra 1: Ignorar produtos acima de 100€</text:span></text:p>
      <text:p text:style-name="P5"><text:span text:style-name="Source_20_Text"><text:s text:c="4"/>if (preco &gt; 100) {</text:span></text:p>
      <text:p text:style-name="P5"><text:span text:style-name="Source_20_Text"><text:s text:c="8"/>console.log("Produto de " + preco + "€ precisa de autorização. A saltar...");</text:span></text:p>
      <text:p text:style-name="P5"><text:span text:style-name="Source_20_Text"><text:s text:c="8"/>continue;</text:span></text:p>
      <text:p text:style-name="P5"><text:span text:style-name="Source_20_Text"><text:s text:c="4"/>}</text:span></text:p>
      <text:p text:style-name="P5"><text:span text:style-name="Source_20_Text"><text:s text:c="4"/></text:span></text:p>
      <text:p text:style-name="P5"><text:span text:style-name="Source_20_Text"><text:s text:c="4"/>// Soma o produto autorizado</text:span></text:p>
      <text:p text:style-name="P5"><text:span text:style-name="Source_20_Text"><text:s text:c="4"/>totalFatura = totalFatura + preco;</text:span></text:p>
      <text:p text:style-name="P5"><text:span text:style-name="Source_20_Text"><text:s text:c="4"/>console.log("Produto adicionado: " + preco + "€ (Total atual: " + totalFatura + "€)");</text:span></text:p>
      <text:p text:style-name="P5"><text:span text:style-name="Source_20_Text"><text:s text:c="4"/></text:span></text:p>
      <text:p text:style-name="P5"><text:soft-page-break/><text:span text:style-name="Source_20_Text"><text:s text:c="4"/>// Regra 2: Bloquear se atingir o limite de 200€</text:span></text:p>
      <text:p text:style-name="P5"><text:span text:style-name="Source_20_Text"><text:s text:c="4"/>if (totalFatura &gt;= 200) {</text:span></text:p>
      <text:p text:style-name="P5"><text:span text:style-name="Source_20_Text"><text:s text:c="8"/>console.log("Limite de crédito atingido!");</text:span></text:p>
      <text:p text:style-name="P5"><text:span text:style-name="Source_20_Text"><text:s text:c="8"/>break;</text:span></text:p>
      <text:p text:style-name="P5"><text:span text:style-name="Source_20_Text"><text:s text:c="4"/>}</text:span></text:p>
      <text:p text:style-name="P5"><text:span text:style-name="Source_20_Text">}</text:span></text:p>
      <text:p text:style-name="P5"/>
      <text:p text:style-name="P5"><text:span text:style-name="Source_20_Text">console.log("Fatura Finalizada! Valor a pagar: " + totalFatura + "€");</text:span></text:p>
      <text:h text:style-name="P6" text:outline-level="4">A Tua Missão no Projeto 1:</text:h>
      <text:p text:style-name="P2">Seja o computador e faça o "filme" da execução.</text:p>
      <text:list text:style-name="L1">
        <text:list-item>
          <text:p text:style-name="P7">O terceiro produto custa <text:span text:style-name="T1">150€</text:span>. O que o <text:span text:style-name="Source_20_Text">continue</text:span> vai fazer com ele? Ele entra na soma do <text:span text:style-name="Source_20_Text">totalFatura</text:span>?</text:p>
        </text:list-item>
        <text:list-item>
          <text:p text:style-name="P7">O loop vai conseguir chegar a ler os dois últimos produtos (<text:span text:style-name="Source_20_Text">50</text:span> e <text:span text:style-name="Source_20_Text">80</text:span>) ou o <text:span text:style-name="Source_20_Text">break</text:span> vai pará-lo antes?</text:p>
        </text:list-item>
        <text:list-item>
          <text:p text:style-name="P7">Qual será o <text:span text:style-name="T1">Valor a pagar</text:span> final impresso no ecrã? (Dica: vá somando os valores permitidos um a um na ordem da lista).</text:p>
        </text:list-item>
      </text:list>
      <text:h text:style-name="P3" text:outline-level="3">🎲 Projeto 2: O Jogo de Adivinhação (Com <text:span text:style-name="Source_20_Text">while</text:span>)</text:h>
      <text:p text:style-name="P2">Este projeto nós vamos construir juntos logo a seguir, mas antes diz-me: quais são as tuas respostas para o <text:span text:style-name="T1">Projeto 1</text:span>?</text:p>
      <text:p text:style-name="P1">O continue vai pular para o proximos produto, e não vai entrar no totalFatura. Sim vai ler. 190.</text:p>
      <text:p text:style-name="P1"/>
      <text:p text:style-name="P1"><text:span text:style-name="T1">Quase tudo perfeito, com apenas um pequeno detalhe no final!</text:span> A tua análise sobre o <text:span text:style-name="Source_20_Text">continue</text:span> foi <text:span text:style-name="T1">100% correta</text:span>: o produto de 150€ foi completamente ignorado e não entrou na fatura.</text:p>
      <text:p text:style-name="P2">No entanto, o computador pregou-te uma rasteira no final da lista por causa da ordem da soma. Vamos fazer o filme passo a passo para veres onde o <text:span text:style-name="Source_20_Text">break</text:span> entrou em ação:</text:p>
      <text:h text:style-name="P3" text:outline-level="3"><text:soft-page-break/>🕵️‍♂️ O "Filme" Real da Caixa Registadora:</text:h>
      <text:list text:style-name="L2">
        <text:list-item>
          <text:p text:style-name="P8"><text:span text:style-name="T1">Produto 1 (10€):</text:span> Permitido. <text:span text:style-name="Source_20_Text">totalFatura</text:span> = <text:span text:style-name="T1">10€</text:span>.</text:p>
        </text:list-item>
        <text:list-item>
          <text:p text:style-name="P8"><text:span text:style-name="T1">Produto 2 (20€):</text:span> Permitido. <text:span text:style-name="Source_20_Text">totalFatura</text:span> = 10 + 20 = <text:span text:style-name="T1">30€</text:span>.</text:p>
        </text:list-item>
        <text:list-item>
          <text:p text:style-name="P8"><text:span text:style-name="T1">Produto 3 (150€):</text:span> <text:span text:style-name="Source_20_Text"><text:span text:style-name="T1">continue</text:span></text:span><text:span text:style-name="T1"> ativa!</text:span> Salta para o próximo. O total continua <text:span text:style-name="T1">30€</text:span>.</text:p>
        </text:list-item>
        <text:list-item>
          <text:p text:style-name="P8"><text:span text:style-name="T1">Produto 4 (30€):</text:span> Permitido. <text:span text:style-name="Source_20_Text">totalFatura</text:span> = 30 + 30 = <text:span text:style-name="T1">60€</text:span>.</text:p>
        </text:list-item>
        <text:list-item>
          <text:p text:style-name="P8"><text:span text:style-name="T1">Produto 5 (50€):</text:span> Permitido. <text:span text:style-name="Source_20_Text">totalFatura</text:span> = 60 + 50 = <text:span text:style-name="T1">110€</text:span>.</text:p>
        </text:list-item>
        <text:list-item>
          <text:p text:style-name="P8"><text:span text:style-name="T1">Produto 6 (80€):</text:span> Permitido. <text:span text:style-name="Source_20_Text">totalFatura</text:span> = 110 + 80 = <text:span text:style-name="T1">190€</text:span>.</text:p>
        </text:list-item>
      </text:list>
      <text:p text:style-name="P2"><text:span text:style-name="T1">A rasteira:</text:span> Como a soma dos produtos deu <text:span text:style-name="T1">190€</text:span>, o computador chegou à linha do <text:span text:style-name="Source_20_Text">if (totalFatura &gt;= 200)</text:span>. Ele perguntou: <text:span text:style-name="T3">"190 é maior ou igual a 200?"</text:span> A resposta foi <text:span text:style-name="T1">Não (Falso)</text:span>.</text:p>
      <text:p text:style-name="P2">Como foi falso, o <text:span text:style-name="Source_20_Text">break</text:span> <text:span text:style-name="T1">NUNCA</text:span> foi executado! O loop simplesmente chegou ao fim natural da lista de produtos. Portanto, tu acertaste no valor final (<text:span text:style-name="T1">190€</text:span>), mas o loop leu sim todos os produtos porque o limite de 200€ não foi atingido.</text:p>
      <text:p text:style-name="P2">Se a lista tivesse mais um produto de 20€ no fim, aí sim o total passaria para 210€, o <text:span text:style-name="Source_20_Text">break</text:span> seria acionado e o programa pararia. Percebeste o truque? 😊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8:37:35.207476761</dc:date>
    <dc:creator>João António</dc:creator>
    <meta:editing-duration>PT4H3M22S</meta:editing-duration>
    <meta:editing-cycles>25</meta:editing-cycles>
    <meta:generator>LibreOffice/26.2.4.2$Linux_X86_64 LibreOffice_project/620$Build-2</meta:generator>
    <meta:document-statistic meta:table-count="0" meta:image-count="0" meta:object-count="0" meta:page-count="3" meta:paragraph-count="46" meta:word-count="628" meta:character-count="3529" meta:non-whitespace-character-count="2878"/>
  </office:meta>
</office:document-meta>
</file>