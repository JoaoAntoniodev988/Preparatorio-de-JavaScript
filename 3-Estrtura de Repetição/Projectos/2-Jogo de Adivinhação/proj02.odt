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5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6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🎲 Projeto 2: O Jogo de Adivinhação (Com <text:span text:style-name="Source_20_Text">while</text:span>)</text:h>
      <text:p text:style-name="P2">Agora vamos programar juntos um mini-jogo clássico: o computador escolhe um número secreto e o jogador tem de adivinhar. Como não sabemos quantas tentativas o jogador vai precisar, usamos o <text:span text:style-name="Source_20_Text"><text:span text:style-name="T1">while</text:span></text:span>.</text:p>
      <text:p text:style-name="P2">A tua missão é completar os <text:span text:style-name="T1">três espaços em branco (???)</text:span> no código abaixo para o jogo funcionar corretamente.</text:p>
      <text:p text:style-name="P3">JavaScript</text:p>
      <text:p text:style-name="P4"><text:span text:style-name="Source_20_Text">const numeroSecreto = 7;</text:span></text:p>
      <text:p text:style-name="P4"><text:span text:style-name="Source_20_Text">let tentativaDoJogador = 0; </text:span></text:p>
      <text:p text:style-name="P4"><text:span text:style-name="Source_20_Text">let acertou = false;</text:span></text:p>
      <text:p text:style-name="P4"/>
      <text:p text:style-name="P4"><text:span text:style-name="Source_20_Text">// DESAFIO 1: Qual deve ser a condição para o jogo continuar rodando?</text:span></text:p>
      <text:p text:style-name="P4"><text:span text:style-name="Source_20_Text">// Dica: O jogo continua ENQUANTO a variável 'acertou' for igual a false.</text:span></text:p>
      <text:p text:style-name="P4"><text:span text:style-name="Source_20_Text">while (acertou === ???) {</text:span></text:p>
      <text:p text:style-name="P4"><text:span text:style-name="Source_20_Text"><text:s text:c="4"/></text:span></text:p>
      <text:p text:style-name="P4"><text:span text:style-name="Source_20_Text"><text:s text:c="4"/>// Simula o jogador a tentar um número (vamos subir de 1 em 1 para testar)</text:span></text:p>
      <text:p text:style-name="P4"><text:span text:style-name="Source_20_Text"><text:s text:c="4"/>tentativaDoJogador = tentativaDoJogador + 1;</text:span></text:p>
      <text:p text:style-name="P4"><text:span text:style-name="Source_20_Text"><text:s text:c="4"/>console.log("O jogador tentou o número: " + tentativaDoJogador);</text:span></text:p>
      <text:p text:style-name="P4"><text:span text:style-name="Source_20_Text"><text:s text:c="4"/></text:span></text:p>
      <text:p text:style-name="P4"><text:span text:style-name="Source_20_Text"><text:s text:c="4"/>// DESAFIO 2: Se a tentativa do jogador for IGUAL ao número secreto...</text:span></text:p>
      <text:p text:style-name="P4"><text:span text:style-name="Source_20_Text"><text:s text:c="4"/>if (tentativaDoJogador === ???) {</text:span></text:p>
      <text:p text:style-name="P4"><text:span text:style-name="Source_20_Text"><text:s text:c="8"/>console.log("Parabéns! Descobriu o número secreto!");</text:span></text:p>
      <text:p text:style-name="P4"><text:span text:style-name="Source_20_Text"><text:s text:c="8"/></text:span></text:p>
      <text:p text:style-name="P4"><text:span text:style-name="Source_20_Text"><text:s text:c="8"/>// DESAFIO 3: O que fazemos com a variável 'acertou' para o loop parar na próxima volta?</text:span></text:p>
      <text:p text:style-name="P4"><text:span text:style-name="Source_20_Text"><text:s text:c="8"/>acertou = ???; 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><text:soft-page-break/></text:p>
      <text:p text:style-name="P4"><text:span text:style-name="Source_20_Text">console.log("Fim do Jogo!");</text:span></text:p>
      <text:p text:style-name="P5"><text:span text:style-name="T1">Como preencherias os três </text:span><text:span text:style-name="Source_20_Text"><text:span text:style-name="T1">???</text:span></text:span><text:span text:style-name="T1">?</text:span></text:p>
      <text:list text:style-name="L1">
        <text:list-item>
          <text:p text:style-name="P6"><text:span text:style-name="T1">Espaço 1:</text:span> <text:span text:style-name="Source_20_Text">while (acertou === ???)</text:span></text:p>
        </text:list-item>
        <text:list-item>
          <text:p text:style-name="P6"><text:span text:style-name="T1">Espaço 2:</text:span> <text:span text:style-name="Source_20_Text">if (tentativaDoJogador === ???)</text:span></text:p>
        </text:list-item>
        <text:list-item>
          <text:p text:style-name="P6"><text:span text:style-name="T1">Espaço 3:</text:span> <text:span text:style-name="Source_20_Text">acertou = ???;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8:40:12.467821144</dc:date>
    <dc:creator>João António</dc:creator>
    <meta:editing-duration>PT3H50M30S</meta:editing-duration>
    <meta:editing-cycles>25</meta:editing-cycles>
    <meta:generator>LibreOffice/26.2.4.2$Linux_X86_64 LibreOffice_project/620$Build-2</meta:generator>
    <meta:document-statistic meta:table-count="0" meta:image-count="0" meta:object-count="0" meta:page-count="2" meta:paragraph-count="28" meta:word-count="205" meta:character-count="1266" meta:non-whitespace-character-count="1023"/>
  </office:meta>
</office:document-meta>
</file>