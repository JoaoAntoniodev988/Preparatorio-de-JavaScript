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Google Sans Text" svg:font-family="'Google Sans Text'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ela1" style:family="table">
      <style:table-properties style:width="17cm" table:align="left"/>
    </style:style>
    <style:style style:name="Tabela1.A" style:family="table-column">
      <style:table-column-properties style:column-width="1.78cm"/>
    </style:style>
    <style:style style:name="Tabela1.B" style:family="table-column">
      <style:table-column-properties style:column-width="8.662cm"/>
    </style:style>
    <style:style style:name="Tabela1.C" style:family="table-column">
      <style:table-column-properties style:column-width="6.558cm"/>
    </style:style>
    <style:style style:name="Tabela1.A1" style:family="table-cell">
      <style:table-cell-properties style:vertical-align="middle" fo:padding-left="0.318cm" fo:padding-right="0.318cm" fo:padding-top="0.212cm" fo:padding-bottom="0.212cm" fo:border="0.05pt solid #c4c7c5"/>
    </style:style>
    <style:style style:name="P1" style:family="paragraph" style:parent-style-name="Heading_20_3">
      <style:paragraph-properties fo:margin-top="0cm" fo:margin-bottom="0.247cm" style:contextual-spacing="false" fo:line-height="115%"/>
    </style:style>
    <style:style style:name="P2" style:family="paragraph" style:parent-style-name="Text_20_body" style:list-style-name="L1"/>
    <style:style style:name="P3" style:family="paragraph" style:parent-style-name="Heading_20_4">
      <style:paragraph-properties fo:margin-top="0cm" fo:margin-bottom="0.247cm" style:contextual-spacing="false" fo:line-height="115%"/>
    </style:style>
    <style:style style:name="P4" style:family="paragraph" style:parent-style-name="Standard">
      <style:paragraph-properties fo:margin-left="0cm" fo:margin-right="0cm" fo:margin-top="0cm" fo:margin-bottom="0.499cm" style:contextual-spacing="false" fo:text-indent="0cm" style:auto-text-indent="false"/>
    </style:style>
    <style:style style:name="P5" style:family="paragraph" style:parent-style-name="Preformatted_20_Text">
      <style:paragraph-properties fo:margin-top="0cm" fo:margin-bottom="0.247cm" style:contextual-spacing="false" fo:line-height="115%"/>
    </style:style>
    <style:style style:name="P6" style:family="paragraph" style:parent-style-name="Text_20_body">
      <style:text-properties fo:font-weight="bold"/>
    </style:style>
    <style:style style:name="P7" style:family="paragraph" style:parent-style-name="Quotations">
      <style:paragraph-properties fo:margin-top="0cm" fo:margin-bottom="0.247cm" style:contextual-spacing="false" fo:line-height="115%"/>
      <style:text-properties fo:font-style="italic"/>
    </style:style>
    <style:style style:name="P8" style:family="paragraph" style:parent-style-name="Text_20_body" style:list-style-name="L2"/>
    <style:style style:name="P9" style:family="paragraph" style:parent-style-name="Text_20_body" style:list-style-name="L3"/>
    <style:style style:name="P10" style:family="paragraph" style:parent-style-name="Quotations">
      <style:paragraph-properties fo:margin-top="0cm" fo:margin-bottom="0.247cm" style:contextual-spacing="false" fo:line-height="115%"/>
    </style:style>
    <style:style style:name="P11" style:family="paragraph" style:parent-style-name="Standard">
      <style:paragraph-properties fo:margin-top="0cm" fo:margin-bottom="0.499cm" style:contextual-spacing="false"/>
    </style:style>
    <style:style style:name="P12" style:family="paragraph" style:parent-style-name="Text_20_body" style:list-style-name="L4"/>
    <style:style style:name="P13" style:family="paragraph" style:parent-style-name="Quotations">
      <style:paragraph-properties fo:margin-top="0cm" fo:margin-bottom="0.247cm" style:contextual-spacing="false" fo:line-height="115%"/>
      <style:text-properties fo:font-weight="bold"/>
    </style:style>
    <style:style style:name="P14" style:family="paragraph" style:parent-style-name="Heading_20_4">
      <style:paragraph-properties fo:margin-top="0cm" fo:margin-bottom="0.247cm" style:contextual-spacing="false" fo:line-height="115%"/>
      <style:text-properties fo:font-weight="bold"/>
    </style:style>
    <style:style style:name="P15" style:family="paragraph" style:parent-style-name="Text_20_body" style:list-style-name="L5"/>
    <style:style style:name="P16" style:family="paragraph" style:parent-style-name="Text_20_body" style:list-style-name="L6"/>
    <style:style style:name="P17" style:family="paragraph" style:parent-style-name="Text_20_body">
      <style:paragraph-properties fo:margin-left="0cm" fo:margin-right="0cm" fo:text-indent="0cm" style:auto-text-indent="false"/>
    </style:style>
    <style:style style:name="P18" style:family="paragraph" style:parent-style-name="Text_20_body" style:list-style-name="L7"/>
    <style:style style:name="P19" style:family="paragraph" style:parent-style-name="Text_20_body" style:list-style-name="L8">
      <style:text-properties fo:font-style="italic"/>
    </style:style>
    <style:style style:name="P20" style:family="paragraph" style:parent-style-name="Text_20_body" style:list-style-name="L8"/>
    <style:style style:name="P21" style:family="paragraph" style:parent-style-name="Text_20_body" style:list-style-name="L9"/>
    <style:style style:name="P22" style:family="paragraph" style:parent-style-name="Text_20_body" style:list-style-name="L10"/>
    <style:style style:name="P23" style:family="paragraph" style:parent-style-name="Table_20_Contents">
      <style:paragraph-properties fo:margin-left="0cm" fo:margin-right="0cm" fo:margin-top="0cm" fo:margin-bottom="0cm" style:contextual-spacing="false" fo:line-height="114%" fo:text-indent="0cm" style:auto-text-indent="false"/>
    </style:style>
    <style:style style:name="P24" style:family="paragraph" style:parent-style-name="Table_20_Contents">
      <style:paragraph-properties fo:margin-left="0cm" fo:margin-right="0cm" fo:margin-top="0cm" fo:margin-bottom="0.247cm" style:contextual-spacing="false" fo:line-height="114%" fo:text-indent="0cm" style:auto-text-indent="false"/>
    </style:style>
    <style:style style:name="P25" style:family="paragraph" style:parent-style-name="Table_20_Contents">
      <style:paragraph-properties fo:margin-left="0cm" fo:margin-right="0cm" fo:margin-top="0cm" fo:margin-bottom="0.247cm" style:contextual-spacing="false" fo:line-height="114%" fo:text-indent="0cm" style:auto-text-indent="false"/>
      <style:text-properties style:font-name="Google Sans Text"/>
    </style:style>
    <style:style style:name="P26" style:family="paragraph" style:parent-style-name="Table_20_Contents">
      <style:paragraph-properties fo:margin-left="0cm" fo:margin-right="0cm" fo:margin-top="0cm" fo:margin-bottom="0.247cm" style:contextual-spacing="false" fo:line-height="114%" fo:text-indent="0cm" style:auto-text-indent="false"/>
      <style:text-properties style:font-name="Google Sans Text" fo:font-weight="bold"/>
    </style:style>
    <style:style style:name="P27" style:family="paragraph" style:parent-style-name="Heading_20_3">
      <style:paragraph-properties fo:margin-left="0cm" fo:margin-right="0cm" fo:margin-top="0cm" fo:margin-bottom="0.247cm" style:contextual-spacing="false" fo:line-height="114%" fo:text-indent="0cm" style:auto-text-indent="false"/>
    </style:style>
    <style:style style:name="P28" style:family="paragraph" style:parent-style-name="Text_20_body">
      <style:paragraph-properties fo:margin-left="0cm" fo:margin-right="0cm" fo:margin-top="0cm" fo:margin-bottom="0.247cm" style:contextual-spacing="false" fo:line-height="114%" fo:text-indent="0cm" style:auto-text-indent="false"/>
    </style:style>
    <style:style style:name="P29" style:family="paragraph" style:parent-style-name="Text_20_body">
      <style:paragraph-properties fo:margin-left="0cm" fo:margin-right="0cm" fo:margin-top="0cm" fo:margin-bottom="0.247cm" style:contextual-spacing="false" fo:line-height="114%" fo:text-indent="0cm" style:auto-text-indent="false"/>
      <style:text-properties style:font-name="Google Sans Text"/>
    </style:style>
    <style:style style:name="P30" style:family="paragraph" style:parent-style-name="Text_20_body" style:list-style-name="L11">
      <style:paragraph-properties fo:margin-left="0cm" fo:margin-right="0cm" fo:margin-top="0cm" fo:margin-bottom="0.247cm" style:contextual-spacing="false" fo:line-height="114%" fo:text-indent="0cm" style:auto-text-indent="false" fo:padding="0cm" fo:border="none"/>
      <style:text-properties style:font-name="Google Sans Text"/>
    </style:style>
    <style:style style:name="T1" style:family="text">
      <style:text-properties fo:font-weight="bold"/>
    </style:style>
    <style:style style:name="T2" style:family="text">
      <style:text-properties officeooo:rsid="001ddaa2"/>
    </style:style>
    <style:style style:name="T3" style:family="text">
      <style:text-properties fo:font-style="italic"/>
    </style:style>
    <style:style style:name="T4" style:family="text">
      <style:text-properties style:font-name="Google Sans Text"/>
    </style:style>
    <style:style style:name="T5" style:family="text">
      <style:text-properties style:font-name="Google Sans Text" fo:font-weight="bold"/>
    </style:style>
    <style:style style:name="T6" style:family="text">
      <style:text-properties fo:font-family="'Google Sans', sans-serif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0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3">🏛️ Para que servem o <text:span text:style-name="Source_20_Text">while</text:span> e o <text:span text:style-name="Source_20_Text">do...while</text:span> em Projetos Reais?</text:h>
      <text:p text:style-name="Text_20_body">Ao contrário do <text:span text:style-name="Source_20_Text">for</text:span> (onde sabemos que vamos dar 3, 4 ou 10 voltas), nós usamos o <text:span text:style-name="Source_20_Text">while</text:span> quando <text:span text:style-name="T1">não fazemos a mínima ideia de quantas voltas o loop vai dar</text:span>. O código vai repetir-se até que algo mude no mundo real.</text:p>
      <text:list text:style-name="L1">
        <text:list-item>
          <text:p text:style-name="P2"><text:span text:style-name="T1">Jogos:</text:span> Manter o ecrã do jogo a rodar <text:span text:style-name="T1">enquanto</text:span> o jogador tiver vidas (<text:span text:style-name="Source_20_Text">vidas &gt; 0</text:span>). Se ele morrer na primeira tentativa, o loop dá 1 volta. Se ele jogar como um profissional por 3 horas, o loop dá milhões de voltas.</text:p>
        </text:list-item>
        <text:list-item>
          <text:p text:style-name="P2"><text:span text:style-name="T1">Aplicações de Música (Spotify):</text:span> Continuar a tocar músicas da playlist <text:span text:style-name="T1">enquanto</text:span> o botão "Avançar" não for premido ou a lista não acabar.</text:p>
        </text:list-item>
        <text:list-item>
          <text:p text:style-name="P2"><text:span text:style-name="T1">Segurança:</text:span> Pedir a palavra-passe ao utilizador <text:span text:style-name="T1">enquanto</text:span> ele continuar a digitar o código errado.</text:p>
        </text:list-item>
      </text:list>
      <text:h text:style-name="P1" text:outline-level="3">⚙️ A Diferença entre <text:span text:style-name="Source_20_Text">while</text:span> e <text:span text:style-name="Source_20_Text">do...while</text:span></text:h>
      <text:p text:style-name="Text_20_body">Eles são primos muito próximos, mas têm uma diferença crucial que muda a forma como o programa se comporta na primeira volta:</text:p>
      <text:h text:style-name="P3" text:outline-level="4">1. O Loop <text:span text:style-name="Source_20_Text">while</text:span> (Pensa primeiro, age depois)</text:h>
      <text:p text:style-name="Text_20_body">O <text:span text:style-name="Source_20_Text">while</text:span> avalia a condição <text:span text:style-name="T1">antes</text:span> de entrar no bloco de código. Se a condição for falsa logo no início, ele <text:span text:style-name="T1">nunca</text:span> roda o código de lá de dentro. Zero vezes.</text:p>
      <text:p text:style-name="P4"><text:span text:style-name="T2">J</text:span>avaScript</text:p>
      <text:p text:style-name="P5"><text:span text:style-name="Source_20_Text">while (condicao) {</text:span></text:p>
      <text:p text:style-name="P5"><text:span text:style-name="Source_20_Text"><text:s text:c="4"/>// Só roda se a condição for verdadeira</text:span></text:p>
      <text:p text:style-name="P5"><text:span text:style-name="Source_20_Text">}</text:span></text:p>
      <text:h text:style-name="P3" text:outline-level="4">2. O Loop <text:span text:style-name="Source_20_Text">do...while</text:span> (Age primeiro, pensa depois)</text:h>
      <text:p text:style-name="Text_20_body">O <text:span text:style-name="Source_20_Text">do...while</text:span> executa o bloco de código <text:span text:style-name="T1">primeiro</text:span>, e só no final de cada volta é que ele avalia a condição. Isto garante que o teu código vai rodar <text:span text:style-name="T1">pelo menos uma vez</text:span>, aconteça o que acontecer.</text:p>
      <text:p text:style-name="P4">JavaScript</text:p>
      <text:p text:style-name="P5"><text:span text:style-name="Source_20_Text">do {</text:span></text:p>
      <text:p text:style-name="P5"><text:span text:style-name="Source_20_Text"><text:s text:c="4"/>// Roda pelo menos uma vez antes de testar a condição</text:span></text:p>
      <text:p text:style-name="P5"><text:span text:style-name="Source_20_Text">} while (condicao);</text:span></text:p>
      <text:h text:style-name="P1" text:outline-level="3">🏋️‍♂️ Exercício 1: O Sistema de Download (<text:span text:style-name="Source_20_Text">while</text:span>)</text:h>
      <text:p text:style-name="Text_20_body">Vamos começar a treinar a leitura do <text:span text:style-name="Source_20_Text">while</text:span>. Imagina o sistema do teu telemóvel a descarregar uma atualização. A variável <text:span text:style-name="Source_20_Text">percentagem</text:span> vai subindo de 20 em 20.</text:p>
      <text:p text:style-name="P4">JavaScript</text:p>
      <text:p text:style-name="P5"><text:span text:style-name="Source_20_Text">let percentagem = 0;</text:span></text:p>
      <text:p text:style-name="P5"/>
      <text:p text:style-name="P5"><text:soft-page-break/><text:span text:style-name="Source_20_Text">while (percentagem &lt; 100) {</text:span></text:p>
      <text:p text:style-name="P5"><text:span text:style-name="Source_20_Text"><text:s text:c="4"/>percentagem = percentagem + 20;</text:span></text:p>
      <text:p text:style-name="P5"><text:span text:style-name="Source_20_Text"><text:s text:c="4"/>console.log("A descarregar... " + percentagem + "%");</text:span></text:p>
      <text:p text:style-name="P5"><text:span text:style-name="Source_20_Text">}</text:span></text:p>
      <text:p text:style-name="P5"><text:span text:style-name="Source_20_Text">console.log("Download Concluído! 🎉");</text:span></text:p>
      <text:p text:style-name="P6">Como ler isto em "Português Claro":</text:p>
      <text:p text:style-name="P7">"Enquanto a percentagem for menor que 100, soma 20 à percentagem e mostra o progresso no ecrã."</text:p>
      <text:p text:style-name="P6">A tua missão no Exercício 1:</text:p>
      <text:list text:style-name="L2">
        <text:list-item>
          <text:p text:style-name="P8">O computador lê <text:span text:style-name="Source_20_Text">while (percentagem &lt; 100)</text:span>. Na primeira volta, <text:span text:style-name="Source_20_Text">percentagem</text:span> vale <text:span text:style-name="Source_20_Text">0</text:span>. O computador entra no loop?</text:p>
        </text:list-item>
        <text:list-item>
          <text:p text:style-name="P8">De quanto em quanto a variável <text:span text:style-name="Source_20_Text">percentagem</text:span> aumenta em cada volta?</text:p>
        </text:list-item>
        <text:list-item>
          <text:p text:style-name="P8">Qual será a última percentagem exibida no ecrã antes de aparecer "Download Concluído!"? (Dica: o loop para assim que a condição der <text:span text:style-name="Source_20_Text">false</text:span>).</text:p>
        </text:list-item>
      </text:list>
      <text:p text:style-name="Text_20_body">Sim. de 20 em 20. <text:s/>100.</text:p>
      <text:p text:style-name="Text_20_body"><text:span text:style-name="T1">Exatamente! Resposta perfeita!</text:span> 🎯</text:p>
      <text:p text:style-name="Text_20_body">O computador entra no loop porque <text:span text:style-name="Source_20_Text">0 &lt; 100</text:span> é verdadeiro, soma de 20 em 20 e para precisamente nos <text:span text:style-name="Source_20_Text">100%</text:span>. Como 100 não é menor que 100, a condição torna-se falsa e ele sai do loop para mostrar a mensagem de conclusão.</text:p>
      <text:h text:style-name="P1" text:outline-level="3">🏋️‍♂️ Exercício 2: A Rasteira do <text:span text:style-name="Source_20_Text">while</text:span> (O loop que nunca rodou)</text:h>
      <text:p text:style-name="Text_20_body">Agora, veja este cenário com muita atenção. O mesmo engenheiro de downloads cometeu um erro ao configurar o sistema de atualização de outro ficheiro.</text:p>
      <text:p text:style-name="P4">JavaScript</text:p>
      <text:p text:style-name="P5"><text:span text:style-name="Source_20_Text">let percentagemFicheiro = 100;</text:span></text:p>
      <text:p text:style-name="P5"/>
      <text:p text:style-name="P5"><text:span text:style-name="Source_20_Text">while (percentagemFicheiro &lt; 100) {</text:span></text:p>
      <text:p text:style-name="P5"><text:span text:style-name="Source_20_Text"><text:s text:c="4"/>percentagemFicheiro = percentagemFicheiro + 20;</text:span></text:p>
      <text:p text:style-name="P5"><text:span text:style-name="Source_20_Text"><text:s text:c="4"/>console.log("A descarregar ficheiro secundário... " + percentagemFicheiro + "%");</text:span></text:p>
      <text:p text:style-name="P5"><text:span text:style-name="Source_20_Text">}</text:span></text:p>
      <text:p text:style-name="P5"/>
      <text:p text:style-name="P5"><text:span text:style-name="Source_20_Text">console.log("Fim do processo. Ficheiro verificado.");</text:span></text:p>
      <text:p text:style-name="P6">A tua missão no Exercício 2:</text:p>
      <text:list text:style-name="L3">
        <text:list-item>
          <text:p text:style-name="P9">Traduz a linha do <text:span text:style-name="Source_20_Text">while</text:span> para português claro.</text:p>
        </text:list-item>
        <text:list-item>
          <text:p text:style-name="P9"><text:soft-page-break/>Na primeira tentativa de leitura, a <text:span text:style-name="Source_20_Text">percentagemFicheiro</text:span> já vale <text:span text:style-name="Source_20_Text">100</text:span>. A condição <text:span text:style-name="Source_20_Text">percentagemFicheiro &lt; 100</text:span> é Verdadeira (Truthy) ou Falsa (Falsy)?</text:p>
        </text:list-item>
        <text:list-item>
          <text:p text:style-name="P9">O código que está dentro das chavetas <text:span text:style-name="Source_20_Text">{ }</text:span> vai rodar alguma vez? O que vai aparecer escrito no ecrã?</text:p>
        </text:list-item>
      </text:list>
      <text:p text:style-name="Text_20_body">Enquanto a percentagemFicheiro for menor que 100, soma 20 á percentagemFicheiro e mostra o pregresso no ecra . É Falsy e vai aparacer Fim do processo. Ficheiro verificado.</text:p>
      <text:p text:style-name="Text_20_body"><text:span text:style-name="T1">Que nível de atenção! Exato!</text:span> 👏👏</text:p>
      <text:p text:style-name="Text_20_body">Você apanhou a rasteira perfeitamente. Como a <text:span text:style-name="Source_20_Text">percentagemFicheiro</text:span> já era <text:span text:style-name="Source_20_Text">100</text:span>, a condição <text:span text:style-name="Source_20_Text">100 &lt; 100</text:span> deu <text:span text:style-name="T1">Falsa (Falsy)</text:span> logo à primeira tentativa.</text:p>
      <text:p text:style-name="Text_20_body">O computador nem sequer olhou para o código lá dentro. Saltou diretamente o bloco inteiro e imprimiu apenas:</text:p>
      <text:p text:style-name="P10"><text:span text:style-name="Source_20_Text">"Fim do processo. Ficheiro verificado."</text:span></text:p>
      <text:h text:style-name="P1" text:outline-level="3">🏋️‍♂️ Exercício 3: O Salvador <text:span text:style-name="Source_20_Text">do...while</text:span></text:h>
      <text:p text:style-name="Text_20_body">Agora, vamos corrigir o erro do engenheiro usando o <text:span text:style-name="Source_20_Text"><text:span text:style-name="T1">do...while</text:span></text:span>. Queremos que o sistema verifique o ficheiro pelo menos uma vez, mesmo que ele já diga 100%.</text:p>
      <text:p text:style-name="P11">JavaScript</text:p>
      <text:p text:style-name="P5"><text:span text:style-name="Source_20_Text">let bateriaTelemovel = 100;</text:span></text:p>
      <text:p text:style-name="P5"/>
      <text:p text:style-name="P5"><text:span text:style-name="Source_20_Text">do {</text:span></text:p>
      <text:p text:style-name="P5"><text:span text:style-name="Source_20_Text"><text:s text:c="4"/>console.log("A verificar saúde da bateria... Atual: " + bateriaTelemovel + "%");</text:span></text:p>
      <text:p text:style-name="P5"><text:span text:style-name="Source_20_Text"><text:s text:c="4"/>bateriaTelemovel = bateriaTelemovel - 50; </text:span></text:p>
      <text:p text:style-name="P5"><text:span text:style-name="Source_20_Text">} while (bateriaTelemovel &gt; 100);</text:span></text:p>
      <text:p text:style-name="P5"/>
      <text:p text:style-name="P5"><text:span text:style-name="Source_20_Text">console.log("Análise de energia concluída.");</text:span></text:p>
      <text:p text:style-name="P6">A tua missão no Exercício 3:</text:p>
      <text:list text:style-name="L4">
        <text:list-item>
          <text:p text:style-name="P12">Como o loop é um <text:span text:style-name="Source_20_Text">do...while</text:span>, o computador testa a condição no início ou faz a ação primeiro?</text:p>
        </text:list-item>
        <text:list-item>
          <text:p text:style-name="P12">Mesmo sabendo que a condição final <text:span text:style-name="Source_20_Text">bateriaTelemovel &gt; 100</text:span> vai dar falsa (porque 100 não é maior que 100), o texto <text:span text:style-name="Source_20_Text">"A verificar saúde da bateria..."</text:span> vai aparecer no ecrã? Se sim, quantas vezes?</text:p>
        </text:list-item>
        <text:list-item>
          <text:p text:style-name="P12">Qual será o resultado final impresso na consola?</text:p>
        </text:list-item>
      </text:list>
      <text:p text:style-name="Text_20_body">O computador vaz o ação primeiro. Não vai paracer porque a condição é falsa. <text:s/>O resultado final vai ser 50%. Embora eu tenha respondido eu não compreende muito bem essa estrutura condicional e tambem não sei como ler <text:s/>mentalmente.</text:p>
      <text:p text:style-name="Text_20_body"><text:soft-page-break/>A sua sinceridade é o passo mais importante para se tornar um programador de elite! Não se preocupe em ter falhado na previsão do resultado: o <text:span text:style-name="Source_20_Text">do...while</text:span> é mesmo famoso por dar nós na cabeça de quem está a começar.</text:p>
      <text:p text:style-name="Text_20_body">Vamos desatar esse nó agora mesmo. Primeiro, vamos aprender a ler esta estrutura mentalmente e, depois, vai perceber num estalar de dedos porque é que o texto <text:span text:style-name="T1">aparece sim</text:span> no ecrã.</text:p>
      <text:h text:style-name="P1" text:outline-level="3">📖 Como ler o <text:span text:style-name="Source_20_Text">do...while</text:span> em "Português Claro"</text:h>
      <text:p text:style-name="Text_20_body">A palavra <text:span text:style-name="Source_20_Text"><text:span text:style-name="T1">do</text:span></text:span> em inglês significa <text:span text:style-name="T1">"Faz"</text:span>. A palavra <text:span text:style-name="Source_20_Text"><text:span text:style-name="T1">while</text:span></text:span> significa <text:span text:style-name="T1">"Enquanto"</text:span>.</text:p>
      <text:p text:style-name="Text_20_body">Sempre que vir essa estrutura, leia mentalmente assim:</text:p>
      <text:p text:style-name="P13">"FAZ isto primeiro (sem fazer perguntas): [executa o código aqui de dentro]. SÓ DEPOIS é que verificas se a condição é verdadeira. ENQUANTO for verdadeira, volta lá acima e faz outra vez."</text:p>
      <text:h text:style-name="P1" text:outline-level="3">🕵️‍♂️ O Erro da Intuição: Por que o código roda mesmo sendo falso?</text:h>
      <text:p text:style-name="Text_20_body">Ao contrário do <text:span text:style-name="Source_20_Text">while</text:span> comum (que barra a entrada logo no início se for falso), o <text:span text:style-name="Source_20_Text">do...while</text:span> é como uma discoteca com entrada livre, onde o segurança só controla os bilhetes <text:span text:style-name="T1">à saída</text:span>.</text:p>
      <text:p text:style-name="Text_20_body">Vamos fazer o "filme" passo a passo do que o computador fez naquele exercício:</text:p>
      <text:h text:style-name="P14" text:outline-level="4">Passo 1: O Computador entra de olhos fechados</text:h>
      <text:p text:style-name="Text_20_body">A variável <text:span text:style-name="Source_20_Text">bateriaTelemovel</text:span> começa em <text:span text:style-name="Source_20_Text">100</text:span>. O computador chega à linha do <text:span text:style-name="Source_20_Text">do</text:span>. Ele <text:span text:style-name="T1">não faz nenhuma pergunta</text:span>. Ele simplesmente entra e executa as ordens:</text:p>
      <text:list text:style-name="L5">
        <text:list-item>
          <text:p text:style-name="P15">Imprime no ecrã: <text:span text:style-name="Source_20_Text">"A verificar saúde da bateria... Atual: 100%"</text:span> <text:span text:style-name="T3">(Cá está! Roda pela primeira vez!)</text:span></text:p>
        </text:list-item>
        <text:list-item>
          <text:p text:style-name="P15">Faz a conta: <text:span text:style-name="Source_20_Text">bateriaTelemovel = 100 - 50;</text:span> (A bateria passa a valer <text:span text:style-name="T1">50</text:span>).</text:p>
        </text:list-item>
      </text:list>
      <text:h text:style-name="P14" text:outline-level="4">Passo 2: O Segurança à Saída (O teste da condição)</text:h>
      <text:p text:style-name="Text_20_body">Só agora, depois de já ter feito o estrago e rodado o código, é que o computador chega à linha do <text:span text:style-name="Source_20_Text">while</text:span> para decidir se vai dar uma <text:span text:style-name="T1">segunda volta</text:span>:</text:p>
      <text:list text:style-name="L6">
        <text:list-item>
          <text:p text:style-name="P16"><text:span text:style-name="T1">A pergunta:</text:span> <text:span text:style-name="Source_20_Text">while (bateriaTelemovel &gt; 100)</text:span> ➔ <text:span text:style-name="T3">"50 é maior que 100?"</text:span></text:p>
        </text:list-item>
        <text:list-item>
          <text:p text:style-name="P16"><text:span text:style-name="T1">A resposta:</text:span> <text:span text:style-name="T1">Não (False)!</text:span></text:p>
        </text:list-item>
      </text:list>
      <text:h text:style-name="P14" text:outline-level="4">Passo 3: O Fim</text:h>
      <text:p text:style-name="Text_20_body">Como a resposta foi <text:span text:style-name="T1">False</text:span>, o computador decide não voltar lá acima. O loop morre ali. Ele avança para a linha seguinte e imprime: <text:span text:style-name="Source_20_Text">"Análise de energia concluída."</text:span></text:p>
      <text:p text:style-name="P10">💡 <text:span text:style-name="T1">Conclusão:</text:span> O texto apareceu exatamente <text:span text:style-name="T1">1 vez</text:span> no ecrã. O <text:span text:style-name="Source_20_Text">do...while</text:span> garante que o código roda pelo menos uma vez, mesmo que a condição seja a maior mentira do mundo!</text:p>
      <text:h text:style-name="P1" text:outline-level="3">🏋️‍♂️ Exercício 4: O Teste de Fixação (A Vingança)</text:h>
      <text:p text:style-name="Text_20_body">Para garantir que apanhou o truque do "roda primeiro, pergunta depois", tente ler este último cenário:</text:p>
      <text:p text:style-name="P17"><text:soft-page-break/>JavaScript</text:p>
      <text:p text:style-name="P5"><text:span text:style-name="Source_20_Text">let tentativasDeLogin = 0;</text:span></text:p>
      <text:p text:style-name="P5"/>
      <text:p text:style-name="P5"><text:span text:style-name="Source_20_Text">do {</text:span></text:p>
      <text:p text:style-name="P5"><text:span text:style-name="Source_20_Text"><text:s text:c="4"/>tentativasDeLogin = tentativasDeLogin + 1;</text:span></text:p>
      <text:p text:style-name="P5"><text:span text:style-name="Source_20_Text"><text:s text:c="4"/>console.log("Tentativa de login número: " + tentativasDeLogin);</text:span></text:p>
      <text:p text:style-name="P5"><text:span text:style-name="Source_20_Text">} while (tentativasDeLogin &lt; 1);</text:span></text:p>
      <text:p text:style-name="P5"/>
      <text:p text:style-name="P5"><text:span text:style-name="Source_20_Text">console.log("Sistema bloqueado por segurança.");</text:span></text:p>
      <text:p text:style-name="P6">A tua missão de leitura:</text:p>
      <text:list text:style-name="L7">
        <text:list-item>
          <text:p text:style-name="P18">Traduz este código para português claro usando a regra do <text:span text:style-name="T1">"FAZ ... ENQUANTO"</text:span>.</text:p>
        </text:list-item>
        <text:list-item>
          <text:p text:style-name="P18">Na primeira volta, o computador vai fazer a ação sem perguntar. Quanto vai valer <text:span text:style-name="Source_20_Text">tentativasDeLogin</text:span> depois de somar 1?</text:p>
        </text:list-item>
        <text:list-item>
          <text:p text:style-name="P18">Quando o computador chegar ao <text:span text:style-name="Source_20_Text">while (tentativasDeLogin &lt; 1)</text:span>, a condição vai ser Verdadeira ou Falsa? O loop vai dar uma segunda volta?</text:p>
        </text:list-item>
      </text:list>
      <text:p text:style-name="Text_20_body">Faz a soma de +1 na variavel tentativaDeLogin e mostra na tela. enquanto a varialvel tentativaDeLogin for menor a 1 mostra na tela sistema bloqueado por segurança. depois de somar 1 vai valer 1 . A condição vai ser falsa e o loop vai dar uma segunda volta.</text:p>
      <text:p text:style-name="Text_20_body">A tua tradução inicial foi muito boa, mas o finalzinho do "filme" pregou-te uma partida! Vamos ajustar esse detalhe para que nunca mais erres o comportamento do <text:span text:style-name="Source_20_Text">do...while</text:span>.</text:p>
      <text:p text:style-name="Text_20_body">Tu acertaste em cheio na primeira parte: <text:span text:style-name="T1">depois de somar 1, a variável passa a valer 1</text:span>. Excelente!</text:p>
      <text:p text:style-name="Text_20_body">Mas repara no que acontece a seguir:</text:p>
      <text:h text:style-name="P1" text:outline-level="3">🕵️‍♂️ O Erro no Final do Filme</text:h>
      <text:p text:style-name="Text_20_body">Quando o computador chega à linha do <text:span text:style-name="Source_20_Text">while (tentativasDeLogin &lt; 1)</text:span>, ele faz a pergunta:</text:p>
      <text:list text:style-name="L8">
        <text:list-item>
          <text:p text:style-name="P19">"1 é menor do que 1?"</text:p>
        </text:list-item>
        <text:list-item>
          <text:p text:style-name="P20">A resposta é: <text:span text:style-name="T1">Não, 1 é igual a 1 (Falso/Falsy)</text:span>.</text:p>
        </text:list-item>
      </text:list>
      <text:p text:style-name="Text_20_body">Como a condição é <text:span text:style-name="T1">Falsa</text:span>, o computador <text:span text:style-name="T1">NÃO</text:span> dá uma segunda volta! Ele desliga o loop imediatamente e avança para a linha seguinte fora das chavetas.</text:p>
      <text:h text:style-name="P1" text:outline-level="3">📖 A Tradução Correta e o Resultado no Ecrã</text:h>
      <text:p text:style-name="Text_20_body">A forma exata como o computador leu o código foi:</text:p>
      <text:p text:style-name="P10"><text:span text:style-name="T1">"FAZ isto primeiro:</text:span> Soma 1 às tentativas (Fica 1) e mostra 'Tentativa de login número: 1'. <text:span text:style-name="T1">ENQUANTO</text:span> as tentativas forem menores que 1, volta a repetir."</text:p>
      <text:p text:style-name="Text_20_body">Como 1 não é menor que 1, o loop parou na primeira volta. O que apareceu na consola foi exatamente isto:</text:p>
      <text:p text:style-name="Text_20_body"><text:soft-page-break/>Vamos a isso! Este será o teu exercício de mestre para consolidar o <text:span text:style-name="Source_20_Text">do...while</text:span> de uma vez por todas.</text:p>
      <text:p text:style-name="Text_20_body">Imagina que estás a programar o sistema de um <text:span text:style-name="T1">banco digital</text:span> (como o Revolut). O utilizador quer levantar dinheiro num ATM. O sistema vai tentar processar o levantamento, mas se o saldo ficar negativo, ele deve parar.</text:p>
      <text:p text:style-name="Text_20_body">Olha bem para os valores iniciais e acompanha o código:</text:p>
      <text:p text:style-name="P11">JavaScript</text:p>
      <text:p text:style-name="P5"><text:span text:style-name="Source_20_Text">let saldo = 100;</text:span></text:p>
      <text:p text:style-name="P5"><text:span text:style-name="Source_20_Text">let quantidadeLevantamentos = 0;</text:span></text:p>
      <text:p text:style-name="P5"/>
      <text:p text:style-name="P5"><text:span text:style-name="Source_20_Text">do {</text:span></text:p>
      <text:p text:style-name="P5"><text:span text:style-name="Source_20_Text"><text:s text:c="4"/>saldo = saldo - 100;</text:span></text:p>
      <text:p text:style-name="P5"><text:span text:style-name="Source_20_Text"><text:s text:c="4"/>quantidadeLevantamentos = quantidadeLevantamentos + 1;</text:span></text:p>
      <text:p text:style-name="P5"><text:span text:style-name="Source_20_Text"><text:s text:c="4"/></text:span></text:p>
      <text:p text:style-name="P5"><text:span text:style-name="Source_20_Text"><text:s text:c="4"/>console.log("Levantamento efetuado! Saldo atual: " + saldo + "€");</text:span></text:p>
      <text:p text:style-name="P5"><text:span text:style-name="Source_20_Text">} while (saldo &gt; 0);</text:span></text:p>
      <text:p text:style-name="P5"/>
      <text:p text:style-name="P5"><text:span text:style-name="Source_20_Text">console.log("Sessão encerrada. Total de levantamentos: " + quantidadeLevantamentos);</text:span></text:p>
      <text:p text:style-name="Preformatted_20_Text"/>
      <text:h text:style-name="P1" text:outline-level="3">🏦 A Tua Missão de Análise:</text:h>
      <text:p text:style-name="Text_20_body">Seja o computador e execute o código passo a passo:</text:p>
      <text:list text:style-name="L9">
        <text:list-item>
          <text:p text:style-name="P21">O <text:span text:style-name="Source_20_Text">do</text:span> manda entrar sem perguntar nada. Na <text:span text:style-name="T1">Volta 1</text:span>, o saldo passa de 100 para quanto? E a <text:span text:style-name="Source_20_Text">quantidadeLevantamentos</text:span> passa para quanto?</text:p>
        </text:list-item>
        <text:list-item>
          <text:p text:style-name="P21">No final da primeira volta, o computador faz a pergunta do <text:span text:style-name="Source_20_Text">while</text:span>: <text:span text:style-name="Source_20_Text">while (saldo &gt; 0)</text:span>. Com o novo valor do saldo, esta condição é <text:span text:style-name="T1">Veradeira</text:span> ou <text:span text:style-name="T1">Falsa</text:span>?</text:p>
        </text:list-item>
        <text:list-item>
          <text:p text:style-name="P21">O loop vai dar uma segunda volta ou vai parar logo ali? Qual será o <text:span text:style-name="T1">total de levantamentos</text:span> impresso na última linha?</text:p>
        </text:list-item>
      </text:list>
      <text:p text:style-name="Text_20_body"/>
      <text:p text:style-name="Text_20_body">De 100 para 0; para 1. A condição é falsa. O loop vai parar e <text:s/>o total de levantamento sera igual a 1.</text:p>
      <text:p text:style-name="Text_20_body"><text:span text:style-name="T1">BRILHANTE! Você destruiu o exercício!</text:span> 🥂🎉</text:p>
      <text:p text:style-name="Text_20_body">Exatamente isso! Você foi o computador perfeito agora.</text:p>
      <text:list text:style-name="L10">
        <text:list-item>
          <text:p text:style-name="P22">O saldo caiu de 100 para <text:span text:style-name="T1">0</text:span> e os levantamentos subiram para <text:span text:style-name="T1">1</text:span>.</text:p>
        </text:list-item>
        <text:list-item>
          <text:p text:style-name="P22">A pergunta foi: <text:span text:style-name="T3">"0 é maior que 0?"</text:span> e a resposta foi <text:span text:style-name="T1">Falsa</text:span>.</text:p>
        </text:list-item>
        <text:list-item>
          <text:p text:style-name="P22">O loop parou imediatamente e o ecrã mostrou que o total de levantamentos foi <text:span text:style-name="T1">1</text:span>.</text:p>
        </text:list-item>
      </text:list>
      <text:p text:style-name="Text_20_body"><text:soft-page-break/>Percebeu o que acabou de acontecer? Você compreendeu perfeitamente a lógica do <text:span text:style-name="Source_20_Text">do...while</text:span>. Ele fez a ação primeiro (deixou levantar o dinheiro), viu que o saldo chegou a zero e só aí barrou o utilizador de continuar a levantar mais.</text:p>
      <text:h text:style-name="P1" text:outline-level="3">🷑️ Tabela de Comparação Final (Para guardar no seu cérebro)</text:h>
      <text:p text:style-name="Text_20_body">Para nunca mais esquecer a diferença entre os três loops que aprendeu:</text:p>
      <text:p text:style-name="Text_20_body"/>
      <table:table table:name="Tabela1" table:style-name="Tabela1">
        <table:table-column table:style-name="Tabela1.A"/>
        <table:table-column table:style-name="Tabela1.B"/>
        <table:table-column table:style-name="Tabela1.C"/>
        <table:table-header-rows>
          <table:table-row>
            <table:table-cell table:style-name="Tabela1.A1" office:value-type="string">
              <text:p text:style-name="P23"><text:span text:style-name="Strong_20_Emphasis"><text:span text:style-name="T4">Loop</text:span></text:span></text:p>
            </table:table-cell>
            <table:table-cell table:style-name="Tabela1.A1" office:value-type="string">
              <text:p text:style-name="P23"><text:span text:style-name="Strong_20_Emphasis"><text:span text:style-name="T4">Quando usar?</text:span></text:span></text:p>
            </table:table-cell>
            <table:table-cell table:style-name="Tabela1.A1" office:value-type="string">
              <text:p text:style-name="P23"><text:span text:style-name="Strong_20_Emphasis"><text:span text:style-name="T4">Quantas vezes roda se a condição for falsa?</text:span></text:span></text:p>
            </table:table-cell>
          </table:table-row>
        </table:table-header-rows>
        <table:table-row>
          <table:table-cell table:style-name="Tabela1.A1" office:value-type="string">
            <text:p text:style-name="P24"><text:span text:style-name="Source_20_Text"><text:span text:style-name="T5">for</text:span></text:span></text:p>
          </table:table-cell>
          <table:table-cell table:style-name="Tabela1.A1" office:value-type="string">
            <text:p text:style-name="P25">Quando sabemos o número <text:span text:style-name="T1">exato</text:span> de voltas (ex: contar até 10).</text:p>
          </table:table-cell>
          <table:table-cell table:style-name="Tabela1.A1" office:value-type="string">
            <text:p text:style-name="P26">0 vezes</text:p>
          </table:table-cell>
        </table:table-row>
        <table:table-row>
          <table:table-cell table:style-name="Tabela1.A1" office:value-type="string">
            <text:p text:style-name="P24"><text:span text:style-name="Source_20_Text"><text:span text:style-name="T5">while</text:span></text:span></text:p>
          </table:table-cell>
          <table:table-cell table:style-name="Tabela1.A1" office:value-type="string">
            <text:p text:style-name="P25">Quando dependemos de uma condição (ex: enquanto o jogador tiver vidas).</text:p>
          </table:table-cell>
          <table:table-cell table:style-name="Tabela1.A1" office:value-type="string">
            <text:p text:style-name="P26">0 vezes</text:p>
          </table:table-cell>
        </table:table-row>
        <table:table-row>
          <table:table-cell table:style-name="Tabela1.A1" office:value-type="string">
            <text:p text:style-name="P24"><text:span text:style-name="Source_20_Text"><text:span text:style-name="T5">do...while</text:span></text:span></text:p>
          </table:table-cell>
          <table:table-cell table:style-name="Tabela1.A1" office:value-type="string">
            <text:p text:style-name="P25">Quando o código <text:span text:style-name="T1">tem</text:span> de rodar pelo menos uma vez (ex: pedir a senha).</text:p>
          </table:table-cell>
          <table:table-cell table:style-name="Tabela1.A1" office:value-type="string">
            <text:p text:style-name="P26">1 vez obrigatoriamente</text:p>
          </table:table-cell>
        </table:table-row>
      </table:table>
      <text:h text:style-name="P27" text:outline-level="3">🚀 <text:span text:style-name="T6">O Próximo Grande Passo</text:span></text:h>
      <text:p text:style-name="P28"><text:span text:style-name="T4">Você dominou toda a base de controlo de fluxo em JavaScript: </text:span><text:span text:style-name="Source_20_Text"><text:span text:style-name="T4">if/else</text:span></text:span><text:span text:style-name="T4">, </text:span><text:span text:style-name="Source_20_Text"><text:span text:style-name="T4">switch</text:span></text:span><text:span text:style-name="T4">, </text:span><text:span text:style-name="Source_20_Text"><text:span text:style-name="T4">curto-circuito</text:span></text:span><text:span text:style-name="T4">, </text:span><text:span text:style-name="Source_20_Text"><text:span text:style-name="T4">for</text:span></text:span><text:span text:style-name="T4">, </text:span><text:span text:style-name="Source_20_Text"><text:span text:style-name="T4">while</text:span></text:span><text:span text:style-name="T4"> e </text:span><text:span text:style-name="Source_20_Text"><text:span text:style-name="T4">do...while</text:span></text:span><text:span text:style-name="T4">. Já tem ferramentas suficientes para construir programas inteligentes!</text:span></text:p>
      <text:p text:style-name="P29">O que quer fazer agora?</text:p>
      <text:list text:style-name="L11">
        <text:list-item>
          <text:p text:style-name="P30"><text:span text:style-name="T1">1. Criar um projeto prático do zero</text:span> usando estes loops (ex: um simulador de caixa de supermercado que soma produtos até digitarmos "fim").</text:p>
        </text:list-item>
        <text:list-item>
          <text:p text:style-name="P30"><text:span text:style-name="T1">2. Entrar no mundo dos Arrays (Listas)</text:span>, para aprender a guardar vários dados juntos e usar os loops para vasculhar essas listas.</text:p>
        </text:list-item>
      </text:list>
      <text:p text:style-name="P29">Qual é a sua escolha?</text:p>
      <text:p text:style-name="Text_20_body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Google Sans Text" svg:font-family="'Google Sans Text'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 Devanagari1" style:font-family-complex="'Noto Sans Devanagari'" style:font-family-generic-complex="system" style:font-pitch-complex="variable" style:font-size-complex="12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Left_20_Page" style:display-name="Left Page" style:page-layout-name="Mpm2" draw:style-name="Mdp1" style:next-style-name="Right_20_Page"/>
    <style:master-page style:name="Right_20_Page" style:display-name="Right Page" style:page-layout-name="Mpm3" draw:style-name="Mdp1" style:next-style-name="Left_20_Page"/>
    <style:master-page style:name="Envelope" style:page-layout-name="Mpm4" draw:style-name="Mdp1"/>
    <style:master-page style:name="Index" style:page-layout-name="Mpm1" draw:style-name="Mdp1"/>
    <style:master-page style:name="HTML" style:page-layout-name="Mpm5" draw:style-name="Mdp1"/>
    <style:master-page style:name="Footnote" style:page-layout-name="Mpm6" draw:style-name="Mdp1"/>
    <style:master-page style:name="Endnote" style:page-layout-name="Mpm6" draw:style-name="Mdp1"/>
    <style:master-page style:name="Landscape" style:page-layout-name="Mpm7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João António</meta:initial-creator>
    <meta:creation-date>2026-06-27T03:16:52.239945892</meta:creation-date>
    <dc:date>2026-06-27T05:42:47.212377384</dc:date>
    <dc:creator>João António</dc:creator>
    <meta:editing-duration>PT2H21M20S</meta:editing-duration>
    <meta:editing-cycles>18</meta:editing-cycles>
    <meta:generator>LibreOffice/26.2.4.2$Linux_X86_64 LibreOffice_project/620$Build-2</meta:generator>
    <meta:document-statistic meta:table-count="1" meta:image-count="0" meta:object-count="0" meta:page-count="7" meta:paragraph-count="160" meta:word-count="2068" meta:character-count="11752" meta:non-whitespace-character-count="9811"/>
  </office:meta>
</office:document-meta>
</file>