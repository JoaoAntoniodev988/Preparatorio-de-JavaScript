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.247cm" style:contextual-spacing="false" fo:line-height="115%"/>
    </style:style>
    <style:style style:name="P2" style:family="paragraph" style:parent-style-name="Heading_20_3">
      <style:paragraph-properties fo:margin-top="0cm" fo:margin-bottom="0.247cm" style:contextual-spacing="false" fo:line-height="115%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Standard">
      <style:paragraph-properties fo:margin-top="0cm" fo:margin-bottom="0.247cm" style:contextual-spacing="false" fo:line-height="115%"/>
    </style:style>
    <style:style style:name="P6" style:family="paragraph" style:parent-style-name="Preformatted_20_Text">
      <style:paragraph-properties fo:margin-top="0cm" fo:margin-bottom="0.247cm" style:contextual-spacing="false" fo:line-height="115%"/>
    </style:style>
    <style:style style:name="P7" style:family="paragraph" style:parent-style-name="Text_20_body">
      <style:paragraph-properties fo:margin-top="0cm" fo:margin-bottom="0.247cm" style:contextual-spacing="false" fo:line-height="115%"/>
      <style:text-properties fo:font-weight="bold"/>
    </style:style>
    <style:style style:name="P8" style:family="paragraph" style:parent-style-name="Quotations">
      <style:paragraph-properties fo:margin-top="0cm" fo:margin-bottom="0.247cm" style:contextual-spacing="false" fo:line-height="115%"/>
    </style:style>
    <style:style style:name="P9" style:family="paragraph" style:parent-style-name="Text_20_body">
      <style:text-properties fo:font-weight="bold"/>
    </style:style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tyle="italic" fo:font-weight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celente escolha! Entrar no mundo do <text:span text:style-name="Source_20_Text">for...of</text:span> e do <text:span text:style-name="Source_20_Text">for...in</text:span> significa que você está prestes a subir de nível e aprender a manipular <text:span text:style-name="T1">coleções de dados</text:span> (como listas de compras ou dados de um utilizador) de forma muito mais elegante, rápida e moderna.</text:p>
      <text:p text:style-name="Text_20_body">Estes dois loops são chamados de "especializados" porque foram criados especificamente para nos poupar o trabalho de escrever aquela sintaxe longa do <text:span text:style-name="Source_20_Text">for</text:span> tradicional (<text:span text:style-name="Source_20_Text">let i = 0; i &lt; lista.length; i++</text:span>).</text:p>
      <text:h text:style-name="P2" text:outline-level="3">🎒 O Cenário do Mundo Real: Coleções de Dados</text:h>
      <text:p text:style-name="Text_20_body">Antes de ver o código, precisamos de entender os dois tipos de coleções que temos no JavaScript:</text:p>
      <text:list text:style-name="L1">
        <text:list-item>
          <text:p text:style-name="P3"><text:span text:style-name="T1">Arrays (Listas):</text:span> Uma lista ordenada de coisas (ex: uma lista de compras <text:span text:style-name="Source_20_Text">["Maçã", "Banana", "Laranja"]</text:span>).</text:p>
        </text:list-item>
        <text:list-item>
          <text:p text:style-name="P3"><text:span text:style-name="T1">Objects (Objetos):</text:span> Uma estrutura que guarda características de algo, no formato de chave e valor (ex: um utilizador <text:span text:style-name="Source_20_Text">{ nome: "Carlos", idade: 28, profissao: "Programador" }</text:span>).</text:p>
        </text:list-item>
      </text:list>
      <text:h text:style-name="P2" text:outline-level="3">🗺️ A Regra de Ouro para Não Confundir</text:h>
      <text:p text:style-name="Text_20_body">Muitos programadores confundem o <text:span text:style-name="Source_20_Text">for...of</text:span> com o <text:span text:style-name="Source_20_Text">for...in</text:span>. Para você nunca se esquecer, use este truque mental:</text:p>
      <text:list text:style-name="L2">
        <text:list-item>
          <text:p text:style-name="P4"><text:span text:style-name="Source_20_Text"><text:span text:style-name="T1">for...of</text:span></text:span> serve para obter os valores <text:span text:style-name="T1">OF</text:span> (de) um <text:span text:style-name="T1">Array</text:span> (os elementos da lista).</text:p>
        </text:list-item>
        <text:list-item>
          <text:p text:style-name="P4"><text:span text:style-name="Source_20_Text"><text:span text:style-name="T1">for...in</text:span></text:span> serve para olhar o que está <text:span text:style-name="T1">IN</text:span> (dentro) das propriedades de um <text:span text:style-name="T1">Objeto</text:span> (as chaves).</text:p>
        </text:list-item>
      </text:list>
      <text:h text:style-name="P2" text:outline-level="3">🏃‍♂️ 1. O Loop <text:span text:style-name="Source_20_Text">for...of</text:span> (Para Listas / Arrays)</text:h>
      <text:p text:style-name="Text_20_body">Imagina que tens uma lista de jogos e queres mostrar o nome de cada um no ecrã.</text:p>
      <text:p text:style-name="P5">JavaScript</text:p>
      <text:p text:style-name="P6"><text:span text:style-name="Source_20_Text">const listaJogos = ["Zelda", "Mario", "Pokemon"];</text:span></text:p>
      <text:p text:style-name="P6"/>
      <text:p text:style-name="P6"><text:span text:style-name="Source_20_Text">for (const jogo of listaJogos) {</text:span></text:p>
      <text:p text:style-name="P6"><text:span text:style-name="Source_20_Text"><text:s text:c="4"/>console.log("Jogo disponível: " + jogo);</text:span></text:p>
      <text:p text:style-name="P6"><text:span text:style-name="Source_20_Text">}</text:span></text:p>
      <text:p text:style-name="P7">Como ler isto em "Português Claro":</text:p>
      <text:p text:style-name="P8"><text:span text:style-name="T2">"Para cada </text:span><text:span text:style-name="T3">jogo</text:span><text:span text:style-name="T2"> que estiver dentro da </text:span><text:span text:style-name="T3">listaJogos</text:span><text:span text:style-name="T2">, guarda o nome dele na variável </text:span><text:span text:style-name="Source_20_Text"><text:span text:style-name="T2">jogo</text:span></text:span><text:span text:style-name="T2"> e executa o código."</text:span></text:p>
      <text:p text:style-name="Text_20_body">O computador vai dar 3 voltas automaticamente. Na primeira volta, <text:span text:style-name="Source_20_Text">jogo</text:span> vale <text:span text:style-name="Source_20_Text">"Zelda"</text:span>, na segunda <text:span text:style-name="Source_20_Text">"Mario"</text:span>, e na terceira <text:span text:style-name="Source_20_Text">"Pokemon"</text:span>. É muito mais limpo do que o <text:span text:style-name="Source_20_Text">for</text:span> tradicional!</text:p>
      <text:h text:style-name="P2" text:outline-level="3">🏋️‍♂️ Exercício 1: O Carrinho de Compras (<text:span text:style-name="Source_20_Text">for...of</text:span>)</text:h>
      <text:p text:style-name="Text_20_body">Vamos testar a tua leitura com uma lista de preços de um supermercado. Queremos somar o total.</text:p>
      <text:p text:style-name="P5">JavaScript</text:p>
      <text:p text:style-name="P6"><text:soft-page-break/><text:span text:style-name="Source_20_Text">const precos = [10, 20, 5];</text:span></text:p>
      <text:p text:style-name="P6"><text:span text:style-name="Source_20_Text">let totalFatura = 0;</text:span></text:p>
      <text:p text:style-name="P6"/>
      <text:p text:style-name="P6"><text:span text:style-name="Source_20_Text">for (const valor of precos) {</text:span></text:p>
      <text:p text:style-name="P6"><text:span text:style-name="Source_20_Text"><text:s text:c="4"/>totalFatura = totalFatura + valor;</text:span></text:p>
      <text:p text:style-name="P6"><text:span text:style-name="Source_20_Text">}</text:span></text:p>
      <text:p text:style-name="P6"/>
      <text:p text:style-name="P6"><text:span text:style-name="Source_20_Text">console.log("Total a pagar: " + totalFatura + "€");</text:span></text:p>
      <text:p text:style-name="P9">A tua missão no Exercício 1:</text:p>
      <text:list text:style-name="L3">
        <text:list-item>
          <text:p text:style-name="P10">Traduz a linha do <text:span text:style-name="Source_20_Text">for (const valor of precos)</text:span> para português claro.</text:p>
        </text:list-item>
        <text:list-item>
          <text:p text:style-name="P10">Quantas voltas o loop vai dar no total?</text:p>
        </text:list-item>
        <text:list-item>
          <text:p text:style-name="P10">Qual será o valor guardado na variável <text:span text:style-name="Source_20_Text">totalFatura</text:span> no final de todas as voltas?</text:p>
        </text:list-item>
      </text:list>
      <text:p text:style-name="P1">Para cada precos que estiver na viariavel precos, guarda na variavel valor e soma com o totalFatura. Depois mostra na tela o totalFatura. vai dar tres loops e o valor guardado na variavel totalFatura sera 35.</text:p>
      <text:h text:style-name="P2" text:outline-level="3">🕵️‍♂️ 2. O Loop <text:span text:style-name="Source_20_Text">for...in</text:span> (Para Objetos)</text:h>
      <text:p text:style-name="Text_20_body">Agora vamos conhecer o irmão dele, o <text:span text:style-name="Source_20_Text">for...in</text:span>. Ele não serve para listas simples, mas sim para <text:span text:style-name="T1">Objetos</text:span> (estruturas que guardam características).</text:p>
      <text:p text:style-name="P1">Imagina que temos as informações de uma personagem de um jogo (o seu perfil):</text:p>
      <text:p text:style-name="P5">JavaScript</text:p>
      <text:p text:style-name="P6"><text:span text:style-name="Source_20_Text">const guerreiro = {</text:span></text:p>
      <text:p text:style-name="P6"><text:span text:style-name="Source_20_Text"><text:s text:c="4"/>nome: "Thorin",</text:span></text:p>
      <text:p text:style-name="P6"><text:span text:style-name="Source_20_Text"><text:s text:c="4"/>classe: "Guerreiro",</text:span></text:p>
      <text:p text:style-name="P6"><text:span text:style-name="Source_20_Text"><text:s text:c="4"/>nivel: 5</text:span></text:p>
      <text:p text:style-name="P6"><text:span text:style-name="Source_20_Text">};</text:span></text:p>
      <text:p text:style-name="P6"/>
      <text:p text:style-name="P6"><text:span text:style-name="Source_20_Text">for (const caracteristica in guerreiro) {</text:span></text:p>
      <text:p text:style-name="P6"><text:span text:style-name="Source_20_Text"><text:s text:c="4"/>console.log("A propriedade é: " + caracteristica);</text:span></text:p>
      <text:p text:style-name="P6"><text:span text:style-name="Source_20_Text">}</text:span></text:p>
      <text:p text:style-name="P7">Como ler isto em "Português Claro":</text:p>
      <text:p text:style-name="P8"><text:span text:style-name="T2">"Para cada </text:span><text:span text:style-name="T3">característica</text:span><text:span text:style-name="T2"> (chave) que estiver </text:span><text:span text:style-name="T3">IN</text:span><text:span text:style-name="T2"> (dentro) do objeto </text:span><text:span text:style-name="T3">guerreiro</text:span><text:span text:style-name="T2">, guarda o nome dessa propriedade na variável </text:span><text:span text:style-name="Source_20_Text"><text:span text:style-name="T2">caracteristica</text:span></text:span><text:span text:style-name="T2"> e roda o código."</text:span></text:p>
      <text:p text:style-name="Text_20_body">Se rodarmos este código, o computador vai listar o nome das "gavetas" do objeto. O resultado na consola seria:</text:p>
      <text:p text:style-name="P8"><text:soft-page-break/><text:span text:style-name="Source_20_Text">A propriedade é: nome</text:span> <text:span text:style-name="Source_20_Text">A propriedade é: classe</text:span> <text:span text:style-name="Source_20_Text">A propriedade é: nivel</text:span></text:p>
      <text:h text:style-name="P2" text:outline-level="3">🏋️‍♂️ Exercício 2: Revelando os Valores do Objeto</text:h>
      <text:p text:style-name="Text_20_body">E se nós não quisermos apenas o nome da gaveta (chave), mas sim <text:span text:style-name="T1">o que está guardado lá dentro</text:span> (valor)? No JavaScript, fazemos isso chamando o objeto e passando a propriedade entre parênteses retos: <text:span text:style-name="Source_20_Text">guerreiro[caracteristica]</text:span>.</text:p>
      <text:p text:style-name="Text_20_body">Olha com atenção para este perfil de um carro:</text:p>
      <text:p text:style-name="P5">JavaScript</text:p>
      <text:p text:style-name="P6"><text:span text:style-name="Source_20_Text">const carro = {</text:span></text:p>
      <text:p text:style-name="P6"><text:span text:style-name="Source_20_Text"><text:s text:c="4"/>marca: "Tesla",</text:span></text:p>
      <text:p text:style-name="P6"><text:span text:style-name="Source_20_Text"><text:s text:c="4"/>modelo: "Model 3"</text:span></text:p>
      <text:p text:style-name="P6"><text:span text:style-name="Source_20_Text">};</text:span></text:p>
      <text:p text:style-name="P6"/>
      <text:p text:style-name="P6"><text:span text:style-name="Source_20_Text">for (const chave in carro) {</text:span></text:p>
      <text:p text:style-name="P6"><text:span text:style-name="Source_20_Text"><text:s text:c="4"/>console.log(chave + ": " + carro[chave]);</text:span></text:p>
      <text:p text:style-name="P6"><text:span text:style-name="Source_20_Text">}</text:span></text:p>
      <text:p text:style-name="P7">A tua missão no Exercício 2:</text:p>
      <text:list text:style-name="L4">
        <text:list-item>
          <text:p text:style-name="P11">Traduz a linha do <text:span text:style-name="Source_20_Text">for (const chave in carro)</text:span> para português claro.</text:p>
        </text:list-item>
        <text:list-item>
          <text:p text:style-name="P11">Na <text:span text:style-name="T1">primeira volta</text:span>, a variável <text:span text:style-name="Source_20_Text">chave</text:span> vai guardar o texto <text:span text:style-name="Source_20_Text">"marca"</text:span>. O que o comando <text:span text:style-name="Source_20_Text">carro[chave]</text:span> vai buscar lá dentro?</text:p>
        </text:list-item>
        <text:list-item>
          <text:p text:style-name="P11">Quais serão as <text:span text:style-name="T1">duas linhas de texto</text:span> impressas na consola no final deste loop?</text:p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27T03:16:52.239945892</meta:creation-date>
    <dc:date>2026-06-27T06:26:08.960765306</dc:date>
    <dc:creator>João António</dc:creator>
    <meta:editing-duration>PT2H59M7S</meta:editing-duration>
    <meta:editing-cycles>22</meta:editing-cycles>
    <meta:generator>LibreOffice/26.2.4.2$Linux_X86_64 LibreOffice_project/620$Build-2</meta:generator>
    <meta:document-statistic meta:table-count="0" meta:image-count="0" meta:object-count="0" meta:page-count="3" meta:paragraph-count="65" meta:word-count="694" meta:character-count="4058" meta:non-whitespace-character-count="3403"/>
  </office:meta>
</office:document-meta>
</file>