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Standard">
      <style:paragraph-properties fo:margin-top="0cm" fo:margin-bottom="0.247cm" style:contextual-spacing="false" fo:line-height="115%"/>
    </style:style>
    <style:style style:name="P6" style:family="paragraph" style:parent-style-name="Preformatted_20_Text">
      <style:paragraph-properties fo:margin-top="0cm" fo:margin-bottom="0.247cm" style:contextual-spacing="false" fo:line-height="115%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fo:font-weight="bold"/>
    </style:style>
    <style:style style:name="P8" style:family="paragraph" style:parent-style-name="Quotations">
      <style:paragraph-properties fo:margin-top="0cm" fo:margin-bottom="0.247cm" style:contextual-spacing="false" fo:line-height="115%"/>
    </style:style>
    <style:style style:name="P9" style:family="paragraph" style:parent-style-name="Text_20_body">
      <style:text-properties fo:font-weight="bol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Quotations" style:list-style-name="L5">
      <style:paragraph-properties fo:margin-top="0cm" fo:margin-bottom="0.247cm" style:contextual-spacing="false" fo:line-height="115%"/>
    </style:style>
    <style:style style:name="P14" style:family="paragraph" style:parent-style-name="Text_20_body" style:list-style-name="L6"/>
    <style:style style:name="P15" style:family="paragraph" style:parent-style-name="Heading_20_4">
      <style:paragraph-properties fo:margin-top="0cm" fo:margin-bottom="0.247cm" style:contextual-spacing="false" fo:line-height="115%"/>
    </style:style>
    <style:style style:name="P16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ente escolha! Entrar no mundo do <text:span text:style-name="Source_20_Text">for...of</text:span> e do <text:span text:style-name="Source_20_Text">for...in</text:span> significa que você está prestes a subir de nível e aprender a manipular <text:span text:style-name="T1">coleções de dados</text:span> (como listas de compras ou dados de um utilizador) de forma muito mais elegante, rápida e moderna.</text:p>
      <text:p text:style-name="Text_20_body">Estes dois loops são chamados de "especializados" porque foram criados especificamente para nos poupar o trabalho de escrever aquela sintaxe longa do <text:span text:style-name="Source_20_Text">for</text:span> tradicional (<text:span text:style-name="Source_20_Text">let i = 0; i &lt; lista.length; i++</text:span>).</text:p>
      <text:h text:style-name="P2" text:outline-level="3">🎒 O Cenário do Mundo Real: Coleções de Dados</text:h>
      <text:p text:style-name="Text_20_body">Antes de ver o código, precisamos de entender os dois tipos de coleções que temos no JavaScript:</text:p>
      <text:list text:style-name="L1">
        <text:list-item>
          <text:p text:style-name="P3"><text:span text:style-name="T1">Arrays (Listas):</text:span> Uma lista ordenada de coisas (ex: uma lista de compras <text:span text:style-name="Source_20_Text">["Maçã", "Banana", "Laranja"]</text:span>).</text:p>
        </text:list-item>
        <text:list-item>
          <text:p text:style-name="P3"><text:span text:style-name="T1">Objects (Objetos):</text:span> Uma estrutura que guarda características de algo, no formato de chave e valor (ex: um utilizador <text:span text:style-name="Source_20_Text">{ nome: "Carlos", idade: 28, profissao: "Programador" }</text:span>).</text:p>
        </text:list-item>
      </text:list>
      <text:h text:style-name="P2" text:outline-level="3">🗺️ A Regra de Ouro para Não Confundir</text:h>
      <text:p text:style-name="Text_20_body">Muitos programadores confundem o <text:span text:style-name="Source_20_Text">for...of</text:span> com o <text:span text:style-name="Source_20_Text">for...in</text:span>. Para você nunca se esquecer, use este truque mental:</text:p>
      <text:list text:style-name="L2">
        <text:list-item>
          <text:p text:style-name="P4"><text:span text:style-name="Source_20_Text"><text:span text:style-name="T1">for...of</text:span></text:span> serve para obter os valores <text:span text:style-name="T1">OF</text:span> (de) um <text:span text:style-name="T1">Array</text:span> (os elementos da lista).</text:p>
        </text:list-item>
        <text:list-item>
          <text:p text:style-name="P4"><text:span text:style-name="Source_20_Text"><text:span text:style-name="T1">for...in</text:span></text:span> serve para olhar o que está <text:span text:style-name="T1">IN</text:span> (dentro) das propriedades de um <text:span text:style-name="T1">Objeto</text:span> (as chaves).</text:p>
        </text:list-item>
      </text:list>
      <text:h text:style-name="P2" text:outline-level="3">🏃‍♂️ 1. O Loop <text:span text:style-name="Source_20_Text">for...of</text:span> (Para Listas / Arrays)</text:h>
      <text:p text:style-name="Text_20_body">Imagina que tens uma lista de jogos e queres mostrar o nome de cada um no ecrã.</text:p>
      <text:p text:style-name="P5">JavaScript</text:p>
      <text:p text:style-name="P6"><text:span text:style-name="Source_20_Text">const listaJogos = ["Zelda", "Mario", "Pokemon"];</text:span></text:p>
      <text:p text:style-name="P6"/>
      <text:p text:style-name="P6"><text:span text:style-name="Source_20_Text">for (const jogo of listaJogos) {</text:span></text:p>
      <text:p text:style-name="P6"><text:span text:style-name="Source_20_Text"><text:s text:c="4"/>console.log("Jogo disponível: " + jogo);</text:span></text:p>
      <text:p text:style-name="P6"><text:span text:style-name="Source_20_Text">}</text:span></text:p>
      <text:p text:style-name="P7">Como ler isto em "Português Claro":</text:p>
      <text:p text:style-name="P8"><text:span text:style-name="T2">"Para cada </text:span><text:span text:style-name="T3">jogo</text:span><text:span text:style-name="T2"> que estiver dentro da </text:span><text:span text:style-name="T3">listaJogos</text:span><text:span text:style-name="T2">, guarda o nome dele na variável </text:span><text:span text:style-name="Source_20_Text"><text:span text:style-name="T2">jogo</text:span></text:span><text:span text:style-name="T2"> e executa o código."</text:span></text:p>
      <text:p text:style-name="Text_20_body">O computador vai dar 3 voltas automaticamente. Na primeira volta, <text:span text:style-name="Source_20_Text">jogo</text:span> vale <text:span text:style-name="Source_20_Text">"Zelda"</text:span>, na segunda <text:span text:style-name="Source_20_Text">"Mario"</text:span>, e na terceira <text:span text:style-name="Source_20_Text">"Pokemon"</text:span>. É muito mais limpo do que o <text:span text:style-name="Source_20_Text">for</text:span> tradicional!</text:p>
      <text:h text:style-name="P2" text:outline-level="3">🏋️‍♂️ Exercício 1: O Carrinho de Compras (<text:span text:style-name="Source_20_Text">for...of</text:span>)</text:h>
      <text:p text:style-name="Text_20_body">Vamos testar a tua leitura com uma lista de preços de um supermercado. Queremos somar o total.</text:p>
      <text:p text:style-name="P5">JavaScript</text:p>
      <text:p text:style-name="P6"><text:soft-page-break/><text:span text:style-name="Source_20_Text">const precos = [10, 20, 5];</text:span></text:p>
      <text:p text:style-name="P6"><text:span text:style-name="Source_20_Text">let totalFatura = 0;</text:span></text:p>
      <text:p text:style-name="P6"/>
      <text:p text:style-name="P6"><text:span text:style-name="Source_20_Text">for (const valor of precos) {</text:span></text:p>
      <text:p text:style-name="P6"><text:span text:style-name="Source_20_Text"><text:s text:c="4"/>totalFatura = totalFatura + valor;</text:span></text:p>
      <text:p text:style-name="P6"><text:span text:style-name="Source_20_Text">}</text:span></text:p>
      <text:p text:style-name="P6"/>
      <text:p text:style-name="P6"><text:span text:style-name="Source_20_Text">console.log("Total a pagar: " + totalFatura + "€");</text:span></text:p>
      <text:p text:style-name="P9">A tua missão no Exercício 1:</text:p>
      <text:list text:style-name="L3">
        <text:list-item>
          <text:p text:style-name="P10">Traduz a linha do <text:span text:style-name="Source_20_Text">for (const valor of precos)</text:span> para português claro.</text:p>
        </text:list-item>
        <text:list-item>
          <text:p text:style-name="P10">Quantas voltas o loop vai dar no total?</text:p>
        </text:list-item>
        <text:list-item>
          <text:p text:style-name="P10">Qual será o valor guardado na variável <text:span text:style-name="Source_20_Text">totalFatura</text:span> no final de todas as voltas?</text:p>
        </text:list-item>
      </text:list>
      <text:p text:style-name="P1">Para cada precos que estiver na viariavel precos, guarda na variavel valor e soma com o totalFatura. Depois mostra na tela o totalFatura. vai dar tres loops e o valor guardado na variavel totalFatura sera 35.</text:p>
      <text:h text:style-name="P2" text:outline-level="3">🕵️‍♂️ 2. O Loop <text:span text:style-name="Source_20_Text">for...in</text:span> (Para Objetos)</text:h>
      <text:p text:style-name="Text_20_body">Agora vamos conhecer o irmão dele, o <text:span text:style-name="Source_20_Text">for...in</text:span>. Ele não serve para listas simples, mas sim para <text:span text:style-name="T1">Objetos</text:span> (estruturas que guardam características).</text:p>
      <text:p text:style-name="P1">Imagina que temos as informações de uma personagem de um jogo (o seu perfil):</text:p>
      <text:p text:style-name="P5">JavaScript</text:p>
      <text:p text:style-name="P6"><text:span text:style-name="Source_20_Text">const guerreiro = {</text:span></text:p>
      <text:p text:style-name="P6"><text:span text:style-name="Source_20_Text"><text:s text:c="4"/>nome: "Thorin",</text:span></text:p>
      <text:p text:style-name="P6"><text:span text:style-name="Source_20_Text"><text:s text:c="4"/>classe: "Guerreiro",</text:span></text:p>
      <text:p text:style-name="P6"><text:span text:style-name="Source_20_Text"><text:s text:c="4"/>nivel: 5</text:span></text:p>
      <text:p text:style-name="P6"><text:span text:style-name="Source_20_Text">};</text:span></text:p>
      <text:p text:style-name="P6"/>
      <text:p text:style-name="P6"><text:span text:style-name="Source_20_Text">for (const caracteristica in guerreiro) {</text:span></text:p>
      <text:p text:style-name="P6"><text:span text:style-name="Source_20_Text"><text:s text:c="4"/>console.log("A propriedade é: " + caracteristica);</text:span></text:p>
      <text:p text:style-name="P6"><text:span text:style-name="Source_20_Text">}</text:span></text:p>
      <text:p text:style-name="P7">Como ler isto em "Português Claro":</text:p>
      <text:p text:style-name="P8"><text:span text:style-name="T2">"Para cada </text:span><text:span text:style-name="T3">característica</text:span><text:span text:style-name="T2"> (chave) que estiver </text:span><text:span text:style-name="T3">IN</text:span><text:span text:style-name="T2"> (dentro) do objeto </text:span><text:span text:style-name="T3">guerreiro</text:span><text:span text:style-name="T2">, guarda o nome dessa propriedade na variável </text:span><text:span text:style-name="Source_20_Text"><text:span text:style-name="T2">caracteristica</text:span></text:span><text:span text:style-name="T2"> e roda o código."</text:span></text:p>
      <text:p text:style-name="Text_20_body">Se rodarmos este código, o computador vai listar o nome das "gavetas" do objeto. O resultado na consola seria:</text:p>
      <text:p text:style-name="P8"><text:soft-page-break/><text:span text:style-name="Source_20_Text">A propriedade é: nome</text:span> <text:span text:style-name="Source_20_Text">A propriedade é: classe</text:span> <text:span text:style-name="Source_20_Text">A propriedade é: nivel</text:span></text:p>
      <text:h text:style-name="P2" text:outline-level="3">🏋️‍♂️ Exercício 2: Revelando os Valores do Objeto</text:h>
      <text:p text:style-name="Text_20_body">E se nós não quisermos apenas o nome da gaveta (chave), mas sim <text:span text:style-name="T1">o que está guardado lá dentro</text:span> (valor)? No JavaScript, fazemos isso chamando o objeto e passando a propriedade entre parênteses retos: <text:span text:style-name="Source_20_Text">guerreiro[caracteristica]</text:span>.</text:p>
      <text:p text:style-name="Text_20_body">Olha com atenção para este perfil de um carro:</text:p>
      <text:p text:style-name="P5">JavaScript</text:p>
      <text:p text:style-name="P6"><text:span text:style-name="Source_20_Text">const carro = {</text:span></text:p>
      <text:p text:style-name="P6"><text:span text:style-name="Source_20_Text"><text:s text:c="4"/>marca: "Tesla",</text:span></text:p>
      <text:p text:style-name="P6"><text:span text:style-name="Source_20_Text"><text:s text:c="4"/>modelo: "Model 3"</text:span></text:p>
      <text:p text:style-name="P6"><text:span text:style-name="Source_20_Text">};</text:span></text:p>
      <text:p text:style-name="P6"/>
      <text:p text:style-name="P6"><text:span text:style-name="Source_20_Text">for (const chave in carro) {</text:span></text:p>
      <text:p text:style-name="P6"><text:span text:style-name="Source_20_Text"><text:s text:c="4"/>console.log(chave + ": " + carro[chave]);</text:span></text:p>
      <text:p text:style-name="P6"><text:span text:style-name="Source_20_Text">}</text:span></text:p>
      <text:p text:style-name="P7">A tua missão no Exercício 2:</text:p>
      <text:list text:style-name="L4">
        <text:list-item>
          <text:p text:style-name="P11">Traduz a linha do <text:span text:style-name="Source_20_Text">for (const chave in carro)</text:span> para português claro.</text:p>
        </text:list-item>
        <text:list-item>
          <text:p text:style-name="P11">Na <text:span text:style-name="T1">primeira volta</text:span>, a variável <text:span text:style-name="Source_20_Text">chave</text:span> vai guardar o texto <text:span text:style-name="Source_20_Text">"marca"</text:span>. O que o comando <text:span text:style-name="Source_20_Text">carro[chave]</text:span> vai buscar lá dentro?</text:p>
        </text:list-item>
        <text:list-item>
          <text:p text:style-name="P11">Quais serão as <text:span text:style-name="T1">duas linhas de texto</text:span> impressas na consola no final deste loop?</text:p>
        </text:list-item>
      </text:list>
      <text:p text:style-name="P1">Para cada propriedade que estiver dentro da variavel carro guarda na variavel chave e imprime. Vai buscar a caracteristica. marca: Tesla, modelo: Model 3</text:p>
      <text:p text:style-name="P1"><text:span text:style-name="T1">Perfeito! Resposta absolutamente exata!</text:span> 👑 Você decifrou a mecânica do <text:span text:style-name="Source_20_Text">for...in</text:span> com precisão cirúrgica.</text:p>
      <text:p text:style-name="Text_20_body">Vamos ver o seu raciocínio:</text:p>
      <text:list text:style-name="L5">
        <text:list-item>
          <text:p text:style-name="P12"><text:span text:style-name="T1">A Tradução:</text:span> Perfeita! O <text:span text:style-name="Source_20_Text">for...in</text:span> lê o objeto gaveta por gaveta (propriedade por propriedade).</text:p>
        </text:list-item>
        <text:list-item>
          <text:p text:style-name="P12"><text:span text:style-name="T1">O Segredo do </text:span><text:span text:style-name="Source_20_Text"><text:span text:style-name="T1">carro[chave]</text:span></text:span><text:span text:style-name="T1">:</text:span> Exatamente. Quando a <text:span text:style-name="Source_20_Text">chave</text:span> vale <text:span text:style-name="Source_20_Text">"marca"</text:span>, o comando <text:span text:style-name="Source_20_Text">carro["marca"]</text:span> vai lá dentro e extrai o valor real, que é <text:span text:style-name="T1">"Tesla"</text:span>.</text:p>
        </text:list-item>
        <text:list-item>
          <text:p text:style-name="P12"><text:span text:style-name="T1">As Linhas na Consola:</text:span> Foram exatamente essas:</text:p>
          <text:p text:style-name="P13"><text:span text:style-name="Source_20_Text">marca: Tesla</text:span> <text:span text:style-name="Source_20_Text">modelo: Model 3</text:span></text:p>
        </text:list-item>
      </text:list>
      <text:h text:style-name="P2" text:outline-level="3">🏆 Parabéns! Nível Mestre de Loops Alcançado!</text:h>
      <text:p text:style-name="Text_20_body">Você fez uma viagem completa pelas estruturas de repetição do JavaScript:</text:p>
      <text:list text:style-name="L6">
        <text:list-item>
          <text:p text:style-name="P14"><text:soft-page-break/>O <text:span text:style-name="Source_20_Text">for</text:span> tradicional (Controlado por Contador)</text:p>
        </text:list-item>
        <text:list-item>
          <text:p text:style-name="P14">O <text:span text:style-name="Source_20_Text">while</text:span> e <text:span text:style-name="Source_20_Text">do...while</text:span> (Controlados por Condição)</text:p>
        </text:list-item>
        <text:list-item>
          <text:p text:style-name="P14">O <text:span text:style-name="Source_20_Text">for...of</text:span> (Especializado em Arrays/Listas)</text:p>
        </text:list-item>
        <text:list-item>
          <text:p text:style-name="P14">O <text:span text:style-name="Source_20_Text">for...in</text:span> (Especializado em Objetos)</text:p>
        </text:list-item>
      </text:list>
      <text:p text:style-name="P1">A minha pergunta é: esses conceitos serverm para substituir o for tradicional?</text:p>
      <text:p text:style-name="P1">Essa é uma das melhores perguntas que um estudante de programação pode fazer! A resposta curta e direta é: <text:span text:style-name="T1">Não, eles não vieram para substituir o </text:span><text:span text:style-name="Source_20_Text"><text:span text:style-name="T1">for</text:span></text:span><text:span text:style-name="T1"> tradicional, mas sim para criar caminhos mais fáceis para os casos mais comuns.</text:span></text:p>
      <text:p text:style-name="Text_20_body">Pense nisto como ferramentas numa caixa: o <text:span text:style-name="Source_20_Text">for</text:span> tradicional é um <text:span text:style-name="T1">canivete suíço</text:span> (faz tudo, mas dá mais trabalho a abrir), enquanto o <text:span text:style-name="Source_20_Text">for...of</text:span> e o <text:span text:style-name="Source_20_Text">for...in</text:span> são <text:span text:style-name="T1">ferramentas especializadas</text:span> (só fazem uma coisa, mas fazem-na de forma perfeita e rápida).</text:p>
      <text:h text:style-name="P2" text:outline-level="3">🥊 O Confronto: Quando o <text:span text:style-name="Source_20_Text">for</text:span> tradicional ainda é o Rei?</text:h>
      <text:p text:style-name="Text_20_body">Existem 3 cenários muito comuns onde o <text:span text:style-name="Source_20_Text">for...of</text:span> e o <text:span text:style-name="Source_20_Text">for...in</text:span> <text:span text:style-name="T1">não conseguem trabalhar</text:span>, obrigando-nos a usar o <text:span text:style-name="Source_20_Text">for</text:span> tradicional:</text:p>
      <text:h text:style-name="P15" text:outline-level="4">1. Quando precisamos de saltar elementos (O Passo)</text:h>
      <text:p text:style-name="Text_20_body">O <text:span text:style-name="Source_20_Text">for...of</text:span> lê a lista obrigatoriamente de 1 em 1, do início ao fim. Se você quiser ler apenas os números pares ou saltar de 2 em 2, precisa do <text:span text:style-name="Source_20_Text">for</text:span> tradicional controlando o incremento (<text:span text:style-name="Source_20_Text">i = i + 2</text:span>):</text:p>
      <text:p text:style-name="P5">JavaScript</text:p>
      <text:p text:style-name="P6"><text:span text:style-name="Source_20_Text">// Contar de 2 em 2 (O for...of não consegue fazer isto sozinho!)</text:span></text:p>
      <text:p text:style-name="P6"><text:span text:style-name="Source_20_Text">for (let i = 0; i &lt;= 10; i = i + 2) {</text:span></text:p>
      <text:p text:style-name="P6"><text:span text:style-name="Source_20_Text"><text:s text:c="4"/>console.log(i); // 0, 2, 4, 6, 8, 10</text:span></text:p>
      <text:p text:style-name="P6"><text:span text:style-name="Source_20_Text">}</text:span></text:p>
      <text:h text:style-name="P15" text:outline-level="4">2. Quando precisamos de andar para trás (Contagem Decrescente)</text:h>
      <text:p text:style-name="Text_20_body">O <text:span text:style-name="Source_20_Text">for...of</text:span> só sabe andar para a frente. Se precisar de ler uma lista de trás para a frente (como fizemos no lançamento do foguete), o <text:span text:style-name="Source_20_Text">for</text:span> tradicional é a única escolha:</text:p>
      <text:p text:style-name="P5">JavaScript</text:p>
      <text:p text:style-name="P6"><text:span text:style-name="Source_20_Text">for (let i = 10; i &gt;= 0; i--) {</text:span></text:p>
      <text:p text:style-name="P6"><text:span text:style-name="Source_20_Text"><text:s text:c="4"/>// Anda para trás com precisão</text:span></text:p>
      <text:p text:style-name="P6"><text:span text:style-name="Source_20_Text">}</text:span></text:p>
      <text:h text:style-name="P15" text:outline-level="4">3. Quando precisamos de alterar o Array original usando o índice</text:h>
      <text:p text:style-name="Text_20_body">O <text:span text:style-name="Source_20_Text">for...of</text:span> dá-nos apenas o valor do elemento, ele não nos diz em que posição (índice) ele está. Se precisarmos de saber a posição ou modificar a lista diretamente naquela gaveta, usamos o <text:span text:style-name="Source_20_Text">for</text:span> tradicional:</text:p>
      <text:p text:style-name="P5">JavaScript</text:p>
      <text:p text:style-name="P6"><text:soft-page-break/><text:span text:style-name="Source_20_Text">const compras = ["pão", "leite"];</text:span></text:p>
      <text:p text:style-name="P6"><text:span text:style-name="Source_20_Text">for (let i = 0; i &lt; compras.length; i++) {</text:span></text:p>
      <text:p text:style-name="P6"><text:span text:style-name="Source_20_Text"><text:s text:c="4"/>// Sabemos exatamente que o pão está no índice 0 e o leite no 1</text:span></text:p>
      <text:p text:style-name="P6"><text:span text:style-name="Source_20_Text"><text:s text:c="4"/>console.log("Posição " + i + " tem o produto: " + compras[i]);</text:span></text:p>
      <text:p text:style-name="P6"><text:span text:style-name="Source_20_Text">}</text:span></text:p>
      <text:h text:style-name="P2" text:outline-level="3">O Resumo da Balança</text:h>
      <text:list text:style-name="L7">
        <text:list-item>
          <text:p text:style-name="P16">Use <text:span text:style-name="Source_20_Text"><text:span text:style-name="T1">for...of</text:span></text:span><text:span text:style-name="T1"> / </text:span><text:span text:style-name="Source_20_Text"><text:span text:style-name="T1">for...in</text:span></text:span> em 90% dos casos do dia a dia, porque o código fica muito mais limpo, curto e fácil de ler para qualquer programador da sua equipa.</text:p>
        </text:list-item>
        <text:list-item>
          <text:p text:style-name="P16">Use o <text:span text:style-name="Source_20_Text"><text:span text:style-name="T1">for</text:span></text:span><text:span text:style-name="T1"> tradicional</text:span> quando precisar de controlar o ritmo (saltar elementos, andar para trás) ou quando a posição exata (o índice <text:span text:style-name="Source_20_Text">i</text:span>) for crucial para a lógica do seu programa.</text:p>
        </text:list-item>
      </text:list>
      <text:p text:style-name="Text_20_body">Ficou clara essa diferença de quando escolher cada um? 😊 Se sim, como correu aquele pequeno Quiz que deixei na mensagem anterior? Consegue decifrar as respostas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07:04:21.945576587</dc:date>
    <dc:creator>João António</dc:creator>
    <meta:editing-duration>PT3H34M52S</meta:editing-duration>
    <meta:editing-cycles>24</meta:editing-cycles>
    <meta:generator>LibreOffice/26.2.4.2$Linux_X86_64 LibreOffice_project/620$Build-2</meta:generator>
    <meta:document-statistic meta:table-count="0" meta:image-count="0" meta:object-count="0" meta:page-count="5" meta:paragraph-count="108" meta:word-count="1287" meta:character-count="7385" meta:non-whitespace-character-count="6174"/>
  </office:meta>
</office:document-meta>
</file>