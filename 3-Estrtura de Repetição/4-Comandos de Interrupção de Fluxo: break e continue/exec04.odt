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15%"/>
    </style:style>
    <style:style style:name="P2" style:family="paragraph" style:parent-style-name="Heading_20_3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Standard">
      <style:paragraph-properties fo:margin-top="0cm" fo:margin-bottom="0.247cm" style:contextual-spacing="false" fo:line-height="115%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4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2"/>
    <style:style style:name="P8" style:family="paragraph" style:parent-style-name="Text_20_body">
      <style:paragraph-properties fo:margin-top="0cm" fo:margin-bottom="0.247cm" style:contextual-spacing="false" fo:line-height="115%"/>
      <style:text-properties fo:font-weight="bold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1" style:family="paragraph" style:parent-style-name="Quotations">
      <style:paragraph-properties fo:margin-top="0cm" fo:margin-bottom="0.247cm" style:contextual-spacing="false" fo:line-height="115%"/>
    </style:style>
    <style:style style:name="P12" style:family="paragraph" style:parent-style-name="Text_20_body">
      <style:text-properties fo:font-weight="bold"/>
    </style:style>
    <style:style style:name="P13" style:family="paragraph" style:parent-style-name="Text_20_body" style:list-style-name="L5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family="'Google Sans Text', sans-serif" fo:font-weight="bold"/>
    </style:style>
    <style:style style:name="T4" style:family="text">
      <style:text-properties fo:font-family="'Google Sans Text', sans-serif"/>
    </style:style>
    <style:style style:name="T5" style:family="text">
      <style:text-properties fo:font-family="'Google Sans Text', sans-serif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lente escolha de tópicos! O <text:span text:style-name="Source_20_Text">break</text:span> e o <text:span text:style-name="Source_20_Text">continue</text:span> são os comandos de "superpoder" que lhe dão o controlo total sobre qualquer loop (<text:span text:style-name="Source_20_Text">for</text:span>, <text:span text:style-name="Source_20_Text">while</text:span>, <text:span text:style-name="Source_20_Text">for...of</text:span>, etc.).</text:p>
      <text:p text:style-name="Text_20_body">Eles servem para alterar o comportamento padrão de uma repetição a meio do caminho, funcionando como <text:span text:style-name="T1">travões de emergência</text:span> ou <text:span text:style-name="T1">atalhos de salto</text:span>.</text:p>
      <text:h text:style-name="P2" text:outline-level="3">🏛️ Para que servem o <text:span text:style-name="Source_20_Text">break</text:span> e o <text:span text:style-name="Source_20_Text">continue</text:span> no Mundo Real?</text:h>
      <text:list text:style-name="L1">
        <text:list-item>
          <text:p text:style-name="P3"><text:span text:style-name="Source_20_Text"><text:span text:style-name="T1">break</text:span></text:span><text:span text:style-name="T1"> (O botão de Eject / Paragem Total):</text:span> Interrompe o loop imediatamente e salta para fora dele.</text:p>
          <text:list>
            <text:list-item>
              <text:p text:style-name="P3"><text:span text:style-name="T2">Caso real:</text:span> Estás a pesquisar o nome de um utilizador numa lista de 1 milhão de pessoas. Quando o encontras na posição 10, não faz sentido o computador continuar a procurar nas outras 999.990 posições. Usas o <text:span text:style-name="Source_20_Text">break</text:span> para fechar o loop na hora.</text:p>
            </text:list-item>
          </text:list>
        </text:list-item>
        <text:list-item>
          <text:p text:style-name="P3"><text:span text:style-name="Source_20_Text"><text:span text:style-name="T1">continue</text:span></text:span><text:span text:style-name="T1"> (O botão de Saltar / Próximo):</text:span> Não para o loop todo. Ele apenas ignora o resto do código daquela volta específica e salta <text:span text:style-name="T1">imediatamente para a próxima volta</text:span>.</text:p>
          <text:list>
            <text:list-item>
              <text:p text:style-name="P3"><text:span text:style-name="T2">Caso real:</text:span> Estás a enviar um e-mail de marketing para uma lista de clientes. Se o cliente atual tiver a conta desativada, usas o <text:span text:style-name="Source_20_Text">continue</text:span> para saltar esse cliente e avançar logo para o envio do próximo, sem parar o programa.</text:p>
            </text:list-item>
          </text:list>
        </text:list-item>
      </text:list>
      <text:h text:style-name="P2" text:outline-level="3">⚙️ 1. O Comando <text:span text:style-name="Source_20_Text">break</text:span> na Prática</text:h>
      <text:p text:style-name="Text_20_body">Vê este código que simula um detetor de falhas num sistema de mísseis:</text:p>
      <text:p text:style-name="P4">JavaScript</text:p>
      <text:p text:style-name="P5"><text:span text:style-name="Source_20_Text">for (let i = 1; i &lt;= 5; i++) {</text:span></text:p>
      <text:p text:style-name="P5"><text:span text:style-name="Source_20_Text"><text:s text:c="4"/>if (i === 3) {</text:span></text:p>
      <text:p text:style-name="P5"><text:span text:style-name="Source_20_Text"><text:s text:c="8"/>console.log("ALERTA: Erro crítico na volta " + i + "! Parar tudo!");</text:span></text:p>
      <text:p text:style-name="P5"><text:span text:style-name="Source_20_Text"><text:s text:c="8"/>break; </text:span></text:p>
      <text:p text:style-name="P5"><text:span text:style-name="Source_20_Text"><text:s text:c="4"/>}</text:span></text:p>
      <text:p text:style-name="P5"><text:span text:style-name="Source_20_Text"><text:s text:c="4"/>console.log("Sistema estável. Teste " + i + " concluído.");</text:span></text:p>
      <text:p text:style-name="P5"><text:span text:style-name="Source_20_Text">}</text:span></text:p>
      <text:p text:style-name="P5"><text:span text:style-name="Source_20_Text">console.log("Fim dos testes.");</text:span></text:p>
      <text:h text:style-name="P6" text:outline-level="4"><text:span text:style-name="T1">O "Filme" do </text:span><text:span text:style-name="Source_20_Text"><text:span text:style-name="T1">break</text:span></text:span><text:span text:style-name="T1">:</text:span></text:h>
      <text:list text:style-name="L2">
        <text:list-item>
          <text:p text:style-name="P7"><text:span text:style-name="T1">Volta 1:</text:span> <text:span text:style-name="Source_20_Text">i</text:span> é 1. O <text:span text:style-name="Source_20_Text">if</text:span> é falso. Imprime: <text:span text:style-name="T2">"Sistema estável. Teste 1 concluído."</text:span></text:p>
        </text:list-item>
        <text:list-item>
          <text:p text:style-name="P7"><text:span text:style-name="T1">Volta 2:</text:span> <text:span text:style-name="Source_20_Text">i</text:span> é 2. O <text:span text:style-name="Source_20_Text">if</text:span> é falso. Imprime: <text:span text:style-name="T2">"Sistema estável. Teste 2 concluído."</text:span></text:p>
        </text:list-item>
        <text:list-item>
          <text:p text:style-name="P7"><text:span text:style-name="T1">Volta 3:</text:span> <text:span text:style-name="Source_20_Text">i</text:span> é 3. O <text:span text:style-name="Source_20_Text">if</text:span> (<text:span text:style-name="Source_20_Text">i === 3</text:span>) torna-se <text:span text:style-name="T1">Verdadeiro</text:span>! Entra no bloco, imprime o Alerta e ativa o <text:span text:style-name="Source_20_Text"><text:span text:style-name="T1">break</text:span></text:span>.</text:p>
        </text:list-item>
        <text:list-item>
          <text:p text:style-name="P7">🛑 <text:span text:style-name="T1">O loop morre instantaneamente.</text:span> O computador ignora as voltas 4 e 5, salta para fora das chavetas e imprime: <text:span text:style-name="T2">"Fim dos testes."</text:span></text:p>
        </text:list-item>
      </text:list>
      <text:h text:style-name="P2" text:outline-level="3"><text:soft-page-break/>🏋️‍♂️ Exercício 1: O Scanner de Vírus (<text:span text:style-name="Source_20_Text">break</text:span>)</text:h>
      <text:p text:style-name="Text_20_body">Vamos testar a tua leitura. Uma aplicação está a analisar uma lista de ficheiros à procura de um vírus:</text:p>
      <text:p text:style-name="P4">JavaScript</text:p>
      <text:p text:style-name="P5"><text:span text:style-name="Source_20_Text">const ficheiros = ["foto.jpg", "musica.mp3", "VIRUS.exe", "documento.pdf"];</text:span></text:p>
      <text:p text:style-name="P5"/>
      <text:p text:style-name="P5"><text:span text:style-name="Source_20_Text">for (const item of ficheiros) {</text:span></text:p>
      <text:p text:style-name="P5"><text:span text:style-name="Source_20_Text"><text:s text:c="4"/>if (item === "VIRUS.exe") {</text:span></text:p>
      <text:p text:style-name="P5"><text:span text:style-name="Source_20_Text"><text:s text:c="8"/>console.log("Ameaça detetada: " + item + "! Bloquear sistema.");</text:span></text:p>
      <text:p text:style-name="P5"><text:span text:style-name="Source_20_Text"><text:s text:c="8"/>break;</text:span></text:p>
      <text:p text:style-name="P5"><text:span text:style-name="Source_20_Text"><text:s text:c="4"/>}</text:span></text:p>
      <text:p text:style-name="P5"><text:span text:style-name="Source_20_Text"><text:s text:c="4"/>console.log("Ficheiro limpo: " + item);</text:span></text:p>
      <text:p text:style-name="P5"><text:span text:style-name="Source_20_Text">}</text:span></text:p>
      <text:p text:style-name="P8">A tua missão no Exercício 1:</text:p>
      <text:list text:style-name="L3">
        <text:list-item>
          <text:p text:style-name="P9">Traduz a linha do <text:span text:style-name="Source_20_Text">for (const item of ficheiros)</text:span> para português claro.</text:p>
        </text:list-item>
        <text:list-item>
          <text:p text:style-name="P9">O computador vai chegar a ler e a imprimir o texto sobre o <text:span text:style-name="Source_20_Text">"documento.pdf"</text:span>? Porquê?</text:p>
        </text:list-item>
        <text:list-item>
          <text:p text:style-name="P9">Quais serão as linhas exatas impressas na consola?</text:p>
        </text:list-item>
      </text:list>
      <text:p text:style-name="P1">Para cada valor que estiver na variavel ficheiro sera guardado na variavel item. Por que o for of le todo valor da lista . </text:p>
      <text:p text:style-name="P1">Ficheiro limpo: foto.jpg</text:p>
      <text:p text:style-name="P1">Ficheiro limpo: musica.mp3</text:p>
      <text:p text:style-name="P1">Ameaça detetada: Virus.exe! Bloquear sistema</text:p>
      <text:p text:style-name="P1"><text:span text:style-name="T1">Resposta perfeita! Acertou em cheio em tudo!</text:span> 🎯</text:p>
      <text:p text:style-name="Text_20_body">O resultado impresso na consola é exatamente esse. Como o <text:span text:style-name="Source_20_Text">break</text:span> foi acionado na terceira volta com o <text:span text:style-name="Source_20_Text">"VIRUS.exe"</text:span>, o loop foi destruído imediatamente. Por causa disso, o computador <text:span text:style-name="T1">nunca chegou a ler o </text:span><text:span text:style-name="Source_20_Text"><text:span text:style-name="T1">"documento.pdf"</text:span></text:span>, deixando-o a salvo do lado de fora do loop.</text:p>
      <text:h text:style-name="P2" text:outline-level="3">⚙️ 2. O Comando <text:span text:style-name="Source_20_Text">continue</text:span> na Prática</text:h>
      <text:p text:style-name="Text_20_body">Agora que domina o botão de paragem total (<text:span text:style-name="Source_20_Text">break</text:span>), vamos ver o botão de salto: o <text:span text:style-name="Source_20_Text"><text:span text:style-name="T1">continue</text:span></text:span>.</text:p>
      <text:p text:style-name="Text_20_body">Ao contrário do seu irmão, o <text:span text:style-name="Source_20_Text">continue</text:span> não destrói o loop. Ele simplesmente diz ao computador: <text:span text:style-name="T2">"Olha, ignora tudo o que estiver abaixo de mim nesta volta específica e salta já para a próxima."</text:span></text:p>
      <text:p text:style-name="Text_20_body">Veja este exemplo de um sistema de notas que quer apenas destacar os alunos <text:span text:style-name="T1">reprovados</text:span> (nota menor que 10), ignorando os que passaram:</text:p>
      <text:p text:style-name="P4">JavaScript</text:p>
      <text:p text:style-name="P5"><text:span text:style-name="Source_20_Text">const notas = [8, 15, 7, 12];</text:span></text:p>
      <text:p text:style-name="P5"><text:soft-page-break/></text:p>
      <text:p text:style-name="P5"><text:span text:style-name="Source_20_Text">for (const nota of notas) {</text:span></text:p>
      <text:p text:style-name="P5"><text:span text:style-name="Source_20_Text"><text:s text:c="4"/>if (nota &gt;= 10) {</text:span></text:p>
      <text:p text:style-name="P5"><text:span text:style-name="Source_20_Text"><text:s text:c="8"/>continue; // Passou? Salta o resto do código e vai para a próxima nota!</text:span></text:p>
      <text:p text:style-name="P5"><text:span text:style-name="Source_20_Text"><text:s text:c="4"/>}</text:span></text:p>
      <text:p text:style-name="P5"><text:span text:style-name="Source_20_Text"><text:s text:c="4"/>console.log("Atenção: Aluno com nota " + nota + " precisa de apoio.");</text:span></text:p>
      <text:p text:style-name="P5"><text:span text:style-name="Source_20_Text">}</text:span></text:p>
      <text:h text:style-name="P6" text:outline-level="4"><text:span text:style-name="T3">O "Filme" do </text:span><text:span text:style-name="Source_20_Text"><text:span text:style-name="T3">continue</text:span></text:span><text:span text:style-name="T3">:</text:span></text:h>
      <text:list text:style-name="L4">
        <text:list-item>
          <text:p text:style-name="P10"><text:span text:style-name="T3">Volta 1 (</text:span><text:span text:style-name="Source_20_Text"><text:span text:style-name="T3">nota = 8</text:span></text:span><text:span text:style-name="T3">):</text:span><text:span text:style-name="T4"> O </text:span><text:span text:style-name="Source_20_Text"><text:span text:style-name="T4">if</text:span></text:span><text:span text:style-name="T4"> é falso ($8 \geq 10$ é mentira). O computador ignora o </text:span><text:span text:style-name="Source_20_Text"><text:span text:style-name="T4">continue</text:span></text:span><text:span text:style-name="T4"> e imprime: </text:span><text:span text:style-name="T5">"Atenção: Aluno com nota 8..."</text:span></text:p>
        </text:list-item>
        <text:list-item>
          <text:p text:style-name="P10"><text:span text:style-name="T3">Volta 2 (</text:span><text:span text:style-name="Source_20_Text"><text:span text:style-name="T3">nota = 15</text:span></text:span><text:span text:style-name="T3">):</text:span><text:span text:style-name="T4"> O </text:span><text:span text:style-name="Source_20_Text"><text:span text:style-name="T4">if</text:span></text:span><text:span text:style-name="T4"> é </text:span><text:span text:style-name="T3">Verdadeiro</text:span><text:span text:style-name="T4"> ($15 \geq 10$). O computador ativa o </text:span><text:span text:style-name="Source_20_Text"><text:span text:style-name="T3">continue</text:span></text:span><text:span text:style-name="T4">. Ele </text:span><text:span text:style-name="T3">ignora</text:span><text:span text:style-name="T4"> a linha do </text:span><text:span text:style-name="Source_20_Text"><text:span text:style-name="T4">console.log</text:span></text:span><text:span text:style-name="T4"> abaixo e salta logo para a próxima volta!</text:span></text:p>
        </text:list-item>
        <text:list-item>
          <text:p text:style-name="P10"><text:span text:style-name="T3">Volta 3 (</text:span><text:span text:style-name="Source_20_Text"><text:span text:style-name="T3">nota = 7</text:span></text:span><text:span text:style-name="T3">):</text:span><text:span text:style-name="T4"> O </text:span><text:span text:style-name="Source_20_Text"><text:span text:style-name="T4">if</text:span></text:span><text:span text:style-name="T4"> é falso. Imprime: </text:span><text:span text:style-name="T5">"Atenção: Aluno com nota 7..."</text:span></text:p>
        </text:list-item>
        <text:list-item>
          <text:p text:style-name="P10"><text:span text:style-name="T3">Volta 4 (</text:span><text:span text:style-name="Source_20_Text"><text:span text:style-name="T3">nota = 12</text:span></text:span><text:span text:style-name="T3">):</text:span><text:span text:style-name="T4"> O </text:span><text:span text:style-name="Source_20_Text"><text:span text:style-name="T4">if</text:span></text:span><text:span text:style-name="T4"> é verdadeiro. Ativa o </text:span><text:span text:style-name="Source_20_Text"><text:span text:style-name="T4">continue</text:span></text:span><text:span text:style-name="T4"> e salta a impressão.</text:span></text:p>
        </text:list-item>
      </text:list>
      <text:p text:style-name="P1"/>
      <text:h text:style-name="P2" text:outline-level="3">🏋️‍♂️ Exercício 2: O Filtro de Números Ímpares (<text:span text:style-name="Source_20_Text">continue</text:span>)</text:h>
      <text:p text:style-name="Text_20_body">Vamos praticar o salto. Olhe para este código que quer imprimir apenas os números <text:span text:style-name="T1">ímpares</text:span> de uma lista, saltando os pares:</text:p>
      <text:p text:style-name="P4">JavaScript</text:p>
      <text:p text:style-name="P5"><text:span text:style-name="Source_20_Text">const numeros = [1, 2, 3, 4, 5];</text:span></text:p>
      <text:p text:style-name="P5"/>
      <text:p text:style-name="P5"><text:span text:style-name="Source_20_Text">for (const num of numeros) {</text:span></text:p>
      <text:p text:style-name="P5"><text:span text:style-name="Source_20_Text"><text:s text:c="4"/>if (num % 2 === 0) {</text:span></text:p>
      <text:p text:style-name="P5"><text:span text:style-name="Source_20_Text"><text:s text:c="8"/>continue; </text:span></text:p>
      <text:p text:style-name="P5"><text:span text:style-name="Source_20_Text"><text:s text:c="4"/>}</text:span></text:p>
      <text:p text:style-name="P5"><text:span text:style-name="Source_20_Text"><text:s text:c="4"/>console.log("Número Ímpar: " + num);</text:span></text:p>
      <text:p text:style-name="P5"><text:span text:style-name="Source_20_Text">}</text:span></text:p>
      <text:p text:style-name="P11"><text:span text:style-name="T2">Nota: O operador </text:span><text:span text:style-name="Source_20_Text"><text:span text:style-name="T2">%</text:span></text:span><text:span text:style-name="T2"> dá o resto da divisão. Se </text:span><text:span text:style-name="Source_20_Text"><text:span text:style-name="T2">num % 2 === 0</text:span></text:span><text:span text:style-name="T2">, significa que o número é par.</text:span></text:p>
      <text:p text:style-name="P12">A tua missão no Exercício 2:</text:p>
      <text:list text:style-name="L5">
        <text:list-item>
          <text:p text:style-name="P13">Traduz a linha do <text:span text:style-name="Source_20_Text">for (const num of numeros)</text:span> para português claro.</text:p>
        </text:list-item>
        <text:list-item>
          <text:p text:style-name="P13">Quando o loop estiver na <text:span text:style-name="T1">segunda volta</text:span> (<text:span text:style-name="Source_20_Text">num = 2</text:span>), a condição do <text:span text:style-name="Source_20_Text">if</text:span> será Verdadeira ou Falsa? O que o <text:span text:style-name="Source_20_Text">continue</text:span> vai fazer?</text:p>
        </text:list-item>
        <text:list-item>
          <text:p text:style-name="P13"><text:soft-page-break/>Quais serão as linhas exatas que vão aparecer na consola no final deste programa?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07:34:10.813281826</dc:date>
    <dc:creator>João António</dc:creator>
    <meta:editing-duration>PT4H5M29S</meta:editing-duration>
    <meta:editing-cycles>27</meta:editing-cycles>
    <meta:generator>LibreOffice/26.2.4.2$Linux_X86_64 LibreOffice_project/620$Build-2</meta:generator>
    <meta:document-statistic meta:table-count="0" meta:image-count="0" meta:object-count="0" meta:page-count="4" meta:paragraph-count="76" meta:word-count="901" meta:character-count="4921" meta:non-whitespace-character-count="4015"/>
  </office:meta>
</office:document-meta>
</file>