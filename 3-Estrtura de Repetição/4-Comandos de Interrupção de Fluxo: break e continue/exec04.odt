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Standard">
      <style:paragraph-properties fo:margin-top="0cm" fo:margin-bottom="0.247cm" style:contextual-spacing="false" fo:line-height="115%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4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margin-top="0cm" fo:margin-bottom="0.247cm" style:contextual-spacing="false" fo:line-height="115%"/>
      <style:text-properties fo:font-weight="bold"/>
    </style:style>
    <style:style style:name="P9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ente escolha de tópicos! O <text:span text:style-name="Source_20_Text">break</text:span> e o <text:span text:style-name="Source_20_Text">continue</text:span> são os comandos de "superpoder" que lhe dão o controlo total sobre qualquer loop (<text:span text:style-name="Source_20_Text">for</text:span>, <text:span text:style-name="Source_20_Text">while</text:span>, <text:span text:style-name="Source_20_Text">for...of</text:span>, etc.).</text:p>
      <text:p text:style-name="Text_20_body">Eles servem para alterar o comportamento padrão de uma repetição a meio do caminho, funcionando como <text:span text:style-name="T1">travões de emergência</text:span> ou <text:span text:style-name="T1">atalhos de salto</text:span>.</text:p>
      <text:h text:style-name="P2" text:outline-level="3">🏛️ Para que servem o <text:span text:style-name="Source_20_Text">break</text:span> e o <text:span text:style-name="Source_20_Text">continue</text:span> no Mundo Real?</text:h>
      <text:list text:style-name="L1">
        <text:list-item>
          <text:p text:style-name="P3"><text:span text:style-name="Source_20_Text"><text:span text:style-name="T1">break</text:span></text:span><text:span text:style-name="T1"> (O botão de Eject / Paragem Total):</text:span> Interrompe o loop imediatamente e salta para fora dele.</text:p>
          <text:list>
            <text:list-item>
              <text:p text:style-name="P3"><text:span text:style-name="T2">Caso real:</text:span> Estás a pesquisar o nome de um utilizador numa lista de 1 milhão de pessoas. Quando o encontras na posição 10, não faz sentido o computador continuar a procurar nas outras 999.990 posições. Usas o <text:span text:style-name="Source_20_Text">break</text:span> para fechar o loop na hora.</text:p>
            </text:list-item>
          </text:list>
        </text:list-item>
        <text:list-item>
          <text:p text:style-name="P3"><text:span text:style-name="Source_20_Text"><text:span text:style-name="T1">continue</text:span></text:span><text:span text:style-name="T1"> (O botão de Saltar / Próximo):</text:span> Não para o loop todo. Ele apenas ignora o resto do código daquela volta específica e salta <text:span text:style-name="T1">imediatamente para a próxima volta</text:span>.</text:p>
          <text:list>
            <text:list-item>
              <text:p text:style-name="P3"><text:span text:style-name="T2">Caso real:</text:span> Estás a enviar um e-mail de marketing para uma lista de clientes. Se o cliente atual tiver a conta desativada, usas o <text:span text:style-name="Source_20_Text">continue</text:span> para saltar esse cliente e avançar logo para o envio do próximo, sem parar o programa.</text:p>
            </text:list-item>
          </text:list>
        </text:list-item>
      </text:list>
      <text:h text:style-name="P2" text:outline-level="3">⚙️ 1. O Comando <text:span text:style-name="Source_20_Text">break</text:span> na Prática</text:h>
      <text:p text:style-name="Text_20_body">Vê este código que simula um detetor de falhas num sistema de mísseis:</text:p>
      <text:p text:style-name="P4">JavaScript</text:p>
      <text:p text:style-name="P5"><text:span text:style-name="Source_20_Text">for (let i = 1; i &lt;= 5; i++) {</text:span></text:p>
      <text:p text:style-name="P5"><text:span text:style-name="Source_20_Text"><text:s text:c="4"/>if (i === 3) {</text:span></text:p>
      <text:p text:style-name="P5"><text:span text:style-name="Source_20_Text"><text:s text:c="8"/>console.log("ALERTA: Erro crítico na volta " + i + "! Parar tudo!");</text:span></text:p>
      <text:p text:style-name="P5"><text:span text:style-name="Source_20_Text"><text:s text:c="8"/>break; </text:span></text:p>
      <text:p text:style-name="P5"><text:span text:style-name="Source_20_Text"><text:s text:c="4"/>}</text:span></text:p>
      <text:p text:style-name="P5"><text:span text:style-name="Source_20_Text"><text:s text:c="4"/>console.log("Sistema estável. Teste " + i + " concluído.");</text:span></text:p>
      <text:p text:style-name="P5"><text:span text:style-name="Source_20_Text">}</text:span></text:p>
      <text:p text:style-name="P5"><text:span text:style-name="Source_20_Text">console.log("Fim dos testes.");</text:span></text:p>
      <text:h text:style-name="P6" text:outline-level="4"><text:span text:style-name="T1">O "Filme" do </text:span><text:span text:style-name="Source_20_Text"><text:span text:style-name="T1">break</text:span></text:span><text:span text:style-name="T1">:</text:span></text:h>
      <text:list text:style-name="L2">
        <text:list-item>
          <text:p text:style-name="P7"><text:span text:style-name="T1">Volta 1:</text:span> <text:span text:style-name="Source_20_Text">i</text:span> é 1. O <text:span text:style-name="Source_20_Text">if</text:span> é falso. Imprime: <text:span text:style-name="T2">"Sistema estável. Teste 1 concluído."</text:span></text:p>
        </text:list-item>
        <text:list-item>
          <text:p text:style-name="P7"><text:span text:style-name="T1">Volta 2:</text:span> <text:span text:style-name="Source_20_Text">i</text:span> é 2. O <text:span text:style-name="Source_20_Text">if</text:span> é falso. Imprime: <text:span text:style-name="T2">"Sistema estável. Teste 2 concluído."</text:span></text:p>
        </text:list-item>
        <text:list-item>
          <text:p text:style-name="P7"><text:span text:style-name="T1">Volta 3:</text:span> <text:span text:style-name="Source_20_Text">i</text:span> é 3. O <text:span text:style-name="Source_20_Text">if</text:span> (<text:span text:style-name="Source_20_Text">i === 3</text:span>) torna-se <text:span text:style-name="T1">Verdadeiro</text:span>! Entra no bloco, imprime o Alerta e ativa o <text:span text:style-name="Source_20_Text"><text:span text:style-name="T1">break</text:span></text:span>.</text:p>
        </text:list-item>
        <text:list-item>
          <text:p text:style-name="P7">🛑 <text:span text:style-name="T1">O loop morre instantaneamente.</text:span> O computador ignora as voltas 4 e 5, salta para fora das chavetas e imprime: <text:span text:style-name="T2">"Fim dos testes."</text:span></text:p>
        </text:list-item>
      </text:list>
      <text:h text:style-name="P2" text:outline-level="3"><text:soft-page-break/>🏋️‍♂️ Exercício 1: O Scanner de Vírus (<text:span text:style-name="Source_20_Text">break</text:span>)</text:h>
      <text:p text:style-name="Text_20_body">Vamos testar a tua leitura. Uma aplicação está a analisar uma lista de ficheiros à procura de um vírus:</text:p>
      <text:p text:style-name="P4">JavaScript</text:p>
      <text:p text:style-name="P5"><text:span text:style-name="Source_20_Text">const ficheiros = ["foto.jpg", "musica.mp3", "VIRUS.exe", "documento.pdf"];</text:span></text:p>
      <text:p text:style-name="P5"/>
      <text:p text:style-name="P5"><text:span text:style-name="Source_20_Text">for (const item of ficheiros) {</text:span></text:p>
      <text:p text:style-name="P5"><text:span text:style-name="Source_20_Text"><text:s text:c="4"/>if (item === "VIRUS.exe") {</text:span></text:p>
      <text:p text:style-name="P5"><text:span text:style-name="Source_20_Text"><text:s text:c="8"/>console.log("Ameaça detetada: " + item + "! Bloquear sistema.");</text:span></text:p>
      <text:p text:style-name="P5"><text:span text:style-name="Source_20_Text"><text:s text:c="8"/>break;</text:span></text:p>
      <text:p text:style-name="P5"><text:span text:style-name="Source_20_Text"><text:s text:c="4"/>}</text:span></text:p>
      <text:p text:style-name="P5"><text:span text:style-name="Source_20_Text"><text:s text:c="4"/>console.log("Ficheiro limpo: " + item);</text:span></text:p>
      <text:p text:style-name="P5"><text:span text:style-name="Source_20_Text">}</text:span></text:p>
      <text:p text:style-name="P8">A tua missão no Exercício 1:</text:p>
      <text:list text:style-name="L3">
        <text:list-item>
          <text:p text:style-name="P9">Traduz a linha do <text:span text:style-name="Source_20_Text">for (const item of ficheiros)</text:span> para português claro.</text:p>
        </text:list-item>
        <text:list-item>
          <text:p text:style-name="P9">O computador vai chegar a ler e a imprimir o texto sobre o <text:span text:style-name="Source_20_Text">"documento.pdf"</text:span>? Porquê?</text:p>
        </text:list-item>
        <text:list-item>
          <text:p text:style-name="P9">Quais serão as linhas exatas impressas na consola?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7:06:49.617859692</dc:date>
    <dc:creator>João António</dc:creator>
    <meta:editing-duration>PT3H38M8S</meta:editing-duration>
    <meta:editing-cycles>25</meta:editing-cycles>
    <meta:generator>LibreOffice/26.2.4.2$Linux_X86_64 LibreOffice_project/620$Build-2</meta:generator>
    <meta:document-statistic meta:table-count="0" meta:image-count="0" meta:object-count="0" meta:page-count="2" meta:paragraph-count="38" meta:word-count="450" meta:character-count="2508" meta:non-whitespace-character-count="2050"/>
  </office:meta>
</office:document-meta>
</file>