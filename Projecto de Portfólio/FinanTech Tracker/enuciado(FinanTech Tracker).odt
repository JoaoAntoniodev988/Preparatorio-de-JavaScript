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Standard">
      <style:text-properties officeooo:rsid="001b1cd1" officeooo:paragraph-rsid="001b1cd1"/>
    </style:style>
    <style:style style:name="P7" style:family="paragraph" style:parent-style-name="Text_20_body">
      <style:text-properties officeooo:rsid="001b1cd1" officeooo:paragraph-rsid="001b1cd1"/>
    </style:style>
    <style:style style:name="P8" style:family="paragraph" style:parent-style-name="Text_20_body">
      <style:text-properties officeooo:rsid="001b1cd1"/>
    </style:style>
    <style:style style:name="P9" style:family="paragraph" style:parent-style-name="Text_20_body" style:list-style-name="L5">
      <style:text-properties officeooo:rsid="001b1cd1"/>
    </style:style>
    <style:style style:name="P10" style:family="paragraph" style:parent-style-name="Heading_20_3">
      <style:text-properties officeooo:rsid="001b1cd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b1cd1"/>
    </style:style>
    <style:style style:name="P12" style:family="paragraph" style:parent-style-name="Preformatted_20_Text">
      <style:text-properties officeooo:rsid="001b1cd1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rsid="001b1cd1"/>
    </style:style>
    <style:style style:name="P14" style:family="paragraph" style:parent-style-name="Heading_20_4">
      <style:text-properties officeooo:rsid="001b1cd1"/>
    </style:style>
    <style:style style:name="P15" style:family="paragraph" style:parent-style-name="Text_20_body" style:list-style-name="L6">
      <style:text-properties officeooo:rsid="001b1cd1"/>
    </style:style>
    <style:style style:name="P16" style:family="paragraph" style:parent-style-name="Heading_20_2">
      <style:text-properties officeooo:rsid="001b1cd1"/>
    </style:style>
    <style:style style:name="P17" style:family="paragraph" style:parent-style-name="Text_20_body" style:list-style-name="L7">
      <style:text-properties officeooo:rsid="001b1cd1"/>
    </style:style>
    <style:style style:name="P18" style:family="paragraph" style:parent-style-name="Text_20_body" style:list-style-name="L8">
      <style:text-properties officeooo:rsid="001b1cd1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🚀 Projeto do Portfólio: FinanTech Tracker</text:h>
      <text:p text:style-name="Text_20_body">Imagine uma aplicação onde o usuário pode gerenciar suas receitas (ganhos) e despesas (gastos), visualizando o saldo atualizado em tempo real. É um projeto clássico, mas que os recrutadores adoram porque simula a lógica de um sistema real.</text:p>
      <text:h text:style-name="Heading_20_3" text:outline-level="3">📌 O problema que o projeto resolve</text:h>
      <text:p text:style-name="Text_20_body">A falta de controle financeiro visual. O usuário precisa de uma interface limpa onde possa cadastrar o que ganha e o que gasta, vendo rapidamente se está no azul ou no vermelho.</text:p>
      <text:h text:style-name="Heading_20_3" text:outline-level="3">🛠️ O que você vai praticar:</text:h>
      <text:list text:style-name="L1">
        <text:list-item>
          <text:p text:style-name="P1"><text:span text:style-name="T1">HTML (Semântico):</text:span> Uso correto de <text:span text:style-name="Source_20_Text">&lt;main&gt;</text:span>, <text:span text:style-name="Source_20_Text">&lt;section&gt;</text:span>, <text:span text:style-name="Source_20_Text">&lt;table&gt;</text:span> ou listas para o histórico, e <text:span text:style-name="Source_20_Text">&lt;form&gt;</text:span> com os inputs certos (números, datas, textos).</text:p>
        </text:list-item>
        <text:list-item>
          <text:p text:style-name="P1"><text:span text:style-name="T1">CSS:</text:span> Layout moderno usando <text:span text:style-name="T1">Flexbox</text:span> e <text:span text:style-name="T1">CSS Grid</text:span> para criar os cartões de resumo (Entradas, Saídas, Total) e o histórico de transações. Totalmente responsivo para celular.</text:p>
        </text:list-item>
        <text:list-item>
          <text:p text:style-name="P2">JavaScript (O seu foco):</text:p>
          <text:list>
            <text:list-item>
              <text:p text:style-name="P1"><text:span text:style-name="T1">Manipulação do DOM:</text:span> Capturar os dados que o usuário digita no formulário e exibi-los na tela sem recarregar a página.</text:p>
            </text:list-item>
            <text:list-item>
              <text:p text:style-name="P1"><text:span text:style-name="T1">Arrays e Objetos:</text:span> Armazenar cada transação como um objeto <text:span text:style-name="Source_20_Text">{ descricao: 'Salário', valor: 2500, tipo: 'entrada' }</text:span> dentro de uma lista (Array).</text:p>
            </text:list-item>
            <text:list-item>
              <text:p text:style-name="P1"><text:span text:style-name="T1">Métodos de Array (</text:span><text:span text:style-name="Source_20_Text"><text:span text:style-name="T1">filter</text:span></text:span><text:span text:style-name="T1">, </text:span><text:span text:style-name="Source_20_Text"><text:span text:style-name="T1">forEach</text:span></text:span><text:span text:style-name="T1">, </text:span><text:span text:style-name="Source_20_Text"><text:span text:style-name="T1">reduce</text:span></text:span><text:span text:style-name="T1">):</text:span> Usar o JavaScript para somar as entradas, somar as saídas e calcular o total.</text:p>
            </text:list-item>
          </text:list>
        </text:list-item>
      </text:list>
      <text:h text:style-name="Heading_20_3" text:outline-level="3">✨ O Diferencial para o Mercado (Para se destacar)</text:h>
      <text:p text:style-name="Text_20_body">Para não ser "apenas mais um projeto igual aos outros", vamos adicionar dois diferenciais:</text:p>
      <text:list text:style-name="L2">
        <text:list-item>
          <text:p text:style-name="P3"><text:span text:style-name="T1">Local Storage:</text:span> O JavaScript vai salvar os dados no navegador do usuário. Se ele fechar a página e abrir no dia seguinte, os dados ainda estarão lá.</text:p>
        </text:list-item>
        <text:list-item>
          <text:p text:style-name="P3"><text:span text:style-name="T1">Acessibilidade (A11y):</text:span> Uso de contrastes de cores corretos (verde para positivo, vermelho para negativo) e feedbacks visuais claros para leitores de tela.</text:p>
        </text:list-item>
      </text:list>
      <text:h text:style-name="Heading_20_2" text:outline-level="2">💼 Construção de Carreira: Como "vender" esse projeto</text:h>
      <text:p text:style-name="Text_20_body">Quando você terminar, não vamos apenas subir o código para o GitHub. Vamos tratá-lo como um produto real:</text:p>
      <text:list text:style-name="L3">
        <text:list-item>
          <text:p text:style-name="P4"><text:span text:style-name="T1">README Profissional:</text:span> O seu repositório terá um arquivo explicando o objetivo do projeto, as tecnologias usadas, um GIF ou link do projeto rodando (deploy no Vercel ou GitHub Pages) e o que você aprendeu com ele.</text:p>
        </text:list-item>
        <text:list-item>
          <text:p text:style-name="P4"><text:span text:style-name="T1">O discurso para a entrevista:</text:span> Em uma entrevista, em vez de dizer <text:span text:style-name="T2">"eu fiz um app de finanças"</text:span>, você dirá: <text:span text:style-name="T2">"Eu desenvolvi uma solução de controle financeiro focada na </text:span><text:soft-page-break/><text:span text:style-name="T2">experiência do usuário, onde apliquei conceitos avançados de manipulação do DOM e persistência de dados no LocalStorage com JavaScript puro."</text:span> Percebe a diferença?</text:p>
        </text:list-item>
      </text:list>
      <text:h text:style-name="Heading_20_3" text:outline-level="3">🔥 Próximo Passo</text:h>
      <text:p text:style-name="Text_20_body">Para começarmos a construir, quero que você me diga: <text:span text:style-name="T1">Como você prefere trabalhar?</text:span></text:p>
      <text:list text:style-name="L4">
        <text:list-item>
          <text:p text:style-name="P5">Você quer criar a estrutura HTML e a estilização CSS sozinho(a) primeiro e depois me mostrar para começarmos o JavaScript?</text:p>
        </text:list-item>
        <text:list-item>
          <text:p text:style-name="P5">Ou você prefere que eu te ajude a desenhar a estrutura do HTML semântico passo a passo antes de você ir para o CSS?</text:p>
        </text:list-item>
      </text:list>
      <text:p text:style-name="Text_20_body">Escolha o seu caminho e vamos dar o pontapé inicial!</text:p>
      <text:p text:style-name="P6">Me ajude a desenhar a estrutura do HTML semântico passo a passo antes de irmos para o CSS.</text:p>
      <text:p text:style-name="P7">Excelente escolha! Começar pela estrutura e pela semântica do HTML é o segredo dos grandes desenvolvedores. Um HTML bem estruturado facilita o CSS, melhora o SEO (como o Google encontra seu site) e torna a página acessível para pessoas que usam leitores de tela.</text:p>
      <text:p text:style-name="P8">Vamos desenhar a estrutura do nosso <text:span text:style-name="T1">FinanTech Tracker</text:span> passo a passo.</text:p>
      <text:p text:style-name="P8">Imagine a tela dividida em blocos lógicos. Nós teremos:</text:p>
      <text:list text:style-name="L5">
        <text:list-item>
          <text:p text:style-name="P9">Um topo (Header) para o título e as boas-vindas.</text:p>
        </text:list-item>
        <text:list-item>
          <text:p text:style-name="P9">Uma área principal (Main) que conterá os cartões de resumo (Entradas, Saídas, Total), o formulário para adicionar transações e a lista/tabela com o histórico.</text:p>
        </text:list-item>
      </text:list>
      <text:p text:style-name="P8">Vamos construir o esqueleto do nosso arquivo <text:span text:style-name="Source_20_Text">index.html</text:span>. Pegue o seu editor de código (como o VS Code) e vamos estruturar a tag <text:span text:style-name="Source_20_Text">&lt;body&gt;</text:span> juntos.</text:p>
      <text:h text:style-name="P10" text:outline-level="3">Passo 1: O Topo da Aplicação (<text:span text:style-name="Source_20_Text">&lt;header&gt;</text:span>)</text:h>
      <text:p text:style-name="P8">A tag <text:span text:style-name="Source_20_Text">&lt;header&gt;</text:span> indica que este é o cabeçalho da nossa página ou de uma seção.</text:p>
      <text:p text:style-name="P11">HTML</text:p>
      <text:p text:style-name="P12"><text:span text:style-name="Source_20_Text">&lt;header&gt;</text:span></text:p>
      <text:p text:style-name="P12"><text:span text:style-name="Source_20_Text"><text:s text:c="4"/>&lt;h1&gt;FinanTech &lt;span&gt;Tracker&lt;/span&gt;&lt;/h1&gt;</text:span></text:p>
      <text:p text:style-name="P12"><text:span text:style-name="Source_20_Text"><text:s text:c="4"/>&lt;p&gt;Seu controle financeiro inteligente&lt;/p&gt;</text:span></text:p>
      <text:p text:style-name="P13"><text:span text:style-name="Source_20_Text">&lt;/header&gt;</text:span></text:p>
      <text:p text:style-name="P8">💡 <text:span text:style-name="T3">Por que isso importa?</text:span><text:span text:style-name="T2"> O </text:span><text:span text:style-name="Source_20_Text"><text:span text:style-name="T2">&lt;h1&gt;</text:span></text:span><text:span text:style-name="T2"> deve ser único na página. Ele diz aos motores de busca e leitores de tela qual é o assunto principal daquele documento.</text:span></text:p>
      <text:h text:style-name="P10" text:outline-level="3">Passo 2: O Conteúdo Principal (<text:span text:style-name="Source_20_Text">&lt;main&gt;</text:span>)</text:h>
      <text:p text:style-name="P8">Tudo o que for o conteúdo central e único da nossa aplicação vai dentro da tag <text:span text:style-name="Source_20_Text">&lt;main&gt;</text:span>. Dentro dela, usaremos tags <text:span text:style-name="Source_20_Text">&lt;section&gt;</text:span> para separar os blocos de funcionalidades.</text:p>
      <text:h text:style-name="P14" text:outline-level="4">Bloco A: Os Cartões de Resumo (Dashboard)</text:h>
      <text:p text:style-name="P8">Vamos criar uma seção para mostrar o Saldo, as Entradas e as Saídas.</text:p>
      <text:p text:style-name="P11">HTML</text:p>
      <text:p text:style-name="P12"><text:soft-page-break/><text:span text:style-name="Source_20_Text">&lt;main&gt;</text:span></text:p>
      <text:p text:style-name="P12"><text:span text:style-name="Source_20_Text"><text:s text:c="4"/>&lt;!-- Seção de Resumo Financeiro --&gt;</text:span></text:p>
      <text:p text:style-name="P12"><text:span text:style-name="Source_20_Text"><text:s text:c="4"/>&lt;section id="balance-section"&gt;</text:span></text:p>
      <text:p text:style-name="P12"><text:span text:style-name="Source_20_Text"><text:s text:c="8"/>&lt;h2 class="sr-only"&gt;Resumo de Saldos&lt;/h2&gt; </text:span></text:p>
      <text:p text:style-name="P12"><text:span text:style-name="Source_20_Text"><text:s text:c="8"/></text:span></text:p>
      <text:p text:style-name="P12"><text:span text:style-name="Source_20_Text"><text:s text:c="8"/>&lt;!-- Cartão: Entradas --&gt;</text:span></text:p>
      <text:p text:style-name="P12"><text:span text:style-name="Source_20_Text"><text:s text:c="8"/>&lt;div class="card card-incomes"&gt;</text:span></text:p>
      <text:p text:style-name="P12"><text:span text:style-name="Source_20_Text"><text:s text:c="12"/>&lt;h3&gt;Entradas&lt;/h3&gt;</text:span></text:p>
      <text:p text:style-name="P12"><text:span text:style-name="Source_20_Text"><text:s text:c="12"/>&lt;p id="income-display"&gt;R$ 0,00&lt;/p&gt;</text:span></text:p>
      <text:p text:style-name="P12"><text:span text:style-name="Source_20_Text"><text:s text:c="8"/>&lt;/div&gt;</text:span></text:p>
      <text:p text:style-name="P12"/>
      <text:p text:style-name="P12"><text:span text:style-name="Source_20_Text"><text:s text:c="8"/>&lt;!-- Cartão: Saídas --&gt;</text:span></text:p>
      <text:p text:style-name="P12"><text:span text:style-name="Source_20_Text"><text:s text:c="8"/>&lt;div class="card card-expenses"&gt;</text:span></text:p>
      <text:p text:style-name="P12"><text:span text:style-name="Source_20_Text"><text:s text:c="12"/>&lt;h3&gt;Saídas&lt;/h3&gt;</text:span></text:p>
      <text:p text:style-name="P12"><text:span text:style-name="Source_20_Text"><text:s text:c="12"/>&lt;p id="expense-display"&gt;R$ 0,00&lt;/p&gt;</text:span></text:p>
      <text:p text:style-name="P12"><text:span text:style-name="Source_20_Text"><text:s text:c="8"/>&lt;/div&gt;</text:span></text:p>
      <text:p text:style-name="P12"/>
      <text:p text:style-name="P12"><text:span text:style-name="Source_20_Text"><text:s text:c="8"/>&lt;!-- Cartão: Total --&gt;</text:span></text:p>
      <text:p text:style-name="P12"><text:span text:style-name="Source_20_Text"><text:s text:c="8"/>&lt;div class="card card-total"&gt;</text:span></text:p>
      <text:p text:style-name="P12"><text:span text:style-name="Source_20_Text"><text:s text:c="12"/>&lt;h3&gt;Saldo Total&lt;/h3&gt;</text:span></text:p>
      <text:p text:style-name="P12"><text:span text:style-name="Source_20_Text"><text:s text:c="12"/>&lt;p id="total-display"&gt;R$ 0,00&lt;/p&gt;</text:span></text:p>
      <text:p text:style-name="P12"><text:span text:style-name="Source_20_Text"><text:s text:c="8"/>&lt;/div&gt;</text:span></text:p>
      <text:p text:style-name="P13"><text:span text:style-name="Source_20_Text"><text:s text:c="4"/>&lt;/section&gt;</text:span></text:p>
      <text:p text:style-name="P8">💡 <text:span text:style-name="T3">Dica de Mestre (Acessibilidade):</text:span><text:span text:style-name="T2"> Note a classe </text:span><text:span text:style-name="Source_20_Text"><text:span text:style-name="T2">sr-only</text:span></text:span><text:span text:style-name="T2"> (Screen Reader Only) no </text:span><text:span text:style-name="Source_20_Text"><text:span text:style-name="T2">&lt;h2&gt;</text:span></text:span><text:span text:style-name="T2">. Usamos isso para colocar um título na seção para que leitores de tela saibam o que ela é, mas via CSS nós vamos escondê-la visualmente para manter o design limpo.</text:span></text:p>
      <text:h text:style-name="P10" text:outline-level="3">Passo 3: O Formulário de Nova Transação (<text:span text:style-name="Source_20_Text">&lt;form&gt;</text:span>)</text:h>
      <text:p text:style-name="P8">Ainda dentro do <text:span text:style-name="Source_20_Text">&lt;main&gt;</text:span>, precisamos de um lugar onde o usuário possa digitar os dados. Usaremos a tag <text:span text:style-name="Source_20_Text">&lt;form&gt;</text:span>.</text:p>
      <text:p text:style-name="P11">HTML</text:p>
      <text:p text:style-name="P12"><text:span text:style-name="Source_20_Text"><text:s text:c="4"/>&lt;!-- Seção do Formulário --&gt;</text:span></text:p>
      <text:p text:style-name="P12"><text:span text:style-name="Source_20_Text"><text:s text:c="4"/>&lt;section id="form-section"&gt;</text:span></text:p>
      <text:p text:style-name="P12"><text:span text:style-name="Source_20_Text"><text:s text:c="8"/>&lt;h2&gt;Nova Transação&lt;/h2&gt;</text:span></text:p>
      <text:p text:style-name="P12"><text:span text:style-name="Source_20_Text"><text:s text:c="8"/>&lt;form id="transaction-form"&gt;</text:span></text:p>
      <text:p text:style-name="P12"><text:span text:style-name="Source_20_Text"><text:s text:c="12"/></text:span></text:p>
      <text:p text:style-name="P12"><text:span text:style-name="Source_20_Text"><text:s text:c="12"/>&lt;div class="input-group"&gt;</text:span></text:p>
      <text:p text:style-name="P12"><text:span text:style-name="Source_20_Text"><text:s text:c="16"/>&lt;label for="description"&gt;Descrição&lt;/label&gt;</text:span></text:p>
      <text:p text:style-name="P12"><text:span text:style-name="Source_20_Text"><text:s text:c="16"/>&lt;input type="text" id="description" placeholder="Ex: Salário, Supermercado" required /&gt;</text:span></text:p>
      <text:p text:style-name="P12"><text:span text:style-name="Source_20_Text"><text:s text:c="12"/>&lt;/div&gt;</text:span></text:p>
      <text:p text:style-name="P12"/>
      <text:p text:style-name="P12"><text:span text:style-name="Source_20_Text"><text:s text:c="12"/>&lt;div class="input-group"&gt;</text:span></text:p>
      <text:p text:style-name="P12"><text:span text:style-name="Source_20_Text"><text:s text:c="16"/>&lt;label for="amount"&gt;Valor&lt;/label&gt;</text:span></text:p>
      <text:p text:style-name="P12"><text:span text:style-name="Source_20_Text"><text:s text:c="16"/>&lt;input type="number" id="amount" step="0.01" placeholder="0,00" required /&gt;</text:span></text:p>
      <text:p text:style-name="P12"><text:span text:style-name="Source_20_Text"><text:s text:c="16"/>&lt;small&gt;Use o sinal - (menos) para despesas/gastos.&lt;/small&gt;</text:span></text:p>
      <text:p text:style-name="P12"><text:span text:style-name="Source_20_Text"><text:s text:c="12"/>&lt;/div&gt;</text:span></text:p>
      <text:p text:style-name="P12"/>
      <text:p text:style-name="P12"><text:span text:style-name="Source_20_Text"><text:s text:c="12"/>&lt;button type="submit"&gt;Adicionar Transação&lt;/button&gt;</text:span></text:p>
      <text:p text:style-name="P12"><text:span text:style-name="Source_20_Text"><text:s text:c="8"/>&lt;/form&gt;</text:span></text:p>
      <text:p text:style-name="P13"><text:span text:style-name="Source_20_Text"><text:s text:c="4"/>&lt;/section&gt;</text:span></text:p>
      <text:p text:style-name="P8">💡 <text:span text:style-name="T3">Por que isso importa?</text:span><text:span text:style-name="T2"> Sempre use a tag </text:span><text:span text:style-name="Source_20_Text"><text:span text:style-name="T2">&lt;label&gt;</text:span></text:span><text:span text:style-name="T2"> associada ao </text:span><text:span text:style-name="Source_20_Text"><text:span text:style-name="T2">&lt;input&gt;</text:span></text:span><text:span text:style-name="T2"> através do atributo </text:span><text:span text:style-name="Source_20_Text"><text:span text:style-name="T2">id</text:span></text:span><text:span text:style-name="T2"> e </text:span><text:span text:style-name="Source_20_Text"><text:span text:style-name="T2">for</text:span></text:span><text:span text:style-name="T2">. Isso permite que, ao clicar no texto da label, o campo de digitação seja focado, além de ser fundamental para a acessibilidade.</text:span></text:p>
      <text:h text:style-name="P10" text:outline-level="3"><text:soft-page-break/>Passo 4: O Histórico de Transações (<text:span text:style-name="Source_20_Text">&lt;table&gt;</text:span> ou <text:span text:style-name="Source_20_Text">&lt;ul&gt;</text:span>)</text:h>
      <text:p text:style-name="P8">Para finalizar o <text:span text:style-name="Source_20_Text">&lt;main&gt;</text:span>, precisamos mostrar a lista de gastos que o JavaScript vai gerenciar. Uma tabela (<text:span text:style-name="Source_20_Text">&lt;table&gt;</text:span>) é perfeita para dados tabulares como este.</text:p>
      <text:p text:style-name="P11">HTML</text:p>
      <text:p text:style-name="P12"><text:span text:style-name="Source_20_Text"><text:s text:c="4"/>&lt;!-- Seção do Histórico --&gt;</text:span></text:p>
      <text:p text:style-name="P12"><text:span text:style-name="Source_20_Text"><text:s text:c="4"/>&lt;section id="history-section"&gt;</text:span></text:p>
      <text:p text:style-name="P12"><text:span text:style-name="Source_20_Text"><text:s text:c="8"/>&lt;h2&gt;Histórico de Transações&lt;/h2&gt;</text:span></text:p>
      <text:p text:style-name="P12"><text:span text:style-name="Source_20_Text"><text:s text:c="8"/></text:span></text:p>
      <text:p text:style-name="P12"><text:span text:style-name="Source_20_Text"><text:s text:c="8"/>&lt;table id="data-table"&gt;</text:span></text:p>
      <text:p text:style-name="P12"><text:span text:style-name="Source_20_Text"><text:s text:c="12"/>&lt;thead&gt;</text:span></text:p>
      <text:p text:style-name="P12"><text:span text:style-name="Source_20_Text"><text:s text:c="16"/>&lt;tr&gt;</text:span></text:p>
      <text:p text:style-name="P12"><text:span text:style-name="Source_20_Text"><text:s text:c="20"/>&lt;th&gt;Descrição&lt;/th&gt;</text:span></text:p>
      <text:p text:style-name="P12"><text:span text:style-name="Source_20_Text"><text:s text:c="20"/>&lt;th&gt;Valor&lt;/th&gt;</text:span></text:p>
      <text:p text:style-name="P12"><text:span text:style-name="Source_20_Text"><text:s text:c="20"/>&lt;th&gt;Ação&lt;/th&gt;</text:span></text:p>
      <text:p text:style-name="P12"><text:span text:style-name="Source_20_Text"><text:s text:c="16"/>&lt;/tr&gt;</text:span></text:p>
      <text:p text:style-name="P12"><text:span text:style-name="Source_20_Text"><text:s text:c="12"/>&lt;/thead&gt;</text:span></text:p>
      <text:p text:style-name="P12"><text:span text:style-name="Source_20_Text"><text:s text:c="12"/>&lt;tbody id="transaction-container"&gt;</text:span></text:p>
      <text:p text:style-name="P12"><text:span text:style-name="Source_20_Text"><text:s text:c="16"/>&lt;!-- O JavaScript vai injetar as linhas (&lt;tr&gt;) aqui dinamicamente --&gt;</text:span></text:p>
      <text:p text:style-name="P12"><text:span text:style-name="Source_20_Text"><text:s text:c="12"/>&lt;/tbody&gt;</text:span></text:p>
      <text:p text:style-name="P12"><text:span text:style-name="Source_20_Text"><text:s text:c="8"/>&lt;/table&gt;</text:span></text:p>
      <text:p text:style-name="P12"><text:span text:style-name="Source_20_Text"><text:s text:c="4"/>&lt;/section&gt;</text:span></text:p>
      <text:p text:style-name="P13"><text:span text:style-name="Source_20_Text">&lt;/main&gt; &lt;!-- Fechamento do conteúdo principal --&gt;</text:span></text:p>
      <text:p text:style-name="P8">💡 <text:span text:style-name="T3">Por que isso importa?</text:span><text:span text:style-name="T2"> Dividir a tabela em </text:span><text:span text:style-name="Source_20_Text"><text:span text:style-name="T2">&lt;thead&gt;</text:span></text:span><text:span text:style-name="T2"> (cabeçalho) e </text:span><text:span text:style-name="Source_20_Text"><text:span text:style-name="T2">&lt;tbody&gt;</text:span></text:span><text:span text:style-name="T2"> (corpo) ajuda o navegador e os leitores de tela a entenderem a estrutura dos dados organizados.</text:span></text:p>
      <text:h text:style-name="P10" text:outline-level="3">🛠️ Seu Desafio Agora</text:h>
      <text:p text:style-name="P8">Junte esses blocos dentro de um arquivo chamado <text:span text:style-name="Source_20_Text">index.html</text:span> (não esqueça da estrutura básica com <text:span text:style-name="Source_20_Text">&lt;!DOCTYPE html&gt;</text:span>, <text:span text:style-name="Source_20_Text">&lt;html&gt;</text:span>, <text:span text:style-name="Source_20_Text">&lt;head&gt;</text:span> e <text:span text:style-name="Source_20_Text">&lt;body&gt;</text:span>).</text:p>
      <text:p text:style-name="P8">Assim que você estruturar esse arquivo no seu computador, me responda:</text:p>
      <text:list text:style-name="L6">
        <text:list-item>
          <text:p text:style-name="P15">Deu tudo certo ao montar a estrutura?</text:p>
        </text:list-item>
        <text:list-item>
          <text:p text:style-name="P15">Conseguiu entender o motivo de cada tag semântica que escolhemos aqui?</text:p>
        </text:list-item>
      </text:list>
      <text:p text:style-name="P8">Assim que confirmar, nós daremos o próximo passo, aplicando o <text:span text:style-name="T1">CSS</text:span> com Flexbox/Grid para transformar esse esqueleto em um layout elegante de Fintech!</text:p>
      <text:p text:style-name="P6">Sim deu tudo certo.</text:p>
      <text:p text:style-name="P7">Excelente! Ver o esqueleto do HTML renderizado no navegador é o primeiro grande passo de qualquer projeto front-end. Parabéns por ter montado a estrutura certinha!</text:p>
      <text:p text:style-name="P8">Achei sensacional que você já personalizou a moeda para <text:span text:style-name="T1">AOA (Kwanza)</text:span>. Esse tipo de iniciativa e atenção aos detalhes é exatamente o que diferencia um desenvolvedor júnior de alguém que pensa no produto e no público-alvo. Muito bom!</text:p>
      <text:p text:style-name="P8">Repare como o navegador renderiza tudo em uma "cascata" vertical pura e com fontes padrão. Esse é o comportamento nativo do HTML. Agora, o nosso papel com o <text:span text:style-name="T1">CSS</text:span> é pegar esse esqueleto e transformá-lo em uma interface moderna, limpa e profissional.</text:p>
      <text:h text:style-name="P16" text:outline-level="2"><text:soft-page-break/>🎨 O Próximo Passo: Estilização com CSS</text:h>
      <text:p text:style-name="P8">Para deixarmos a nossa aplicação com cara de sistema financeiro moderno (Fintech), vamos focar em três pilares do CSS:</text:p>
      <text:list text:style-name="L7">
        <text:list-item>
          <text:p text:style-name="P17"><text:span text:style-name="T1">Reset e Tipografia:</text:span> Limpar as margens padrão do navegador e escolher uma fonte moderna (como Inter ou Roboto).</text:p>
        </text:list-item>
        <text:list-item>
          <text:p text:style-name="P17"><text:span text:style-name="T1">Layout (CSS Grid e Flexbox):</text:span> Organizar os cartões de saldo lado a lado em telas maiores e alinhar o formulário.</text:p>
        </text:list-item>
        <text:list-item>
          <text:p text:style-name="P17"><text:span text:style-name="T1">Identidade Visual:</text:span> Usar cores que passem confiança (tons de azul escuro ou cinza para o fundo, verde para entradas e um tom avermelhado/laranja para saídas).</text:p>
        </text:list-item>
      </text:list>
      <text:h text:style-name="P10" text:outline-level="3">🛠️ Sua Missão de CSS</text:h>
      <text:p text:style-name="P8">Vamos criar um arquivo chamado <text:span text:style-name="Source_20_Text">style.css</text:span> na mesma pasta do seu <text:span text:style-name="Source_20_Text">index.html</text:span> (não esqueça de linká-lo no <text:span text:style-name="Source_20_Text">&lt;head&gt;</text:span> do seu HTML usando <text:span text:style-name="Source_20_Text">&lt;link rel="stylesheet" href="style.css"&gt;</text:span>).</text:p>
      <text:p text:style-name="P8">Tente estruturar o seu CSS pensando nesses blocos. Como mentoria é sobre guiar e fazer você evoluir, <text:span text:style-name="T1">eu quero que você tente dar o primeiro passo na estilização</text:span>.</text:p>
      <text:p text:style-name="P8">Comece focando nestes três pontos:</text:p>
      <text:list text:style-name="L8">
        <text:list-item>
          <text:p text:style-name="P18">Mude a cor de fundo (<text:span text:style-name="Source_20_Text">background-color</text:span>) do <text:span text:style-name="Source_20_Text">body</text:span> para um cinza bem claro ou azul escuro, e mude a fonte para <text:span text:style-name="Source_20_Text">sans-serif</text:span>.</text:p>
        </text:list-item>
        <text:list-item>
          <text:p text:style-name="P18">Tente fazer com que as caixas de saldo (<text:span text:style-name="Source_20_Text">.card</text:span>) ganhem uma cor de fundo branca, bordas arredondadas (<text:span text:style-name="Source_20_Text">border-radius</text:span>) e um espaçamento interno (<text:span text:style-name="Source_20_Text">padding</text:span>).</text:p>
        </text:list-item>
        <text:list-item>
          <text:p text:style-name="P18">Se você lembrar como usa <text:span text:style-name="T1">Flexbox</text:span> ou <text:span text:style-name="T1">CSS Grid</text:span>, tente aplicar no <text:span text:style-name="Source_20_Text">#balance-section</text:span> para ver se consegue colocar os três cartões um ao lado do outro.</text:p>
        </text:list-item>
      </text:list>
      <text:p text:style-name="P8"><text:span text:style-name="T1">Escreva o código CSS inicial no seu ritmo.</text:span> Se travar em alguma parte ou não lembrar de alguma propriedade, me mande o código que você conseguiu fazer e nós vamos ajustando e limpando juntos até ficar perfeito. Pronto para começar a estilizar?</text:p>
      <text:p text:style-name="P6">Vou querer um exemplar visual de como as secções vão ficar distribuido na tela.</text:p>
      <text:p text:style-name="P7">Perfeito! Analisando o seu código na imagem, você já fez coisas excelentes: o <text:span text:style-name="T1">reset global</text:span> com <text:span text:style-name="Source_20_Text">box-sizing: border-box</text:span> está certinho, e o uso de <text:span text:style-name="T1">variáveis CSS (</text:span><text:span text:style-name="Source_20_Text"><text:span text:style-name="T1">:root</text:span></text:span><text:span text:style-name="T1">)</text:span> mostra que você já está pegando boas práticas de organização de cores!</text:p>
      <text:p text:style-name="P8">Só um detalhe rápido de sintaxe no seu <text:span text:style-name="Source_20_Text">body</text:span>: a propriedade <text:span text:style-name="Source_20_Text">background-color: var(--fundo-principal);</text:span> acabou quebrando em duas linhas no seu editor. Certifique-se de manter o <text:span text:style-name="Source_20_Text">var(...)</text:span> todo na mesma linha para o navegador reconhecer a cor, combinado?</text:p>
      <text:h text:style-name="P10" text:outline-level="3">🗺️ Como as seções vão ficar distribuídas (Wireframe Visual)</text:h>
      <text:p text:style-name="P8">Para te ajudar a visualizar o layout final antes de escrever o CSS, preparei este esquema de como vamos distribuir os blocos na tela usando <text:span text:style-name="T1">Flexbox</text:span> e <text:span text:style-name="T1">CSS Grid</text:span>:</text:p>
      <text:h text:style-name="P10" text:outline-level="3"><text:soft-page-break/>🧱 O Plano de Construção em CSS</text:h>
      <text:p text:style-name="P8">Para alcançar esse resultado da imagem, vamos trabalhar seção por seção. Vamos focar primeiro no <text:span text:style-name="T1">Header</text:span> e na <text:span text:style-name="T1">Seção de Saldos</text:span> (os cartões).</text:p>
      <text:p text:style-name="P8">Adicione o seguinte bloco ao seu arquivo <text:span text:style-name="Source_20_Text">style.css</text:span> logo abaixo do seu <text:span text:style-name="Source_20_Text">body</text:span>:</text:p>
      <text:p text:style-name="P11">CSS</text:p>
      <text:p text:style-name="P12"><text:span text:style-name="Source_20_Text">/* --- LAYOUT GERAL --- */</text:span></text:p>
      <text:p text:style-name="P12"><text:span text:style-name="Source_20_Text">header {</text:span></text:p>
      <text:p text:style-name="P12"><text:span text:style-name="Source_20_Text"><text:s text:c="4"/>text-align: center;</text:span></text:p>
      <text:p text:style-name="P12"><text:span text:style-name="Source_20_Text"><text:s text:c="4"/>padding: 2rem 1rem;</text:span></text:p>
      <text:p text:style-name="P12"><text:span text:style-name="Source_20_Text"><text:s text:c="4"/>background-color: var(--destaque);</text:span></text:p>
      <text:p text:style-name="P12"><text:span text:style-name="Source_20_Text"><text:s text:c="4"/>color: white;</text:span></text:p>
      <text:p text:style-name="P12"><text:span text:style-name="Source_20_Text">}</text:span></text:p>
      <text:p text:style-name="P12"/>
      <text:p text:style-name="P12"><text:span text:style-name="Source_20_Text">main {</text:span></text:p>
      <text:p text:style-name="P12"><text:span text:style-name="Source_20_Text"><text:s text:c="4"/>max-width: 800px;</text:span></text:p>
      <text:p text:style-name="P12"><text:span text:style-name="Source_20_Text"><text:s text:c="4"/>margin: 0 auto;</text:span></text:p>
      <text:p text:style-name="P12"><text:span text:style-name="Source_20_Text"><text:s text:c="4"/>padding: 2rem 1rem;</text:span></text:p>
      <text:p text:style-name="P12"><text:span text:style-name="Source_20_Text">}</text:span></text:p>
      <text:p text:style-name="P12"/>
      <text:p text:style-name="P12"><text:span text:style-name="Source_20_Text">/* --- SEÇÃO DE SALDOS (Os Cartões) --- */</text:span></text:p>
      <text:p text:style-name="P12"><text:span text:style-name="Source_20_Text">#balance-section {</text:span></text:p>
      <text:p text:style-name="P12"><text:span text:style-name="Source_20_Text"><text:s text:c="4"/>display: grid;</text:span></text:p>
      <text:p text:style-name="P12"><text:span text:style-name="Source_20_Text"><text:s text:c="4"/>/* Cria 3 colunas iguais em telas grandes */</text:span></text:p>
      <text:p text:style-name="P12"><text:span text:style-name="Source_20_Text"><text:s text:c="4"/>grid-template-columns: repeat(auto-fit, minmax(220px, 1fr)); </text:span></text:p>
      <text:p text:style-name="P12"><text:span text:style-name="Source_20_Text"><text:s text:c="4"/>gap: 1.5rem; /* Espaçamento entre os cartões */</text:span></text:p>
      <text:p text:style-name="P12"><text:span text:style-name="Source_20_Text"><text:s text:c="4"/>margin-bottom: 2rem;</text:span></text:p>
      <text:p text:style-name="P12"><text:span text:style-name="Source_20_Text">}</text:span></text:p>
      <text:p text:style-name="P12"/>
      <text:p text:style-name="P12"><text:span text:style-name="Source_20_Text">.card {</text:span></text:p>
      <text:p text:style-name="P12"><text:span text:style-name="Source_20_Text"><text:s text:c="4"/>background-color: var(--fundo-card);</text:span></text:p>
      <text:p text:style-name="P12"><text:span text:style-name="Source_20_Text"><text:s text:c="4"/>padding: 1.5rem;</text:span></text:p>
      <text:p text:style-name="P12"><text:span text:style-name="Source_20_Text"><text:s text:c="4"/>border-radius: 8px;</text:span></text:p>
      <text:p text:style-name="P12"><text:span text:style-name="Source_20_Text"><text:s text:c="4"/>box-shadow: 0 4px 6px rgba(0, 0, 0, 0.05); /* Sombra leve de Fintech */</text:span></text:p>
      <text:p text:style-name="P12"><text:span text:style-name="Source_20_Text">}</text:span></text:p>
      <text:p text:style-name="P12"/>
      <text:p text:style-name="P12"><text:span text:style-name="Source_20_Text">.card h3 {</text:span></text:p>
      <text:p text:style-name="P12"><text:span text:style-name="Source_20_Text"><text:s text:c="4"/>font-size: 1rem;</text:span></text:p>
      <text:p text:style-name="P12"><text:span text:style-name="Source_20_Text"><text:s text:c="4"/>font-weight: 400;</text:span></text:p>
      <text:p text:style-name="P12"><text:span text:style-name="Source_20_Text"><text:s text:c="4"/>color: #666;</text:span></text:p>
      <text:p text:style-name="P12"><text:span text:style-name="Source_20_Text"><text:s text:c="4"/>margin-bottom: 0.5rem;</text:span></text:p>
      <text:p text:style-name="P12"><text:span text:style-name="Source_20_Text">}</text:span></text:p>
      <text:p text:style-name="P12"/>
      <text:p text:style-name="P12"><text:span text:style-name="Source_20_Text">.card p {</text:span></text:p>
      <text:p text:style-name="P12"><text:span text:style-name="Source_20_Text"><text:s text:c="4"/>font-size: 1.5rem;</text:span></text:p>
      <text:p text:style-name="P12"><text:span text:style-name="Source_20_Text"><text:s text:c="4"/>font-weight: bold;</text:span></text:p>
      <text:p text:style-name="P12"><text:span text:style-name="Source_20_Text"><text:s text:c="4"/>color: var(--texto);</text:span></text:p>
      <text:p text:style-name="P12"><text:span text:style-name="Source_20_Text">}</text:span></text:p>
      <text:p text:style-name="P12"/>
      <text:p text:style-name="P12"><text:span text:style-name="Source_20_Text">/* Customização de cores para os cartões específicos */</text:span></text:p>
      <text:p text:style-name="P12"><text:span text:style-name="Source_20_Text">.card-incomes p { color: var(--destaque); } /* Verde */</text:span></text:p>
      <text:p text:style-name="P13"><text:span text:style-name="Source_20_Text">.card-expenses p { color: var(--destaque2); } /* Vermelho */</text:span></text:p>
      <text:h text:style-name="P10" text:outline-level="3">🎯 Corrigindo as Variáveis duplicadas</text:h>
      <text:p text:style-name="P8">Notei que no seu <text:span text:style-name="Source_20_Text">:root</text:span> você repetiu o nome <text:span text:style-name="Source_20_Text">--destaque</text:span> para a cor azul e para a cor verde. Vamos ajustar os nomes para ficar mais claro? Altere o seu <text:span text:style-name="Source_20_Text">:root</text:span> para:</text:p>
      <text:p text:style-name="P11">CSS</text:p>
      <text:p text:style-name="P12"><text:soft-page-break/><text:span text:style-name="Source_20_Text">:root {</text:span></text:p>
      <text:p text:style-name="P12"><text:span text:style-name="Source_20_Text"><text:s text:c="4"/>--fundo-principal: #f5f5f5;</text:span></text:p>
      <text:p text:style-name="P12"><text:span text:style-name="Source_20_Text"><text:s text:c="4"/>--texto: #222222;</text:span></text:p>
      <text:p text:style-name="P12"><text:span text:style-name="Source_20_Text"><text:s text:c="4"/>--destaque: #0077ff; <text:s text:c="7"/>/* Azul do cabeçalho */</text:span></text:p>
      <text:p text:style-name="P12"><text:span text:style-name="Source_20_Text"><text:s text:c="4"/>--fundo-card: #ffffff;</text:span></text:p>
      <text:p text:style-name="P12"><text:span text:style-name="Source_20_Text"><text:s text:c="4"/>--entrada: #05c224; <text:s text:c="8"/>/* Verde para ganhos */</text:span></text:p>
      <text:p text:style-name="P12"><text:span text:style-name="Source_20_Text"><text:s text:c="4"/>--saida: #c40d0d; <text:s text:c="10"/>/* Vermelho para gastos */</text:span></text:p>
      <text:p text:style-name="P13"><text:span text:style-name="Source_20_Text">}</text:span></text:p>
      <text:p text:style-name="P8"><text:span text:style-name="T2">(Se mudar no </text:span><text:span text:style-name="Source_20_Text"><text:span text:style-name="T2">:root</text:span></text:span><text:span text:style-name="T2">, lembre de trocar no final do CSS </text:span><text:span text:style-name="Source_20_Text"><text:span text:style-name="T2">.card-incomes p { color: var(--entrada); }</text:span></text:span><text:span text:style-name="T2"> e </text:span><text:span text:style-name="Source_20_Text"><text:span text:style-name="T2">.card-expenses p { color: var(--saida); }</text:span></text:span><text:span text:style-name="T2">)</text:span>.</text:p>
      <text:h text:style-name="P10" text:outline-level="3">🚀 Próximo Passo</text:h>
      <text:p text:style-name="P8">Salve essas alterações, corrija a quebra de linha do <text:span text:style-name="Source_20_Text">body</text:span> e veja a mágica acontecer no seu navegador!</text:p>
      <text:p text:style-name="P8">Assim que os cartões estiverem bonitos e alinhados lado a lado, me avise para passarmos para a estilização do <text:span text:style-name="T1">Formulário</text:span> e da <text:span text:style-name="T1">Tabela de Histórico</text:span>. O que achou dessa distribuição?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9T11:28:32.953873493</meta:creation-date>
    <dc:date>2026-06-29T13:49:48.070297130</dc:date>
    <dc:creator>João António</dc:creator>
    <meta:editing-duration>PT2H21M16S</meta:editing-duration>
    <meta:editing-cycles>4</meta:editing-cycles>
    <meta:generator>LibreOffice/26.2.4.2$Linux_X86_64 LibreOffice_project/620$Build-2</meta:generator>
    <meta:document-statistic meta:table-count="0" meta:image-count="0" meta:object-count="0" meta:page-count="7" meta:paragraph-count="196" meta:word-count="1982" meta:character-count="12837" meta:non-whitespace-character-count="10382"/>
  </office:meta>
</office:document-meta>
</file>