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4%"/>
      <style:text-properties style:font-name="Google Sans Text"/>
    </style:style>
    <style:style style:name="P2" style:family="paragraph" style:parent-style-name="Heading_20_3">
      <style:paragraph-properties fo:margin-top="0cm" fo:margin-bottom="0.247cm" style:contextual-spacing="false" fo:line-height="114%"/>
      <style:text-properties style:font-name="Google Sans Text"/>
    </style:style>
    <style:style style:name="P3" style:family="paragraph" style:parent-style-name="Text_20_body">
      <style:paragraph-properties fo:margin-left="0cm" fo:margin-right="0cm" fo:line-height="114%" fo:text-indent="0cm" style:auto-text-indent="false"/>
      <style:text-properties style:font-name="Google Sans Text"/>
    </style:style>
    <style:style style:name="P4" style:family="paragraph" style:parent-style-name="Preformatted_20_Text">
      <style:paragraph-properties fo:margin-top="0cm" fo:margin-bottom="0.247cm" style:contextual-spacing="false" fo:line-height="114%"/>
      <style:text-properties style:font-name="Google Sans Text"/>
    </style:style>
    <style:style style:name="P5" style:family="paragraph" style:parent-style-name="Heading_20_3">
      <style:paragraph-properties fo:line-height="114%"/>
      <style:text-properties style:font-name="Google Sans Text"/>
    </style:style>
    <style:style style:name="P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7" style:family="paragraph" style:parent-style-name="Preformatted_20_Text">
      <style:paragraph-properties fo:margin-left="0cm" fo:margin-right="0cm" fo:margin-top="0cm" fo:margin-bottom="0cm" style:contextual-spacing="false" fo:line-height="114%" fo:text-indent="0cm" style:auto-text-indent="false"/>
      <style:text-properties style:font-name="Google Sans Text"/>
    </style:style>
    <style:style style:name="P8"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0" style:family="paragraph" style:parent-style-name="Heading_20_2">
      <style:paragraph-properties fo:margin-top="0cm" fo:margin-bottom="0.247cm" style:contextual-spacing="false" fo:line-height="114%"/>
      <style:text-properties style:font-name="Google Sans Text"/>
    </style:style>
    <style:style style:name="P11" style:family="paragraph" style:parent-style-name="Text_20_body" style:list-style-name="L1">
      <style:paragraph-properties fo:line-height="114%"/>
      <style:text-properties style:font-name="Google Sans Text"/>
    </style:style>
    <style:style style:name="P12" style:family="paragraph" style:parent-style-name="Text_20_body" style:list-style-name="L2">
      <style:paragraph-properties fo:line-height="114%"/>
      <style:text-properties style:font-name="Google Sans Text"/>
    </style:style>
    <style:style style:name="P13" style:family="paragraph" style:parent-style-name="Text_20_body" style:list-style-name="L3">
      <style:paragraph-properties fo:line-height="114%"/>
      <style:text-properties style:font-name="Google Sans Text"/>
    </style:style>
    <style:style style:name="P14" style:family="paragraph" style:parent-style-name="Text_20_body" style:list-style-name="L4">
      <style:paragraph-properties fo:line-height="114%"/>
      <style:text-properties style:font-name="Google Sans Text"/>
    </style:style>
    <style:style style:name="P15" style:family="paragraph" style:parent-style-name="Quotations">
      <style:paragraph-properties fo:margin-top="0cm" fo:margin-bottom="0.247cm" style:contextual-spacing="false" fo:line-height="114%"/>
      <style:text-properties style:font-name="Google Sans Text"/>
    </style:style>
    <style:style style:name="T1" style:family="text">
      <style:text-properties fo:font-weight="bold"/>
    </style:style>
    <style:style style:name="T2" style:family="text">
      <style:text-properties style:font-name="Google Sans"/>
    </style:style>
    <style:style style:name="T3" style:family="text">
      <style:text-properties style:font-name="Google Sans 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ine que o console do seu navegador é uma calculadora inteligente.</text:p>
      <text:p text:style-name="P1">Vamos começar com um desafio bem direto. Tente resolver esse primeiro:</text:p>
      <text:h text:style-name="P2" text:outline-level="3">Desafio 1: A Conta do Restaurante</text:h>
      <text:p text:style-name="P1">Você foi jantar com um amigo. A conta deu <text:span text:style-name="T1">R$ 80,00</text:span> e vocês decidiram dividir o valor igualmente entre os dois.</text:p>
      <text:p text:style-name="P1">No JavaScript, o código começou assim:</text:p>
      <text:p text:style-name="P3">JavaScript</text:p>
      <text:p text:style-name="P4"><text:span text:style-name="Source_20_Text">const totalConta = 80;</text:span></text:p>
      <text:p text:style-name="P4"><text:span text:style-name="Source_20_Text">const quantidadePessoas = 2;</text:span></text:p>
      <text:p text:style-name="P1">Para descobrir quanto cada um vai pagar, precisamos dividir o <text:span text:style-name="Source_20_Text">totalConta</text:span> pela <text:span text:style-name="Source_20_Text">quantidadePessoas</text:span>.</text:p>
      <text:p text:style-name="P1">Qual símbolo aritmético (<text:span text:style-name="Source_20_Text">+</text:span>, <text:span text:style-name="Source_20_Text">-</text:span>, <text:span text:style-name="Source_20_Text">*</text:span> ou <text:span text:style-name="Source_20_Text">/</text:span>) você colocaria no espaço em branco abaixo para fazer essa divisão?</text:p>
      <text:p text:style-name="P3">JavaScript</text:p>
      <text:p text:style-name="P4"><text:span text:style-name="Source_20_Text">const valorPorPessoa = totalConta ___ quantidadePessoas;</text:span></text:p>
      <text:p text:style-name="P1">E se você fizer essa conta de cabeça, qual será o número final que o JavaScript vai guardar dentro da variável <text:span text:style-name="Source_20_Text">valorPorPessoa</text:span>?</text:p>
      <text:p text:style-name="P1"/>
      <text:h text:style-name="P5" text:outline-level="3">Desafio 2: O Estoque da Loja</text:h>
      <text:p text:style-name="P1">Você é dono de uma loja de camisetas. O seu sistema diz que você tem <text:span text:style-name="T1">30 camisetas</text:span> no estoque. Hoje de manhã, você recebeu uma nova entrega do fornecedor com mais <text:span text:style-name="T1">15 camisetas</text:span>.</text:p>
      <text:p text:style-name="P1">O código começou assim:</text:p>
      <text:p text:style-name="P3">JavaScript</text:p>
      <text:p text:style-name="P4"><text:span text:style-name="Source_20_Text">const estoqueInicial = 30;</text:span></text:p>
      <text:p text:style-name="P4"><text:span text:style-name="Source_20_Text">const novasCamisetas = 15;</text:span></text:p>
      <text:p text:style-name="P1">Para descobrir o total de camisetas que você tem agora, qual operador matemático você usaria no espaço em branco?</text:p>
      <text:p text:style-name="P3">JavaScript</text:p>
      <text:p text:style-name="P4"><text:span text:style-name="Source_20_Text">const estoqueAtual = estoqueInicial ___ novasCamisetas;</text:span></text:p>
      <text:p text:style-name="P1">E qual será o valor final guardado em <text:span text:style-name="Source_20_Text">estoqueAtual</text:span>?</text:p>
      <text:h text:style-name="P5" text:outline-level="3"><text:soft-page-break/>Desafio 4: O Desconto do Cupom</text:h>
      <text:p text:style-name="P1">O mesmo cliente do desafio anterior acumulou <text:span text:style-name="T1">R$ 15,00</text:span> no carrinho. Mas ele tinha um cupom de desconto que garantia <text:span text:style-name="T1">R$ 3,00</text:span> de abatimento no valor final.</text:p>
      <text:p text:style-name="P1">O código começou assim:</text:p>
      <text:p text:style-name="P3">JavaScript</text:p>
      <text:p text:style-name="P4"><text:span text:style-name="Source_20_Text">const valorTotal = 15;</text:span></text:p>
      <text:p text:style-name="P4"><text:span text:style-name="Source_20_Text">const desconto = 3;</text:span></text:p>
      <text:p text:style-name="P1">Para descobrir o valor que o cliente realmente vai pagar depois do desconto, precisamos subtrair.</text:p>
      <text:p text:style-name="P1">Complete o código aplicando o operador de <text:span text:style-name="T1">subtração</text:span>:</text:p>
      <text:p text:style-name="P3">JavaScript</text:p>
      <text:p text:style-name="P4"><text:span text:style-name="Source_20_Text">const valorFinal = valorTotal ___ desconto;</text:span></text:p>
      <text:p text:style-name="P1">Qual será o resultado final impresso se usarmos o <text:span text:style-name="Source_20_Text">console.log(valorFinal)</text:span>?</text:p>
      <text:h text:style-name="P5" text:outline-level="3"><text:span text:style-name="T2">Desafio 5: O Resto da Divisão (</text:span><text:span text:style-name="Source_20_Text"><text:span text:style-name="T3">%</text:span></text:span><text:span text:style-name="T2"> Módulo)</text:span></text:h>
      <text:p text:style-name="P6">Este operador confunde porque o símbolo <text:span text:style-name="Source_20_Text"><text:span text:style-name="T3">%</text:span></text:span> <text:span text:style-name="T1">não significa porcentagem</text:span> na programação. Ele serve para pegar o <text:span text:style-name="T1">resto</text:span> que sobra de uma divisão inteira.</text:p>
      <text:p text:style-name="P6">Imagine que você tem <text:span text:style-name="T1">5 fatias de pizza</text:span> e quer dividir igualmente entre <text:span text:style-name="T1">2 amigos</text:span>.</text:p>
      <text:p text:style-name="P6">Cada amigo ganha 2 fatias inteiras (totalizando 4 fatias utilizadas). Sobrou <text:span text:style-name="T1">1</text:span> fatia na caixa, certo? Esse "1" é o resto!</text:p>
      <text:p text:style-name="P6">O código começa assim:</text:p>
      <text:p text:style-name="P6">JavaScript</text:p>
      <text:p text:style-name="P7"><text:span text:style-name="Source_20_Text"><text:span text:style-name="T3">const fatiasPizza = 5;</text:span></text:span></text:p>
      <text:p text:style-name="P7"><text:span text:style-name="Source_20_Text"><text:span text:style-name="T3">const amigos = 2;</text:span></text:span></text:p>
      <text:p text:style-name="P6">Para descobrir essa sobra em JavaScript, usamos o <text:span text:style-name="Source_20_Text"><text:span text:style-name="T3">%</text:span></text:span>:</text:p>
      <text:p text:style-name="P6">JavaScript</text:p>
      <text:p text:style-name="P7"><text:span text:style-name="Source_20_Text"><text:span text:style-name="T3">const sobra = fatiasPizza % amigos;</text:span></text:span></text:p>
      <text:p text:style-name="P7"><text:span text:style-name="Source_20_Text"><text:span text:style-name="T3">console.log(sobra); // Vai exibir: 1</text:span></text:span></text:p>
      <text:p text:style-name="P8">Agora é a sua vez:</text:p>
      <text:p text:style-name="P6">Imagine que você tem <text:span text:style-name="T1">11 moedas</text:span> e quer dividir igualmente entre <text:span text:style-name="T1">2 cofres</text:span>. Se você dividir de forma justa, quantas moedas vão sobrar do lado de fora?</text:p>
      <text:p text:style-name="P6">Complete o código e descubra o resultado:</text:p>
      <text:p text:style-name="P6"><text:soft-page-break/>JavaScript</text:p>
      <text:p text:style-name="P7"><text:span text:style-name="Source_20_Text"><text:span text:style-name="T3">const moedas = 11;</text:span></text:span></text:p>
      <text:p text:style-name="P7"><text:span text:style-name="Source_20_Text"><text:span text:style-name="T3">const cofres = 2;</text:span></text:span></text:p>
      <text:p text:style-name="P7"><text:span text:style-name="Source_20_Text"><text:span text:style-name="T3">const resultadoSobra = moedas % cofres;</text:span></text:span></text:p>
      <text:p text:style-name="P7"><text:span text:style-name="Source_20_Text"><text:span text:style-name="T3">console.log(resultadoSobra); // Quanto vai aparecer aqui?</text:span></text:span></text:p>
      <text:h text:style-name="P9" text:outline-level="3">Desafio 6: Elevando ao Quadrado ( Exponenciação)</text:h>
      <text:p text:style-name="P6">O operador serve para elevar um número à potência de outro (multiplicar um número por ele mesmo várias vezes).</text:p>
      <text:p text:style-name="P6">Por exemplo, se você quiser calcular $3^2$ (3 elevado ao quadrado, que é $3 \times 3$):</text:p>
      <text:p text:style-name="P6">JavaScript</text:p>
      <text:p text:style-name="P7"><text:span text:style-name="Source_20_Text"><text:span text:style-name="T3">const base = 3;</text:span></text:span></text:p>
      <text:p text:style-name="P7"><text:span text:style-name="Source_20_Text"><text:span text:style-name="T3">const expoente = 2;</text:span></text:span></text:p>
      <text:p text:style-name="P7"><text:span text:style-name="Source_20_Text"><text:span text:style-name="T3">const resultadoPotencia = base ** expoente;</text:span></text:span></text:p>
      <text:p text:style-name="P7"><text:span text:style-name="Source_20_Text"><text:span text:style-name="T3">console.log(resultadoPotencia); // Exibe: 9</text:span></text:span></text:p>
      <text:p text:style-name="P8">O seu desafio:</text:p>
      <text:p text:style-name="P6">Como você escreveria o código para descobrir quanto é <text:span text:style-name="T1">5 elevado ao cubo</text:span> ($5^3$, ou seja, $5 \times 5 \times 5$)?</text:p>
      <text:p text:style-name="P6">Tente montar a estrutura parecida com as anteriores e me diga qual o resultado final!</text:p>
      <text:p text:style-name="P1"/>
      <text:p text:style-name="P6">No mundo real, você dificilmente vai criar um programa para resolver contas de matemática da escola. Em sistemas reais, os operadores aritméticos são os motores por trás de funcionalidades que você usa todos os dias em aplicativos e sites.</text:p>
      <text:p text:style-name="P1">Aqui estão alguns exemplos práticos de onde eles entram no dia a dia de um desenvolvedor:</text:p>
      <text:h text:style-name="P10" text:outline-level="2">1. Carrinho de Compras e E-commerce (Os mais comuns)</text:h>
      <text:p text:style-name="P1">Qualquer site de vendas (como Amazon ou Mercado Livre) é puramente baseado em operadores aritméticos:</text:p>
      <text:list text:style-name="L1">
        <text:list-item>
          <text:p text:style-name="P11"><text:span text:style-name="T1">Multiplicação (</text:span><text:span text:style-name="Source_20_Text"><text:span text:style-name="T1">*</text:span></text:span><text:span text:style-name="T1">):</text:span> Se você adiciona 3 unidades de um produto no carrinho, o sistema faz: <text:span text:style-name="Source_20_Text">quantidade * precoUnitario</text:span>.</text:p>
        </text:list-item>
        <text:list-item>
          <text:p text:style-name="P11"><text:span text:style-name="T1">Subtração (</text:span><text:span text:style-name="Source_20_Text"><text:span text:style-name="T1">-</text:span></text:span><text:span text:style-name="T1">):</text:span> Quando você digita um cupom de desconto: <text:span text:style-name="Source_20_Text">valorTotal - valorCupom</text:span>.</text:p>
        </text:list-item>
        <text:list-item>
          <text:p text:style-name="P11"><text:soft-page-break/><text:span text:style-name="T1">Adição (</text:span><text:span text:style-name="Source_20_Text"><text:span text:style-name="T1">+</text:span></text:span><text:span text:style-name="T1">):</text:span> Para somar o valor do frete ao total da compra: <text:span text:style-name="Source_20_Text">valorProdutos + frete</text:span>.</text:p>
        </text:list-item>
      </text:list>
      <text:h text:style-name="P10" text:outline-level="2">2. Redes Sociais e Aplicativos (Paginação e Feeds)</text:h>
      <text:list text:style-name="L2">
        <text:list-item>
          <text:p text:style-name="P12"><text:span text:style-name="T1">Divisão (</text:span><text:span text:style-name="Source_20_Text"><text:span text:style-name="T1">/</text:span></text:span><text:span text:style-name="T1">):</text:span> Se um banco de dados tem 100 fotos para mostrar e o aplicativo só exibe 10 fotos por página, o sistema usa a divisão para calcular quantas páginas o site vai ter (<text:span text:style-name="Source_20_Text">100 / 10 = 10 páginas</text:span>).</text:p>
        </text:list-item>
        <text:list-item>
          <text:p text:style-name="P12"><text:span text:style-name="T1">Módulo (</text:span><text:span text:style-name="Source_20_Text"><text:span text:style-name="T1">%</text:span></text:span><text:span text:style-name="T1">):</text:span> Muito usado para criar designs visuais. Sabe quando você vê uma tabela onde uma linha é cinza claro e a próxima é branca, alternando? O programador usa o <text:span text:style-name="Source_20_Text">% 2</text:span> para descobrir se a linha é par ou ímpar e mudar a cor dela.</text:p>
        </text:list-item>
      </text:list>
      <text:h text:style-name="P10" text:outline-level="2">3. Jogos (Games)</text:h>
      <text:p text:style-name="P1">Seja um jogo de celular simples ou um grande jogo 3D:</text:p>
      <text:list text:style-name="L3">
        <text:list-item>
          <text:p text:style-name="P13"><text:span text:style-name="T1">Subtração (</text:span><text:span text:style-name="Source_20_Text"><text:span text:style-name="T1">-</text:span></text:span><text:span text:style-name="T1">):</text:span> Quando o jogador toma um tiro: <text:span text:style-name="Source_20_Text">vidaAtual - danoDoTiro</text:span>.</text:p>
        </text:list-item>
        <text:list-item>
          <text:p text:style-name="P13"><text:span text:style-name="T1">Adição (</text:span><text:span text:style-name="Source_20_Text"><text:span text:style-name="T1">+</text:span></text:span><text:span text:style-name="T1">):</text:span> Quando ele coleta moedas ou ganha pontos de experiência (<text:span text:style-name="Source_20_Text">XP</text:span>).</text:p>
        </text:list-item>
        <text:list-item>
          <text:p text:style-name="P13"><text:span text:style-name="T1">Exponenciação ():</text:span> Usada para calcular o ganho de nível. Jogos de RPG usam fórmulas matemáticas para ditar que passar do nível 2 para o 3 exige muito mais pontos do que passar do 1 para o 2.</text:p>
        </text:list-item>
      </text:list>
      <text:h text:style-name="P10" text:outline-level="2">4. Aplicativos de Finanças e Uber</text:h>
      <text:list text:style-name="L4">
        <text:list-item>
          <text:p text:style-name="P14"><text:span text:style-name="T1">Multiplicação e Adição:</text:span> O Uber calcula o preço da sua corrida usando uma fórmula aritmética: <text:span text:style-name="Source_20_Text">tarifaBase + (distancia * valorPorKm) + (tempo * valorPorMinuto)</text:span>.</text:p>
        </text:list-item>
      </text:list>
      <text:p text:style-name="P15">💡 <text:span text:style-name="T1">Resumo:</text:span> O JavaScript usa a matemática não para te dar uma nota em uma prova, mas para <text:span text:style-name="T1">atualizar estados</text:span> na tela (mudar números, preços, pontos e posições).</text:p>
      <text:p text:style-name="P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25T23:21:18.255979019</meta:creation-date>
    <dc:date>2026-06-26T00:09:09.622113638</dc:date>
    <dc:creator>João António</dc:creator>
    <meta:editing-duration>PT9M22S</meta:editing-duration>
    <meta:editing-cycles>3</meta:editing-cycles>
    <meta:generator>LibreOffice/26.2.4.2$Linux_X86_64 LibreOffice_project/620$Build-2</meta:generator>
    <meta:document-statistic meta:table-count="0" meta:image-count="0" meta:object-count="0" meta:page-count="4" meta:paragraph-count="83" meta:word-count="919" meta:character-count="5341" meta:non-whitespace-character-count="4514"/>
  </office:meta>
</office:document-meta>
</file>