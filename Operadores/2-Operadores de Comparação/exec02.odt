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</style:style>
    <style:style style:name="P2" style:family="paragraph" style:parent-style-name="Heading_20_3">
      <style:paragraph-properties fo:margin-top="0cm" fo:margin-bottom="0.247cm" style:contextual-spacing="false" fo:line-height="114%"/>
    </style:style>
    <style:style style:name="P3" style:family="paragraph" style:parent-style-name="Text_20_body">
      <style:paragraph-properties fo:margin-left="0cm" fo:margin-right="0cm" fo:line-height="114%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4%"/>
    </style:style>
    <style:style style:name="P5" style:family="paragraph" style:parent-style-name="Heading_20_3">
      <style:paragraph-properties fo:line-height="114%"/>
    </style:style>
    <style:style style:name="P6" style:family="paragraph" style:parent-style-name="Text_20_body" style:list-style-name="L1">
      <style:paragraph-properties fo:line-height="114%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<text:span text:style-name="T1">Operadores de Comparação</text:span> (ou relacionais) servem para fazer perguntas ao JavaScript. O computador vai olhar para o que você escreveu, avaliar a situação e responder de uma única forma: ou <text:span text:style-name="Source_20_Text"><text:span text:style-name="T1">true</text:span></text:span> (verdadeiro) ou <text:span text:style-name="Source_20_Text"><text:span text:style-name="T1">false</text:span></text:span> (falso).</text:p>
      <text:p text:style-name="P1">Vamos começar do jeito que você gostou: do mais simples, subindo um degrau por vez.</text:p>
      <text:h text:style-name="P2" text:outline-level="3">Desafio 1: O detector de maioridade (<text:span text:style-name="Source_20_Text">&gt;</text:span>)</text:h>
      <text:p text:style-name="P1">Imagine que você está criando a tela de entrada de um site de jogos. Para entrar, o usuário precisa ter <text:span text:style-name="T1">mais de 18 anos</text:span>.</text:p>
      <text:p text:style-name="P1">O código recebeu a idade que o usuário digitou:</text:p>
      <text:p text:style-name="P3">JavaScript</text:p>
      <text:p text:style-name="P4"><text:span text:style-name="Source_20_Text">const idadeUsuario = 20;</text:span></text:p>
      <text:p text:style-name="P1">Para o JavaScript testar se essa idade é <text:span text:style-name="T1">maior que</text:span> 18, usamos o símbolo <text:span text:style-name="Source_20_Text">&gt;</text:span>.</text:p>
      <text:p text:style-name="P3">JavaScript</text:p>
      <text:p text:style-name="P4"><text:span text:style-name="Source_20_Text">const podeEntrar = idadeUsuario &gt; 18;</text:span></text:p>
      <text:p text:style-name="P4"><text:span text:style-name="Source_20_Text">console.log(podeEntrar);</text:span></text:p>
      <text:p text:style-name="P1">Se você rodar esse código, o que o <text:span text:style-name="Source_20_Text">console.log</text:span> vai responder na tela: <text:span text:style-name="Source_20_Text"><text:span text:style-name="T1">true</text:span></text:span> ou <text:span text:style-name="Source_20_Text"><text:span text:style-name="T1">false</text:span></text:span>?</text:p>
      <text:h text:style-name="P5" text:outline-level="3">Desafio 2: A carteira de motorista (<text:span text:style-name="Source_20_Text">&gt;=</text:span>)</text:h>
      <text:p text:style-name="P1">Agora a regra mudou um pouco. Para tirar a carteira de motorista, a pessoa precisa ter <text:span text:style-name="T1">18 anos ou mais</text:span>. Ou seja, se ela tiver exatamente 18 anos, ela já pode!</text:p>
      <text:p text:style-name="P1">Se usarmos apenas o <text:span text:style-name="Source_20_Text">&gt;</text:span>, quem tem 18 fica de fora (porque 18 não é maior que 18). Por isso, usamos o operador <text:span text:style-name="T1">maior ou igual</text:span> (<text:span text:style-name="Source_20_Text">&gt;=</text:span>).</text:p>
      <text:p text:style-name="P1">Olha esse caso:</text:p>
      <text:p text:style-name="P3">JavaScript</text:p>
      <text:p text:style-name="P4"><text:span text:style-name="Source_20_Text">const idadeCandidato = 18;</text:span></text:p>
      <text:p text:style-name="P4"><text:span text:style-name="Source_20_Text">const resultadoExame = idadeCandidato &gt;= 18;</text:span></text:p>
      <text:p text:style-name="P4"><text:span text:style-name="Source_20_Text">console.log(resultadoExame);</text:span></text:p>
      <text:p text:style-name="P1">E agora? O JavaScript vai dizer <text:span text:style-name="Source_20_Text"><text:span text:style-name="T1">true</text:span></text:span> ou <text:span text:style-name="Source_20_Text"><text:span text:style-name="T1">false</text:span></text:span> para esse candidato de 18 anos?</text:p>
      <text:p text:style-name="P1">Agora vamos subir um degrau e falar sobre os operadores de <text:span text:style-name="T1">igualdade</text:span>. É aqui que a maioria dos iniciantes escorrega, mas você vai tirar de letra.</text:p>
      <text:p text:style-name="P1">No JavaScript, nós temos duas formas de perguntar se uma coisa é igual a outra:</text:p>
      <text:list text:style-name="L1">
        <text:list-item>
          <text:p text:style-name="P6"><text:span text:style-name="Source_20_Text">==</text:span> (Igualdade Ampla): Ele olha <text:span text:style-name="T1">apenas para o valor</text:span>, ignorando se é um texto ou um número.</text:p>
        </text:list-item>
        <text:list-item>
          <text:p text:style-name="P6"><text:span text:style-name="Source_20_Text">===</text:span> (Igualdade Estrita): Ele é super rígido. Ele olha o <text:span text:style-name="T1">valor E o tipo do dado</text:span> (se um for texto e o outro número, ele diz que é falso).</text:p>
        </text:list-item>
      </text:list>
      <text:p text:style-name="P1">Veja esses dois desafios abaixo e tente adivinhar o que o JavaScript vai responder para cada um:</text:p>
      <text:h text:style-name="P2" text:outline-level="3"><text:soft-page-break/>Desafio 3: A Igualdade Ampla (<text:span text:style-name="Source_20_Text">==</text:span>)</text:h>
      <text:p text:style-name="P3">JavaScript</text:p>
      <text:p text:style-name="P4"><text:span text:style-name="Source_20_Text">const numeroSecreto = 5;</text:span></text:p>
      <text:p text:style-name="P4"><text:span text:style-name="Source_20_Text">const respostaUsuario = "5"; // Repare que está entre aspas, ou seja, é um Texto (String)</text:span></text:p>
      <text:p text:style-name="P4"><text:span text:style-name="Source_20_Text">const resultado1 = (numeroSecreto == respostaUsuario);</text:span></text:p>
      <text:p text:style-name="P4"><text:span text:style-name="Source_20_Text">console.log(resultado1); // Vai dar true ou false?</text:span></text:p>
      <text:p text:style-name="P1">No primeiro deu <text:span text:style-name="Source_20_Text">true</text:span> porque o <text:span text:style-name="Source_20_Text">==</text:span> converteu o texto para número por baixo dos panos só para comparar o valor. No segundo deu <text:span text:style-name="Source_20_Text">false</text:span> porque o <text:span text:style-name="Source_20_Text">===</text:span> viu que um era do tipo <text:span text:style-name="T2">Number</text:span> e o outro do tipo <text:span text:style-name="T2">String</text:span>. É por isso que no dia a dia os programadores sempre usam o <text:span text:style-name="Source_20_Text">===</text:span> para evitar bugs invisíveis!</text:p>
      <text:p text:style-name="P1">Para fechar o grupo dos operadores de comparação com chave de ouro, vamos ver o oposto da igualdade: o operador de <text:span text:style-name="T1">diferença</text:span> (<text:span text:style-name="Source_20_Text">!==</text:span>).</text:p>
      <text:p text:style-name="P1">Ele serve para perguntar: <text:span text:style-name="T2">"Esse valor é diferente daquele?"</text:span> Se for diferente, ele responde <text:span text:style-name="Source_20_Text">true</text:span>. Se for igual, ele responde <text:span text:style-name="Source_20_Text">false</text:span>.</text:p>
      <text:h text:style-name="P2" text:outline-level="3">Desafio 5: Validação de Senha (<text:span text:style-name="Source_20_Text">!==</text:span>)</text:h>
      <text:p text:style-name="P1">Imagine que o seu usuário está mudando a senha do aplicativo. Para o sistema aceitar, a <text:span text:style-name="Source_20_Text">novaSenha</text:span> precisa ser <text:span text:style-name="T1">diferente</text:span> da <text:span text:style-name="Source_20_Text">senhaAntiga</text:span>.</text:p>
      <text:p text:style-name="P1">Olha este cenário:</text:p>
      <text:p text:style-name="P3">JavaScript</text:p>
      <text:p text:style-name="P4"><text:span text:style-name="Source_20_Text">const senhaAntiga = "banana123";</text:span></text:p>
      <text:p text:style-name="P4"><text:span text:style-name="Source_20_Text">const novaSenha = "banana123";</text:span></text:p>
      <text:p text:style-name="P4"/>
      <text:p text:style-name="P4"><text:span text:style-name="Source_20_Text">// O símbolo !== pergunta: "É diferente?"</text:span></text:p>
      <text:p text:style-name="P4"><text:span text:style-name="Source_20_Text">const senhaEhValida = (novaSenha !== senhaAntiga);</text:span></text:p>
      <text:p text:style-name="P4"><text:span text:style-name="Source_20_Text">console.log(senhaEhValida);</text:span></text:p>
      <text:p text:style-name="P1">Se o usuário digitou exatamente a mesma senha nos dois campos, o que o <text:span text:style-name="Source_20_Text">console.log</text:span> vai responder para a variável <text:span text:style-name="Source_20_Text">senhaEhValida</text:span>: <text:span text:style-name="Source_20_Text"><text:span text:style-name="T1">true</text:span></text:span> ou <text:span text:style-name="Source_20_Text"><text:span text:style-name="T1">false</text:span></text:span>?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0:43:11.384613624</dc:date>
    <dc:creator>João António</dc:creator>
    <meta:editing-duration>PT36M41S</meta:editing-duration>
    <meta:editing-cycles>5</meta:editing-cycles>
    <meta:generator>LibreOffice/26.2.4.2$Linux_X86_64 LibreOffice_project/620$Build-2</meta:generator>
    <meta:document-statistic meta:table-count="0" meta:image-count="0" meta:object-count="0" meta:page-count="2" meta:paragraph-count="45" meta:word-count="557" meta:character-count="3182" meta:non-whitespace-character-count="2672"/>
  </office:meta>
</office:document-meta>
</file>