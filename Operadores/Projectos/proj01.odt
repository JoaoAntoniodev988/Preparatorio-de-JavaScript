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Google Sans Flex" svg:font-family="'Google Sans Flex', 'Google Sans', 'Helvetica Neue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line-height="114%"/>
      <style:text-properties officeooo:rsid="001ef461"/>
    </style:style>
    <style:style style:name="P2" style:family="paragraph" style:parent-style-name="Heading_20_2">
      <style:paragraph-properties fo:margin-top="0cm" fo:margin-bottom="0.247cm" style:contextual-spacing="false" fo:line-height="114%"/>
      <style:text-properties officeooo:rsid="001ef461"/>
    </style:style>
    <style:style style:name="P3" style:family="paragraph" style:parent-style-name="Standard">
      <style:paragraph-properties fo:line-height="114%"/>
      <style:text-properties officeooo:rsid="001ef461"/>
    </style:style>
    <style:style style:name="P4" style:family="paragraph" style:parent-style-name="Preformatted_20_Text">
      <style:paragraph-properties fo:margin-top="0cm" fo:margin-bottom="0.247cm" style:contextual-spacing="false" fo:line-height="114%"/>
      <style:text-properties officeooo:rsid="001ef461"/>
    </style:style>
    <style:style style:name="P5" style:family="paragraph" style:parent-style-name="Heading_20_3">
      <style:paragraph-properties fo:line-height="114%"/>
      <style:text-properties officeooo:rsid="001ef461"/>
    </style:style>
    <style:style style:name="P6" style:family="paragraph" style:parent-style-name="Text_20_body" style:list-style-name="L1">
      <style:paragraph-properties fo:line-height="114%"/>
      <style:text-properties officeooo:rsid="001ef461"/>
    </style:style>
    <style:style style:name="P7" style:family="paragraph" style:parent-style-name="Text_20_body">
      <style:paragraph-properties fo:line-height="114%"/>
      <style:text-properties fo:font-variant="normal" fo:text-transform="none" fo:color="#1f1f1f" loext:opacity="100%" style:font-name="Google Sans Flex" fo:font-size="12.75pt" fo:letter-spacing="normal" fo:font-style="normal" fo:font-weight="normal" officeooo:rsid="001ef461"/>
    </style:style>
    <style:style style:name="P8" style:family="paragraph" style:parent-style-name="Text_20_body">
      <style:paragraph-properties fo:line-height="114%"/>
      <style:text-properties fo:color="#1f1f1f" loext:opacity="100%" style:font-name="Google Sans Flex" fo:font-size="12.75pt" officeooo:rsid="001ef461"/>
    </style:style>
    <style:style style:name="P9" style:family="paragraph" style:parent-style-name="Heading_20_3">
      <style:paragraph-properties fo:margin-top="0cm" fo:margin-bottom="0.247cm" style:contextual-spacing="false" fo:line-height="114%"/>
      <style:text-properties fo:color="#1f1f1f" loext:opacity="100%" style:font-name="Google Sans Flex" fo:font-size="12.75pt" fo:font-weight="normal" officeooo:rsid="001ef461"/>
    </style:style>
    <style:style style:name="P10" style:family="paragraph" style:parent-style-name="Text_20_body">
      <style:paragraph-properties fo:margin-left="0cm" fo:margin-right="0cm" fo:line-height="114%" fo:text-indent="0cm" style:auto-text-indent="false"/>
      <style:text-properties fo:color="#1f1f1f" loext:opacity="100%" style:font-name="Google Sans Flex" fo:font-size="12.75pt" officeooo:rsid="001ef461"/>
    </style:style>
    <style:style style:name="P11" style:family="paragraph" style:parent-style-name="Preformatted_20_Text">
      <style:paragraph-properties fo:margin-top="0cm" fo:margin-bottom="0.247cm" style:contextual-spacing="false" fo:line-height="114%"/>
      <style:text-properties fo:color="#1f1f1f" loext:opacity="100%" style:font-name="Google Sans Flex" fo:font-size="12.75pt" officeooo:rsid="001ef461"/>
    </style:style>
    <style:style style:name="P12" style:family="paragraph" style:parent-style-name="Text_20_body">
      <style:paragraph-properties fo:line-height="114%"/>
      <style:text-properties fo:font-variant="normal" fo:text-transform="none" fo:color="#1f1f1f" loext:opacity="100%" style:font-name="Google Sans Text" fo:font-size="12.75pt" fo:letter-spacing="normal" fo:font-style="normal" fo:font-weight="normal" officeooo:rsid="001ef461"/>
    </style:style>
    <style:style style:name="P13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fo:color="#1f1f1f" loext:opacity="100%" style:font-name="Google Sans Flex" fo:font-size="12.75pt" officeooo:rsid="001ef461"/>
    </style:style>
    <style:style style:name="P14" style:family="paragraph" style:parent-style-name="Heading_20_3">
      <style:paragraph-properties fo:margin-left="0cm" fo:margin-right="0cm" fo:margin-top="0cm" fo:margin-bottom="0.247cm" style:contextual-spacing="false" fo:line-height="114%" fo:text-indent="0cm" style:auto-text-indent="false"/>
      <style:text-properties fo:color="#1f1f1f" loext:opacity="100%" style:font-name="Google Sans Flex" fo:font-size="12.75pt" fo:font-weight="normal" officeooo:rsid="001ef461"/>
    </style:style>
    <style:style style:name="P15" style:family="paragraph" style:parent-style-name="Standard">
      <style:paragraph-properties fo:line-height="114%"/>
      <style:text-properties fo:font-variant="normal" fo:text-transform="none" fo:color="#1f1f1f" loext:opacity="100%" style:font-name="Google Sans Flex" fo:font-size="12.75pt" fo:letter-spacing="normal" fo:font-style="normal" fo:font-weight="normal" officeooo:rsid="001ef461"/>
    </style:style>
    <style:style style:name="P16" style:family="paragraph" style:parent-style-name="Heading_20_3">
      <style:paragraph-properties fo:line-height="114%"/>
      <style:text-properties fo:font-variant="normal" fo:text-transform="none" fo:color="#1f1f1f" loext:opacity="100%" style:font-name="Google Sans Flex" fo:font-size="12.75pt" fo:letter-spacing="normal" fo:font-style="normal" fo:font-weight="normal" officeooo:rsid="001ef461"/>
    </style:style>
    <style:style style:name="P17" style:family="paragraph" style:parent-style-name="Text_20_body" style:list-style-name="L2">
      <style:paragraph-properties fo:line-height="114%"/>
      <style:text-properties fo:color="#1f1f1f" loext:opacity="100%" style:font-name="Google Sans Flex" fo:font-size="12.75pt" officeooo:rsid="001ef461"/>
    </style:style>
    <style:style style:name="P18" style:family="paragraph" style:parent-style-name="Text_20_body" style:list-style-name="L3">
      <style:paragraph-properties fo:line-height="114%"/>
      <style:text-properties fo:color="#1f1f1f" loext:opacity="100%" style:font-name="Google Sans Flex" fo:font-size="12.75pt" officeooo:rsid="001ef461"/>
    </style:style>
    <style:style style:name="T1" style:family="text">
      <style:text-properties fo:font-weight="bold"/>
    </style:style>
    <style:style style:name="T2" style:family="text">
      <style:text-properties style:font-name="Google Sans Text"/>
    </style:style>
    <style:style style:name="T3" style:family="text">
      <style:text-properties style:font-name="Google Sans Text" fo:font-weight="bold"/>
    </style:style>
    <style:style style:name="T4" style:family="text">
      <style:text-properties fo:font-family="'Google Sans', sans-serif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ra, que notícia excelente! Ver esse processo de "desfragmentação" do código na mente é a melhor parte de aprender a programar. E você está coberto de razão: você já absorveu uma quantidade enorme de conceitos fundamentais.</text:p>
      <text:p text:style-name="P1">Estudar teoria sem aplicar cansa, então colocar a mão na massa com projetos reais é o passo perfeito agora.</text:p>
      <text:p text:style-name="P1">Vamos começar com um <text:span text:style-name="T1">Mini-Projeto Educacional</text:span> que você pode simular direto no seu console. Vamos criar o mecanismo de lógica por trás de um <text:span text:style-name="T1">Checkout de E-commerce (Carrinho de Compras)</text:span> com cupom de desconto e frete grátis.</text:p>
      <text:p text:style-name="P1">Aqui nós vamos misturar aritméticos, comparação, lógicos, ternários e atribuição!</text:p>
      <text:h text:style-name="P2" text:outline-level="2">🛒 Projeto 1: O Mini-Checkout Inteligente</text:h>
      <text:p text:style-name="P1">Imagine que estamos programando o carrinho de compras de uma loja de roupas. O cliente está comprando algumas peças, tem um cupom de desconto e o sistema precisa decidir o preço final e se o frete será grátis.</text:p>
      <text:p text:style-name="P1">Olha o esqueleto do nosso sistema abaixo:</text:p>
      <text:p text:style-name="P3">JavaScript</text:p>
      <text:p text:style-name="P4"><text:span text:style-name="Source_20_Text">// 1. Dados da Compra (Entrada de dados)</text:span></text:p>
      <text:p text:style-name="P4"><text:span text:style-name="Source_20_Text">let valorSubtotal = 120; <text:s text:c="6"/>// O valor das roupas que ele escolheu</text:span></text:p>
      <text:p text:style-name="P4"><text:span text:style-name="Source_20_Text">const cupomDesconto = "QUERO10"; // O cupom que ele digitou no campo</text:span></text:p>
      <text:p text:style-name="P4"><text:span text:style-name="Source_20_Text">const ehClientePremium = false; <text:s/>// Se ele paga a assinatura VIP da loja</text:span></text:p>
      <text:p text:style-name="P4"/>
      <text:p text:style-name="P4"><text:span text:style-name="Source_20_Text">// 2. Aplicando o Cupom de Desconto (Operador de Comparação e Atribuição)</text:span></text:p>
      <text:p text:style-name="P4"><text:span text:style-name="Source_20_Text">// Se o cupom for igual a "QUERO10", ele ganha 10 reais de desconto. Caso contrário, 0.</text:span></text:p>
      <text:p text:style-name="P4"><text:span text:style-name="Source_20_Text">const desconto = (cupomDesconto === "QUERO10") ? 10 : 0;</text:span></text:p>
      <text:p text:style-name="P4"><text:span text:style-name="Source_20_Text">valorSubtotal -= desconto; // Atualiza o subtotal subtraindo o desconto</text:span></text:p>
      <text:p text:style-name="P4"/>
      <text:p text:style-name="P4"><text:span text:style-name="Source_20_Text">// 3. Regra do Frete Grátis (Operadores Lógicos e de Comparação)</text:span></text:p>
      <text:p text:style-name="P4"><text:span text:style-name="Source_20_Text">// O frete é grátis se o valor final for maior ou igual a 100 OU se o cliente for Premium.</text:span></text:p>
      <text:p text:style-name="P4"><text:span text:style-name="Source_20_Text">const ganhouFreteGratis = (valorSubtotal &gt;= 100) || ehClientePremium;</text:span></text:p>
      <text:p text:style-name="P4"/>
      <text:p text:style-name="P4"><text:span text:style-name="Source_20_Text">// 4. Calculando o Valor do Frete (Operador Ternário)</text:span></text:p>
      <text:p text:style-name="P4"><text:span text:style-name="Source_20_Text">// Se ganhou frete grátis, o valor é 0. Se não, o frete custa 15 reais.</text:span></text:p>
      <text:p text:style-name="P4"><text:span text:style-name="Source_20_Text">const valorFrete = ganhouFreteGratis ? 0 : 15;</text:span></text:p>
      <text:p text:style-name="P4"/>
      <text:p text:style-name="P4"><text:span text:style-name="Source_20_Text">// 5. Total Final (Operador Aritmético)</text:span></text:p>
      <text:p text:style-name="P4"><text:span text:style-name="Source_20_Text">const totalPagar = valorSubtotal + valorFrete;</text:span></text:p>
      <text:p text:style-name="P4"/>
      <text:p text:style-name="P4"><text:soft-page-break/><text:span text:style-name="Source_20_Text">// --- HORA DO Veredito ---</text:span></text:p>
      <text:p text:style-name="P4"><text:span text:style-name="Source_20_Text">console.log("Valor das roupas com desconto: R$", valorSubtotal);</text:span></text:p>
      <text:p text:style-name="P4"><text:span text:style-name="Source_20_Text">console.log("Ganhou frete grátis?", ganhouFreteGratis);</text:span></text:p>
      <text:p text:style-name="P4"><text:span text:style-name="Source_20_Text">console.log("Valor final do frete: R$", valorFrete);</text:span></text:p>
      <text:p text:style-name="P4"><text:span text:style-name="Source_20_Text">console.log("TOTAL A PAGAR: R$", totalPagar);</text:span></text:p>
      <text:h text:style-name="P5" text:outline-level="3">Seu Desafio como Desenvolvedor:</text:h>
      <text:p text:style-name="P1">Olhando atentamente as regras que o código executa passo a passo, me diga:</text:p>
      <text:list text:style-name="L1">
        <text:list-item>
          <text:p text:style-name="P6">Qual será o valor da variável <text:span text:style-name="Source_20_Text">valorSubtotal</text:span> após o cupom ser aplicado?</text:p>
        </text:list-item>
        <text:list-item>
          <text:p text:style-name="P6">A variável <text:span text:style-name="Source_20_Text">ganhouFreteGratis</text:span> vai resultar em <text:span text:style-name="Source_20_Text">true</text:span> ou <text:span text:style-name="Source_20_Text">false</text:span>?</text:p>
        </text:list-item>
        <text:list-item>
          <text:p text:style-name="P6">Qual será o valor impresso no <text:span text:style-name="Source_20_Text"><text:span text:style-name="T1">TOTAL A PAGAR</text:span></text:span> no final de tudo?</text:p>
        </text:list-item>
      </text:list>
      <text:p text:style-name="P1">Tente rodar esse código na sua mente seguindo o fluxo das variáveis. Se precisar, pode rascunhar! Qual é o resultado desse nosso primeiro sistema?</text:p>
      <text:p text:style-name="P1"/>
      <text:p text:style-name="P7">Tenho uma pergunta esse exercicos deve ser resolvido de uma unica vez ou faseadamente?</text:p>
      <text:p text:style-name="P7"/>
      <text:p text:style-name="P7">Você deve resolver <text:span text:style-name="T1">faseadamente</text:span>, exatamente da mesma forma que o computador faz!</text:p>
      <text:p text:style-name="P8">Tentar resolver tudo de uma vez só é o caminho mais rápido para dar um nó na cabeça. O segredo da programação é pegar um problemão e dividir em pequenos pedacinhos fáceis de resolver.</text:p>
      <text:p text:style-name="P8">Vamos fazer juntos, fase por fase. Eu te ajudo a guiar os passos:</text:p>
      <text:h text:style-name="P9" text:outline-level="3">🚀 Fase 1: O Cupom de Desconto</text:h>
      <text:p text:style-name="P8">Olha apenas para esse pedaço do código:</text:p>
      <text:p text:style-name="P10">JavaScript</text:p>
      <text:p text:style-name="P11"><text:span text:style-name="Source_20_Text">let valorSubtotal = 120; <text:s text:c="6"/></text:span></text:p>
      <text:p text:style-name="P11"><text:span text:style-name="Source_20_Text">const cupomDesconto = "QUERO10"; </text:span></text:p>
      <text:p text:style-name="P11"/>
      <text:p text:style-name="P11"><text:span text:style-name="Source_20_Text">const desconto = (cupomDesconto === "QUERO10") ? 10 : 0;</text:span></text:p>
      <text:p text:style-name="P11"><text:span text:style-name="Source_20_Text">valorSubtotal -= desconto; </text:span></text:p>
      <text:p text:style-name="P8"><text:soft-page-break/><text:span text:style-name="T1">Sua missão na Fase 1:</text:span> O cupom que o cliente digitou é <text:span text:style-name="Source_20_Text">"QUERO10"</text:span>. Olhando o operador ternário, de quanto vai ser o <text:span text:style-name="Source_20_Text">desconto</text:span> dele? E qual vai ser o novo valor da variável <text:span text:style-name="Source_20_Text">valorSubtotal</text:span> após a subtração?</text:p>
      <text:p text:style-name="P7">110</text:p>
      <text:p text:style-name="P12">Perfeito! É exatamente isso.</text:p>
      <text:p text:style-name="P13"><text:span text:style-name="T2">Como o cupom digitado era igual a </text:span><text:span text:style-name="Source_20_Text"><text:span text:style-name="T2">"QUERO10"</text:span></text:span><text:span text:style-name="T2">, o ternário deu o desconto de </text:span><text:span text:style-name="Source_20_Text"><text:span text:style-name="T2">10</text:span></text:span><text:span text:style-name="T2">. Com a linha </text:span><text:span text:style-name="Source_20_Text"><text:span text:style-name="T2">valorSubtotal -= desconto</text:span></text:span><text:span text:style-name="T2">, o sistema pegou os $120$ e tirou $10$, resultando em </text:span><text:span text:style-name="T3">110</text:span><text:span text:style-name="T2">.</text:span></text:p>
      <text:h text:style-name="P14" text:outline-level="3">🚀 <text:span text:style-name="T4">Fase 2: O Frete Grátis</text:span></text:h>
      <text:p text:style-name="P13"><text:span text:style-name="T2">Agora que sabemos que o </text:span><text:span text:style-name="Source_20_Text"><text:span text:style-name="T2">valorSubtotal</text:span></text:span><text:span text:style-name="T2"> vale </text:span><text:span text:style-name="T3">110</text:span><text:span text:style-name="T2">, vamos para o próximo bloco de código:</text:span></text:p>
      <text:p text:style-name="P15">JavaScript</text:p>
      <text:p text:style-name="P11"><text:span text:style-name="Source_20_Text">const ehClientePremium = false; <text:s/></text:span></text:p>
      <text:p text:style-name="P11"/>
      <text:p text:style-name="P11"><text:span text:style-name="Source_20_Text">// O frete é grátis se o valor final for maior ou igual a 100 OU se o cliente for Premium.</text:span></text:p>
      <text:p text:style-name="P11"><text:span text:style-name="Source_20_Text">const ganhouFreteGratis = (valorSubtotal &gt;= 100) || ehClientePremium;</text:span></text:p>
      <text:p text:style-name="P8"><text:span text:style-name="T1">Sua missão na Fase 2:</text:span> Substituindo o <text:span text:style-name="Source_20_Text">valorSubtotal</text:span> por 110, essa comparação com o operador lógico <text:span text:style-name="Source_20_Text">||</text:span> vai resultar em <text:span text:style-name="Source_20_Text"><text:span text:style-name="T1">true</text:span></text:span> ou <text:span text:style-name="Source_20_Text"><text:span text:style-name="T1">false</text:span></text:span>?</text:p>
      <text:p text:style-name="P7">True</text:p>
      <text:p text:style-name="P7">Exatamente! É <text:span text:style-name="Source_20_Text"><text:span text:style-name="T1">true</text:span></text:span>.</text:p>
      <text:p text:style-name="P8">Como o <text:span text:style-name="Source_20_Text">valorSubtotal</text:span> é 110, a primeira condição (<text:span text:style-name="Source_20_Text">110 &gt;= 100</text:span>) é verdadeira. E como o operador <text:span text:style-name="Source_20_Text">||</text:span> (OU) só precisa de <text:span text:style-name="T1">uma</text:span> verdade para validar tudo, não importou o fato de o cliente não ser Premium (<text:span text:style-name="Source_20_Text">false</text:span>). O frete grátis foi garantido!</text:p>
      <text:h text:style-name="P16" text:outline-level="3">🚀 Fase 3: O Valor do Frete e o Total Final</text:h>
      <text:p text:style-name="P8">Agora vamos para a última fase do nosso sistema para fechar a conta:</text:p>
      <text:p text:style-name="P10">JavaScript</text:p>
      <text:p text:style-name="P11"><text:span text:style-name="Source_20_Text">// Lembramos que: ganhouFreteGratis = true e valorSubtotal = 110</text:span></text:p>
      <text:p text:style-name="P11"><text:soft-page-break/></text:p>
      <text:p text:style-name="P11"><text:span text:style-name="Source_20_Text">const valorFrete = ganhouFreteGratis ? 0 : 15;</text:span></text:p>
      <text:p text:style-name="P11"/>
      <text:p text:style-name="P11"><text:span text:style-name="Source_20_Text">const totalPagar = valorSubtotal + valorFrete;</text:span></text:p>
      <text:p text:style-name="P8"><text:span text:style-name="T1">Sua missão final:</text:span> 1. Olhando o ternário, qual será o valor guardado na variável <text:span text:style-name="Source_20_Text">valorFrete</text:span>? 2. Qual será o valor final da variável <text:span text:style-name="Source_20_Text">totalPagar</text:span>?</text:p>
      <text:p text:style-name="P7">0, 110.</text:p>
      <text:p text:style-name="P7"><text:span text:style-name="T1">Sensacional! Você acabou de programar e rodar com sucesso o seu primeiro sistema real!</text:span> O resultado impresso no console seria exatamente este:</text:p>
      <text:list text:style-name="L2">
        <text:list-item>
          <text:p text:style-name="P17">Valor final do frete: <text:span text:style-name="T1">R$ 0</text:span></text:p>
        </text:list-item>
        <text:list-item>
          <text:p text:style-name="P17">TOTAL A PAGAR: <text:span text:style-name="T1">R$ 110</text:span></text:p>
        </text:list-item>
      </text:list>
      <text:p text:style-name="P8">Você dividiu o problema em fases, pensou exatamente como o compilador do JavaScript pensa e chegou no resultado perfeito sem dar nó no cérebro. É exatamente assim que grandes sistemas como Amazon, Mercado Livre ou iFood calculam os carrinhos de compras de milhões de clientes todos os dias.</text:p>
      <text:h text:style-name="P9" text:outline-level="3">O que nós aplicamos aqui?</text:h>
      <text:list text:style-name="L3">
        <text:list-item>
          <text:p text:style-name="P18"><text:span text:style-name="T1">Comparação (</text:span><text:span text:style-name="Source_20_Text"><text:span text:style-name="T1">===</text:span></text:span><text:span text:style-name="T1">, </text:span><text:span text:style-name="Source_20_Text"><text:span text:style-name="T1">&gt;=</text:span></text:span><text:span text:style-name="T1">)</text:span> para checar o nome do cupom e o valor mínimo do frete.</text:p>
        </text:list-item>
        <text:list-item>
          <text:p text:style-name="P18"><text:span text:style-name="T1">Atribuição Composta (</text:span><text:span text:style-name="Source_20_Text"><text:span text:style-name="T1">-=</text:span></text:span><text:span text:style-name="T1">)</text:span> para reduzir o preço do produto direto na variável.</text:p>
        </text:list-item>
        <text:list-item>
          <text:p text:style-name="P18"><text:span text:style-name="T1">Operador Lógico (</text:span><text:span text:style-name="Source_20_Text"><text:span text:style-name="T1">||</text:span></text:span><text:span text:style-name="T1">)</text:span> para dar mais de uma opção de frete grátis pro cliente.</text:p>
        </text:list-item>
        <text:list-item>
          <text:p text:style-name="P18"><text:span text:style-name="T1">Operador Ternário (</text:span><text:span text:style-name="Source_20_Text"><text:span text:style-name="T1">? :</text:span></text:span><text:span text:style-name="T1">)</text:span> para decidir rapidamente o valor do desconto e o valor do frete sem precisar de códigos gigantes.</text:p>
        </text:list-item>
        <text:list-item>
          <text:p text:style-name="P18"><text:span text:style-name="T1">Aritmética (</text:span><text:span text:style-name="Source_20_Text"><text:span text:style-name="T1">+</text:span></text:span><text:span text:style-name="T1">)</text:span> para somar tudo no final.</text:p>
        </text:list-item>
      </text:list>
      <text:p text:style-name="P8">Isso é programação de verdade!</text:p>
      <text:p text:style-name="P8">Quer partir para o <text:span text:style-name="T1">Projeto 2</text:span> para fixar ainda mais, onde podemos criar o sistema de pontuação e níveis de um <text:span text:style-name="T1">Jogo de RPG</text:span>, ou quer ajustar alguma coisa desse primeiro projeto?</text:p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Google Sans Flex" svg:font-family="'Google Sans Flex', 'Google Sans', 'Helvetica Neue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João António</meta:initial-creator>
    <meta:creation-date>2026-06-25T23:21:18.255979019</meta:creation-date>
    <dc:date>2026-06-26T14:12:49.964941172</dc:date>
    <dc:creator>João António</dc:creator>
    <meta:editing-duration>PT3H46S</meta:editing-duration>
    <meta:editing-cycles>18</meta:editing-cycles>
    <meta:generator>LibreOffice/26.2.4.2$Linux_X86_64 LibreOffice_project/620$Build-2</meta:generator>
    <meta:document-statistic meta:table-count="0" meta:image-count="0" meta:object-count="0" meta:page-count="4" meta:paragraph-count="80" meta:word-count="1021" meta:character-count="5907" meta:non-whitespace-character-count="4958"/>
  </office:meta>
</office:document-meta>
</file>