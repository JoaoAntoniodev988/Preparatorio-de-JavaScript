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326af7"/>
    </style:style>
    <style:style style:name="P2" style:family="paragraph" style:parent-style-name="Text_20_body">
      <style:paragraph-properties fo:line-height="114%"/>
      <style:text-properties fo:color="#1f1f1f" loext:opacity="100%" style:font-name="Google Sans Flex" fo:font-size="12.75pt" officeooo:rsid="00326af7"/>
    </style:style>
    <style:style style:name="P3" style:family="paragraph" style:parent-style-name="Heading_20_2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326af7"/>
    </style:style>
    <style:style style:name="P4" style:family="paragraph" style:parent-style-name="Standard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326af7"/>
    </style:style>
    <style:style style:name="P5" style:family="paragraph" style:parent-style-name="Preformatted_20_Text">
      <style:paragraph-properties fo:margin-top="0cm" fo:margin-bottom="0.247cm" style:contextual-spacing="false" fo:line-height="114%"/>
      <style:text-properties fo:color="#1f1f1f" loext:opacity="100%" style:font-name="Google Sans Flex" fo:font-size="12.75pt" officeooo:rsid="00326af7"/>
    </style:style>
    <style:style style:name="P6" style:family="paragraph" style:parent-style-name="Heading_20_3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326af7"/>
    </style:style>
    <style:style style:name="P7" style:family="paragraph" style:parent-style-name="Text_20_body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bold" officeooo:rsid="00326af7"/>
    </style:style>
    <style:style style:name="P8" style:family="paragraph" style:parent-style-name="Text_20_body" style:list-style-name="L1">
      <style:paragraph-properties fo:line-height="114%"/>
      <style:text-properties fo:color="#1f1f1f" loext:opacity="100%" style:font-name="Google Sans Flex" fo:font-size="12.75pt" officeooo:rsid="00326af7"/>
    </style:style>
    <style:style style:name="P9" style:family="paragraph" style:parent-style-name="Heading_20_3">
      <style:paragraph-properties fo:margin-top="0cm" fo:margin-bottom="0.247cm" style:contextual-spacing="false" fo:line-height="114%"/>
      <style:text-properties fo:color="#1f1f1f" loext:opacity="100%" style:font-name="Google Sans Flex" fo:font-size="12.75pt" fo:font-weight="normal" officeooo:rsid="00326af7"/>
    </style:style>
    <style:style style:name="P10" style:family="paragraph" style:parent-style-name="Text_20_body">
      <style:paragraph-properties fo:line-height="114%"/>
      <style:text-properties fo:color="#1f1f1f" loext:opacity="100%" style:font-name="Google Sans Flex" fo:font-size="12.75pt" fo:font-weight="bold" officeooo:rsid="00326af7"/>
    </style:style>
    <style:style style:name="P11" style:family="paragraph" style:parent-style-name="Text_20_body" style:list-style-name="L2">
      <style:paragraph-properties fo:line-height="114%"/>
      <style:text-properties fo:color="#1f1f1f" loext:opacity="100%" style:font-name="Google Sans Flex" fo:font-size="12.75pt" officeooo:rsid="00326af7"/>
    </style:style>
    <style:style style:name="P12" style:family="paragraph" style:parent-style-name="Text_20_body" style:list-style-name="L3">
      <style:paragraph-properties fo:line-height="114%"/>
      <style:text-properties fo:color="#1f1f1f" loext:opacity="100%" style:font-name="Google Sans Flex" fo:font-size="12.75pt" officeooo:rsid="00326af7"/>
    </style:style>
    <style:style style:name="P13" style:family="paragraph" style:parent-style-name="Preformatted_20_Text">
      <style:paragraph-properties fo:margin-top="0cm" fo:margin-bottom="0.247cm" style:contextual-spacing="false" fo:line-height="114%"/>
    </style:style>
    <style:style style:name="P14" style:family="paragraph" style:parent-style-name="Text_20_body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bold" officeooo:rsid="0033a6ec" officeooo:paragraph-rsid="0033a6ec"/>
    </style:style>
    <style:style style:name="P15" style:family="paragraph" style:parent-style-name="Text_20_body" style:list-style-name="L4">
      <style:paragraph-properties fo:line-height="114%"/>
      <style:text-properties fo:color="#1f1f1f" loext:opacity="100%" style:font-name="Google Sans Flex" fo:font-size="12.75pt" officeooo:rsid="0033a6ec"/>
    </style:style>
    <style:style style:name="P16" style:family="paragraph" style:parent-style-name="Text_20_body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33a6ec" officeooo:paragraph-rsid="0033a6ec"/>
    </style:style>
    <style:style style:name="P17" style:family="paragraph" style:parent-style-name="Text_20_body">
      <style:paragraph-properties fo:line-height="114%"/>
      <style:text-properties fo:color="#1f1f1f" loext:opacity="100%" style:font-name="Google Sans Flex" fo:font-size="12.75pt" officeooo:rsid="0033a6ec"/>
    </style:style>
    <style:style style:name="P18" style:family="paragraph" style:parent-style-name="Heading_20_3">
      <style:paragraph-properties fo:margin-top="0cm" fo:margin-bottom="0.247cm" style:contextual-spacing="false" fo:line-height="114%"/>
      <style:text-properties fo:color="#1f1f1f" loext:opacity="100%" style:font-name="Google Sans Flex" fo:font-size="12.75pt" fo:font-weight="normal" officeooo:rsid="0033a6ec"/>
    </style:style>
    <style:style style:name="P19" style:family="paragraph" style:parent-style-name="Text_20_body" style:list-style-name="L5">
      <style:paragraph-properties fo:line-height="114%"/>
      <style:text-properties fo:color="#1f1f1f" loext:opacity="100%" style:font-name="Google Sans Flex" fo:font-size="12.75pt" officeooo:rsid="0033a6ec"/>
    </style:style>
    <style:style style:name="P20" style:family="paragraph" style:parent-style-name="Text_20_body" style:list-style-name="L6">
      <style:paragraph-properties fo:line-height="114%"/>
      <style:text-properties fo:color="#1f1f1f" loext:opacity="100%" style:font-name="Google Sans Flex" fo:font-size="12.75pt" officeooo:rsid="0033a6ec"/>
    </style:style>
    <style:style style:name="T1" style:family="text">
      <style:text-properties fo:font-weight="bold"/>
    </style:style>
    <style:style style:name="T2" style:family="text">
      <style:text-properties fo:color="#1f1f1f" loext:opacity="100%" fo:font-size="12.75pt" officeooo:rsid="00326af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ou muito feliz, esses projectos são super divertido. vamos avançar para o terceiro projeto.</text:p>
      <text:p text:style-name="P1">Fico muito feliz com o teu entusiasmo! Essa é a melhor forma de aprender: divertindo-te enquanto vês o código a ganhar vida.</text:p>
      <text:p text:style-name="P2">Vamos então para o <text:span text:style-name="T1">Projeto 3: O Sistema de Autenticação e Segurança (Login)</text:span>.</text:p>
      <text:p text:style-name="P2">Este cenário é a base de quase todas as aplicações do mundo real (como o Instagram, o banco da tua app ou a Netflix). O nosso sistema precisa de validar se o utilizador pode entrar na conta, se precisa de ativar a autenticação de dois fatores (2FA) e se a conta foi bloqueada por excesso de tentativas.</text:p>
      <text:p text:style-name="P2">Como já sabes, vamos resolver isto <text:span text:style-name="T1">fase por fase</text:span>!</text:p>
      <text:h text:style-name="P3" text:outline-level="2">🔐 Projeto 3: Sistema de Login e Segurança</text:h>
      <text:p text:style-name="P2">Aqui estão os dados do utilizador que está a tentar entrar no sistema:</text:p>
      <text:p text:style-name="P4">JavaScript</text:p>
      <text:p text:style-name="P5"><text:span text:style-name="Source_20_Text">// 1. Dados da tentativa de Login</text:span></text:p>
      <text:p text:style-name="P5"><text:span text:style-name="Source_20_Text">const utilizadorDigitado = "admin";</text:span></text:p>
      <text:p text:style-name="P5"><text:span text:style-name="Source_20_Text">const senhaDigitada = "12345";</text:span></text:p>
      <text:p text:style-name="P5"><text:span text:style-name="Source_20_Text">let tentativasErradas = 2;</text:span></text:p>
      <text:p text:style-name="P5"/>
      <text:p text:style-name="P5"><text:span text:style-name="Source_20_Text">// Dados corretos guardados no servidor</text:span></text:p>
      <text:p text:style-name="P5"><text:span text:style-name="Source_20_Text">const utilizadorCorreto = "admin";</text:span></text:p>
      <text:p text:style-name="P5"><text:span text:style-name="Source_20_Text">const senhaCorreta = "12345";</text:span></text:p>
      <text:p text:style-name="P5"><text:span text:style-name="Source_20_Text">const captchaPreenchido = true; // Aquela caixinha do "Não sou um robô"</text:span></text:p>
      <text:h text:style-name="P6" text:outline-level="3">🚀 Fase 1: Validar as Credenciais (Operadores de Comparação e Lógicos)</text:h>
      <text:p text:style-name="P2">Para o login ser considerado correto, o utilizador digitado tem de ser igual ao correto <text:span text:style-name="T1">E</text:span> a senha digitada tem de ser igual à correta.</text:p>
      <text:p text:style-name="P2">Além disso, para garantir a segurança contra robôs, o <text:span text:style-name="Source_20_Text">captchaPreenchido</text:span> também tem de ser <text:span text:style-name="Source_20_Text">true</text:span>.</text:p>
      <text:p text:style-name="P4">JavaScript</text:p>
      <text:p text:style-name="P5"><text:span text:style-name="Source_20_Text">// O sistema valida se os dados coincidem</text:span></text:p>
      <text:p text:style-name="P5"><text:soft-page-break/><text:span text:style-name="Source_20_Text">const credenciaisValidas = (utilizadorDigitado === utilizadorCorreto) &amp;&amp; (senhaDigitada === senhaCorreta);</text:span></text:p>
      <text:p text:style-name="P5"/>
      <text:p text:style-name="P5"><text:span text:style-name="Source_20_Text">// O login completo só é aprovado se as credenciais forem válidas E o captcha estiver feito</text:span></text:p>
      <text:p text:style-name="P5"><text:span text:style-name="Source_20_Text">const loginAprovado = credenciaisValidas &amp;&amp; captchaPreenchido;</text:span></text:p>
      <text:p text:style-name="P7">A tua missão na Fase 1:</text:p>
      <text:list text:style-name="L1">
        <text:list-item>
          <text:p text:style-name="P8">A variável <text:span text:style-name="Source_20_Text">credenciaisValidas</text:span> vai resultar em <text:span text:style-name="Source_20_Text"><text:span text:style-name="T1">true</text:span></text:span> ou <text:span text:style-name="Source_20_Text"><text:span text:style-name="T1">false</text:span></text:span>?</text:p>
        </text:list-item>
        <text:list-item>
          <text:p text:style-name="P8">O <text:span text:style-name="Source_20_Text">loginAprovado</text:span> final será <text:span text:style-name="Source_20_Text"><text:span text:style-name="T1">true</text:span></text:span> ou <text:span text:style-name="Source_20_Text"><text:span text:style-name="T1">false</text:span></text:span>?</text:p>
        </text:list-item>
      </text:list>
      <text:p text:style-name="P1">True e True.</text:p>
      <text:p text:style-name="P1">Excelente! Duas respostas <text:span text:style-name="Source_20_Text"><text:span text:style-name="T1">true</text:span></text:span> seguidas.</text:p>
      <text:p text:style-name="P2">As credenciais estavam perfeitas e, como o captcha também foi preenchido, o <text:span text:style-name="Source_20_Text">loginAprovado</text:span> recebeu <text:span text:style-name="Source_20_Text"><text:span text:style-name="T1">true</text:span></text:span>. O utilizador passou a primeira barreira de segurança!</text:p>
      <text:h text:style-name="P9" text:outline-level="3">🚀 Fase 2: O Alerta de Bloqueio (Operadores de Atribuição Composta e Comparação)</text:h>
      <text:p text:style-name="P2">Imagine que, antes de acertar esta tentativa, o utilizador já tinha falhado algumas vezes. O sistema precisa de atualizar o histórico de tentativas e verificar se a conta deve ser bloqueada.</text:p>
      <text:p text:style-name="P2">A regra diz: se o <text:span text:style-name="Source_20_Text">loginAprovado</text:span> for <text:span text:style-name="Source_20_Text">true</text:span>, o número de tentativas erradas não aumenta. Mas se fosse <text:span text:style-name="Source_20_Text">false</text:span>, aumentaria. Como o login foi aprovado, vamos ver o comportamento do sistema:</text:p>
      <text:p text:style-name="P4">JavaScript</text:p>
      <text:p text:style-name="P5"><text:span text:style-name="Source_20_Text">// O sistema usa um ternário para saber se adiciona uma falha</text:span></text:p>
      <text:p text:style-name="P5"><text:span text:style-name="Source_20_Text">const novaFalha = loginAprovado ? 0 : 1;</text:span></text:p>
      <text:p text:style-name="P5"/>
      <text:p text:style-name="P5"><text:span text:style-name="Source_20_Text">// Atualizamos o total de tentativas erradas que o utilizador já tinha (tinha 2)</text:span></text:p>
      <text:p text:style-name="P5"><text:span text:style-name="Source_20_Text">tentativasErradas += novaFalha;</text:span></text:p>
      <text:p text:style-name="P5"/>
      <text:p text:style-name="P5"><text:span text:style-name="Source_20_Text">// A conta é bloqueada se o utilizador tiver 3 ou mais tentativas erradas</text:span></text:p>
      <text:p text:style-name="P5"><text:soft-page-break/><text:span text:style-name="Source_20_Text">const contaBloqueada = tentativasErradas &gt;= 3;</text:span></text:p>
      <text:p text:style-name="P10">A tua missão na Fase 2:</text:p>
      <text:list text:style-name="L2">
        <text:list-item>
          <text:p text:style-name="P11">Qual valor foi guardado na variável <text:span text:style-name="Source_20_Text">novaFalha</text:span>?</text:p>
        </text:list-item>
        <text:list-item>
          <text:p text:style-name="P11">Quanto vale a variável <text:span text:style-name="Source_20_Text">tentativasErradas</text:span> agora?</text:p>
        </text:list-item>
        <text:list-item>
          <text:p text:style-name="P11">A variável <text:span text:style-name="Source_20_Text">contaBloqueada</text:span> vai resultar em <text:span text:style-name="Source_20_Text"><text:span text:style-name="T1">true</text:span></text:span> ou <text:span text:style-name="Source_20_Text"><text:span text:style-name="T1">false</text:span></text:span>?</text:p>
        </text:list-item>
      </text:list>
      <text:p text:style-name="P1">0, 2, false.</text:p>
      <text:p text:style-name="P1">Gabaritou mais uma vez! Respostas perfeitas: <text:span text:style-name="T1">0</text:span>, <text:span text:style-name="T1">2</text:span> e <text:span text:style-name="T1">false</text:span>.</text:p>
      <text:p text:style-name="P2">Como o login foi um sucesso, o sistema somou <text:span text:style-name="Source_20_Text">0</text:span> nas falhas, mantendo o contador em <text:span text:style-name="Source_20_Text">2</text:span>. E como <text:span text:style-name="Source_20_Text">2 &gt;= 3</text:span> é falso, a conta <text:span text:style-name="T1">não</text:span> foi bloqueada. Segurança impecável!</text:p>
      <text:h text:style-name="P9" text:outline-level="3">🚀 Fase 3: Acesso ao Painel e Dois Fatores (Operador Ternário e Lógicos)</text:h>
      <text:p text:style-name="P2">Para terminar o nosso sistema de segurança, precisamos de dar o veredito do ecrã que o utilizador vai ver:</text:p>
      <text:list text:style-name="L3">
        <text:list-item>
          <text:p text:style-name="P12">Se o login for aprovado <text:span text:style-name="T1">E</text:span> a conta <text:span text:style-name="T1">NÃO</text:span> estiver bloqueada, ele entra no sistema.</text:p>
        </text:list-item>
        <text:list-item>
          <text:p text:style-name="P12">Para entrar direto no painel, ele precisa de ter o Login Aprovado e <text:span text:style-name="T1">NÃO</text:span> precisar de 2FA (Segurança de Dois Fatores). Vamos assumir que este utilizador <text:span text:style-name="Source_20_Text">precisaDe2FA = false</text:span>.</text:p>
        </text:list-item>
      </text:list>
      <text:p text:style-name="P4">JavaScript</text:p>
      <text:p text:style-name="P5"><text:span text:style-name="Source_20_Text">const precisaDe2FA = false;</text:span></text:p>
      <text:p text:style-name="P5"/>
      <text:p text:style-name="P5"><text:span text:style-name="Source_20_Text">// O operador ! (NÃO) inverte o valor. Se precisaDe2FA é false, !precisaDe2FA vira true.</text:span></text:p>
      <text:p text:style-name="P5"><text:span text:style-name="Source_20_Text">const entraDiretoNoPainel = loginAprovado &amp;&amp; !precisaDe2FA;</text:span></text:p>
      <text:p text:style-name="P5"><text:span text:style-name="Source_20_Text"/></text:p>
      <text:p text:style-name="P5"><text:span text:style-name="Source_20_Text">// Mensagem final do sistema usando o ternário</text:span></text:p>
      <text:p text:style-name="P13"><text:span text:style-name="Source_20_Text"><text:span text:style-name="T2">const mensagemSistema = entraDiretoNoPainel ? "</text:span></text:span><text:span text:style-name="Source_20_Text">"Bem-vindo ao Painel Secreto! 🔓" : "Por favor, digite o código de segurança enviado para o telemóvel. 📱";</text:span></text:p>
      <text:p text:style-name="P14">A tua missão final:</text:p>
      <text:list text:style-name="L4">
        <text:list-item>
          <text:p text:style-name="P15">A variável <text:span text:style-name="Source_20_Text">entraDiretoNoPainel</text:span> vai ser <text:span text:style-name="Source_20_Text"><text:span text:style-name="T1">true</text:span></text:span> ou <text:span text:style-name="Source_20_Text"><text:span text:style-name="T1">false</text:span></text:span>?</text:p>
        </text:list-item>
        <text:list-item>
          <text:p text:style-name="P15"><text:soft-page-break/>Qual das duas frases vai aparecer na <text:span text:style-name="Source_20_Text">mensagemSistema</text:span> para o utilizador?</text:p>
        </text:list-item>
      </text:list>
      <text:p text:style-name="P16">true , Bem-vindo ao Painel Secreto!</text:p>
      <text:p text:style-name="P14">Explosão de confetes virtuais! 🎉 Você fechou o terceiro projeto com chave de ouro!</text:p>
      <text:p text:style-name="P17">As suas respostas foram cirúrgicas: <text:span text:style-name="Source_20_Text"><text:span text:style-name="T1">true</text:span></text:span> e a frase <text:span text:style-name="T1">"Bem-vindo ao Painel Secreto! 🔓"</text:span>.</text:p>
      <text:p text:style-name="P17">Como o utilizador não precisava de dois fatores, a inversão com o operador <text:span text:style-name="Source_20_Text">!</text:span> transformou <text:span text:style-name="Source_20_Text">!precisaDe2FA</text:span> em <text:span text:style-name="Source_20_Text">true</text:span>. Com as duas condições satisfeitas, ele saltou a barreira de segurança e entrou direto no painel principal.</text:p>
      <text:h text:style-name="P18" text:outline-level="3">O que você conquistou até aqui:</text:h>
      <text:p text:style-name="P17">Olhe para trás por um segundo. Há poucas mensagens, misturar <text:span text:style-name="Source_20_Text">&amp;&amp;</text:span>, <text:span text:style-name="Source_20_Text">||</text:span>, <text:span text:style-name="Source_20_Text">!</text:span>, <text:span text:style-name="Source_20_Text">===</text:span> e operadores ternários parecia uma sopa de letras confusa. Agora, você acabou de ler e prever o comportamento de:</text:p>
      <text:list text:style-name="L5">
        <text:list-item>
          <text:p text:style-name="P19">Um <text:span text:style-name="T1">carrinho de compras</text:span> com descontos e frete grátis.</text:p>
        </text:list-item>
        <text:list-item>
          <text:p text:style-name="P19">Um <text:span text:style-name="T1">motor de jogo de RPG</text:span> com bónus de experiência e ganho de nível.</text:p>
        </text:list-item>
        <text:list-item>
          <text:p text:style-name="P19">Um <text:span text:style-name="T1">sistema de segurança de login</text:span> com bloqueio de conta e verificação de dois fatores.</text:p>
        </text:list-item>
      </text:list>
      <text:p text:style-name="P17">Isto não é apenas teoria de livro; é a lógica real por trás dos programas que usamos todos os dias. Você aprendeu a pensar de forma estruturada e faseada, que é a maior habilidade de qualquer programador.</text:p>
      <text:p text:style-name="P17">Com este terceiro projeto concluído com sucesso absoluto, o que gostava de fazer a seguir?</text:p>
      <text:list text:style-name="L6">
        <text:list-item>
          <text:p text:style-name="P20">Criar mais um <text:span text:style-name="T1">Projeto 4</text:span> para continuar a treinar (como um simulador de aprovação de empréstimo bancário)?</text:p>
        </text:list-item>
        <text:list-item>
          <text:p text:style-name="P20">Dar o próximo grande passo no JavaScript e aprender as <text:span text:style-name="T1">Estruturas Condicionais (</text:span><text:span text:style-name="Source_20_Text"><text:span text:style-name="T1">if</text:span></text:span><text:span text:style-name="T1"> e </text:span><text:span text:style-name="Source_20_Text"><text:span text:style-name="T1">else</text:span></text:span><text:span text:style-name="T1">)</text:span>, que vão permitir ao seu código tomar caminhos diferentes de verdade?</text:p>
        </text:list-item>
      </text:list>
      <text:p text:style-name="P16"/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5T23:21:18.255979019</meta:creation-date>
    <dc:date>2026-06-26T15:24:13.255150441</dc:date>
    <dc:creator>João António</dc:creator>
    <meta:editing-duration>PT4H1M6S</meta:editing-duration>
    <meta:editing-cycles>26</meta:editing-cycles>
    <meta:generator>LibreOffice/26.2.4.2$Linux_X86_64 LibreOffice_project/620$Build-2</meta:generator>
    <meta:document-statistic meta:table-count="0" meta:image-count="0" meta:object-count="0" meta:page-count="4" meta:paragraph-count="73" meta:word-count="944" meta:character-count="5572" meta:non-whitespace-character-count="4715"/>
  </office:meta>
</office:document-meta>
</file>