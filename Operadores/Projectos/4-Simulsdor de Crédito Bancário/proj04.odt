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33a6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15:36:52.910255342</dc:date>
    <dc:creator>João António</dc:creator>
    <meta:editing-duration>PT4H1M15S</meta:editing-duration>
    <meta:editing-cycles>27</meta:editing-cycles>
    <meta:generator>LibreOffice/26.2.4.2$Linux_X86_64 LibreOffice_project/6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