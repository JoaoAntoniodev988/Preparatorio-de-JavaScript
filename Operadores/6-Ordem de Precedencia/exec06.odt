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Text_20_body" style:list-style-name="L1">
      <style:paragraph-properties fo:line-height="114%"/>
      <style:text-properties officeooo:rsid="001ef461"/>
    </style:style>
    <style:style style:name="P3" style:family="paragraph" style:parent-style-name="Heading_20_3">
      <style:paragraph-properties fo:margin-top="0cm" fo:margin-bottom="0.247cm" style:contextual-spacing="false" fo:line-height="114%"/>
      <style:text-properties officeooo:rsid="001ef461"/>
    </style:style>
    <style:style style:name="P4" style:family="paragraph" style:parent-style-name="Standard">
      <style:paragraph-properties fo:line-height="114%"/>
      <style:text-properties officeooo:rsid="001ef461"/>
    </style:style>
    <style:style style:name="P5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6" style:family="paragraph" style:parent-style-name="Text_20_body">
      <style:paragraph-properties fo:line-height="114%"/>
      <style:text-properties fo:font-weight="bold" officeooo:rsid="001ef461"/>
    </style:style>
    <style:style style:name="P7" style:family="paragraph" style:parent-style-name="Text_20_body" style:list-style-name="L2">
      <style:paragraph-properties fo:line-height="114%"/>
      <style:text-properties officeooo:rsid="001ef461"/>
    </style:style>
    <style:style style:name="P8" style:family="paragraph" style:parent-style-name="Text_20_body">
      <style:paragraph-properties fo:margin-left="0cm" fo:margin-right="0cm" fo:line-height="114%" fo:text-indent="0cm" style:auto-text-indent="false"/>
      <style:text-properties officeooo:rsid="001ef461"/>
    </style:style>
    <style:style style:name="P9" style:family="paragraph" style:parent-style-name="Text_20_body" style:list-style-name="L3">
      <style:paragraph-properties fo:line-height="114%"/>
      <style:text-properties officeooo:rsid="001ef461"/>
    </style:style>
    <style:style style:name="P10" style:family="paragraph" style:parent-style-name="Heading_20_3">
      <style:paragraph-properties fo:line-height="114%"/>
      <style:text-properties officeooo:rsid="001ef461"/>
    </style:style>
    <style:style style:name="P11" style:family="paragraph" style:parent-style-name="Text_20_body" style:list-style-name="L4">
      <style:paragraph-properties fo:line-height="114%"/>
      <style:text-properties officeooo:rsid="001ef461"/>
    </style:style>
    <style:style style:name="P12" style:family="paragraph" style:parent-style-name="Text_20_body" style:list-style-name="L5">
      <style:paragraph-properties fo:line-height="114%"/>
      <style:text-properties officeooo:rsid="001ef461"/>
    </style:style>
    <style:style style:name="P13" style:family="paragraph" style:parent-style-name="Text_20_body" style:list-style-name="L6">
      <style:paragraph-properties fo:line-height="114%"/>
      <style:text-properties officeooo:rsid="001ef461"/>
    </style:style>
    <style:style style:name="P14" style:family="paragraph" style:parent-style-name="Text_20_body">
      <style:paragraph-properties fo:line-height="114%"/>
      <style:text-properties fo:font-style="italic" officeooo:rsid="001ef461"/>
    </style:style>
    <style:style style:name="P15" style:family="paragraph" style:parent-style-name="Text_20_body" style:list-style-name="L7">
      <style:paragraph-properties fo:line-height="114%"/>
      <style:text-properties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ão vamos para o topo da montanha: <text:span text:style-name="T1">A Ordem de Precedência</text:span>.</text:p>
      <text:p text:style-name="P1">Assim como na matemática da escola a gente aprende que a multiplicação vem antes da soma, o JavaScript também tem uma lista de prioridades para decidir quem ele resolve primeiro quando tudo está misturado na mesma linha.</text:p>
      <text:p text:style-name="P1">A ordem de prioridade do JavaScript (do mais forte para o mais fraco) é:</text:p>
      <text:list text:style-name="L1">
        <text:list-item>
          <text:p text:style-name="P2"><text:span text:style-name="T1">Parênteses </text:span><text:span text:style-name="Source_20_Text"><text:span text:style-name="T1">()</text:span></text:span> (Sempre têm força máxima. O que estiver dentro deles é resolvido primeiro).</text:p>
        </text:list-item>
        <text:list-item>
          <text:p text:style-name="P2"><text:span text:style-name="T1">Aritmética básica</text:span> (Multiplicação <text:span text:style-name="Source_20_Text">*</text:span> e Divisão <text:span text:style-name="Source_20_Text">/</text:span> primeiro; depois Adição <text:span text:style-name="Source_20_Text">+</text:span> e Subtração <text:span text:style-name="Source_20_Text">-</text:span>).</text:p>
        </text:list-item>
        <text:list-item>
          <text:p text:style-name="P2"><text:span text:style-name="T1">Comparação</text:span> (<text:span text:style-name="Source_20_Text">&gt;</text:span>, <text:span text:style-name="Source_20_Text">&lt;</text:span>, <text:span text:style-name="Source_20_Text">===</text:span>, <text:span text:style-name="Source_20_Text">!==</text:span>, etc).</text:p>
        </text:list-item>
        <text:list-item>
          <text:p text:style-name="P2"><text:span text:style-name="T1">Lógicos</text:span> (O <text:span text:style-name="Source_20_Text">!</text:span> é o mais forte, depois vem o <text:span text:style-name="Source_20_Text">&amp;&amp;</text:span>, e o <text:span text:style-name="Source_20_Text">||</text:span> é o mais fraquinho de todos).</text:p>
        </text:list-item>
      </text:list>
      <text:p text:style-name="P1">Vamos testar como o seu cérebro processa essa ordem com dois desafios. Vá por partes, como o computador faria!</text:p>
      <text:h text:style-name="P3" text:outline-level="3">Desafio 1: Misturando Aritmética e Comparação</text:h>
      <text:p text:style-name="P1">Olha essa linha de código. O JavaScript vai fazer a conta primeiro ou a comparação primeiro?</text:p>
      <text:p text:style-name="P4">JavaScript</text:p>
      <text:p text:style-name="P5"><text:span text:style-name="Source_20_Text">const resultado1 = 5 + 3 * 2 &gt; 10;</text:span></text:p>
      <text:p text:style-name="P5"><text:span text:style-name="Source_20_Text">console.log(resultado1);</text:span></text:p>
      <text:p text:style-name="P6">Dica de amigo para resolver:</text:p>
      <text:list text:style-name="L2">
        <text:list-item>
          <text:p text:style-name="P7">Multiplicação primeiro: Quanto é <text:span text:style-name="Source_20_Text">3 * 2</text:span>?</text:p>
        </text:list-item>
        <text:list-item>
          <text:p text:style-name="P7">Soma depois: Pegue o resultado e some com <text:span text:style-name="Source_20_Text">5</text:span>.</text:p>
        </text:list-item>
        <text:list-item>
          <text:p text:style-name="P7">Por fim, faça a comparação: Esse número final é <text:span text:style-name="Source_20_Text">&gt; 10</text:span>?</text:p>
        </text:list-item>
      </text:list>
      <text:p text:style-name="P1">E aí, o resultado final será <text:span text:style-name="Source_20_Text"><text:span text:style-name="T1">true</text:span></text:span> ou <text:span text:style-name="Source_20_Text"><text:span text:style-name="T1">false</text:span></text:span>?</text:p>
      <text:h text:style-name="P3" text:outline-level="3">Desafio 2: O Peso dos Parênteses <text:span text:style-name="Source_20_Text">()</text:span></text:h>
      <text:p text:style-name="P1">Agora veja o mesmo código, mas mudamos os parênteses de lugar. Lembra que os parênteses têm força máxima!</text:p>
      <text:p text:style-name="P8">JavaScript</text:p>
      <text:p text:style-name="P5"><text:span text:style-name="Source_20_Text">const resultado2 = (5 + 3) * 2 &gt; 10;</text:span></text:p>
      <text:p text:style-name="P5"><text:span text:style-name="Source_20_Text">console.log(resultado2);</text:span></text:p>
      <text:p text:style-name="P6">Dica para resolver:</text:p>
      <text:list text:style-name="L3">
        <text:list-item>
          <text:p text:style-name="P9">Resolva os parênteses primeiro: Quanto é <text:span text:style-name="Source_20_Text">5 + 3</text:span>?</text:p>
        </text:list-item>
        <text:list-item>
          <text:p text:style-name="P9">Multiplique o resultado por <text:span text:style-name="Source_20_Text">2</text:span>.</text:p>
        </text:list-item>
        <text:list-item>
          <text:p text:style-name="P9">Compare se o valor final é <text:span text:style-name="Source_20_Text">&gt; 10</text:span>.</text:p>
        </text:list-item>
      </text:list>
      <text:p text:style-name="P1">O que o console vai responder para o Desafio 2: <text:span text:style-name="Source_20_Text"><text:span text:style-name="T1">true</text:span></text:span> ou <text:span text:style-name="Source_20_Text"><text:span text:style-name="T1">false</text:span></text:span>?</text:p>
      <text:h text:style-name="P10" text:outline-level="3"><text:soft-page-break/>Desafio Final: O "Chefe de Fase" 🎮</text:h>
      <text:p text:style-name="P1">Vá resolvendo de passo em passo na ordem de prioridade:</text:p>
      <text:list text:style-name="L4">
        <text:list-item>
          <text:p text:style-name="P11">Contas matemáticas.</text:p>
        </text:list-item>
        <text:list-item>
          <text:p text:style-name="P11">Comparações (<text:span text:style-name="Source_20_Text">&gt;</text:span>, <text:span text:style-name="Source_20_Text">===</text:span>).</text:p>
        </text:list-item>
        <text:list-item>
          <text:p text:style-name="P11">Operador lógico <text:span text:style-name="Source_20_Text">&amp;&amp;</text:span>.</text:p>
        </text:list-item>
      </text:list>
      <text:p text:style-name="P8">JavaScript</text:p>
      <text:p text:style-name="P5"><text:span text:style-name="Source_20_Text">const testeFinal = 10 + 5 === 15 &amp;&amp; 2 * 3 &gt; 7;</text:span></text:p>
      <text:p text:style-name="P5"><text:span text:style-name="Source_20_Text">console.log(testeFinal);</text:span></text:p>
      <text:p text:style-name="P6">Guia de passos para o seu cérebro:</text:p>
      <text:list text:style-name="L5">
        <text:list-item>
          <text:p text:style-name="P12"><text:span text:style-name="T1">Passo 1 (Matemática):</text:span> Resolva o <text:span text:style-name="Source_20_Text">10 + 5</text:span> e o <text:span text:style-name="Source_20_Text">2 * 3</text:span>.</text:p>
        </text:list-item>
        <text:list-item>
          <text:p text:style-name="P12"><text:span text:style-name="T1">Passo 2 (Comparação):</text:span> Veja se o primeiro resultado é igual a <text:span text:style-name="Source_20_Text">15</text:span> <text:span text:style-name="T1">E</text:span> se o segundo resultado é maior que <text:span text:style-name="Source_20_Text">7</text:span>.</text:p>
        </text:list-item>
        <text:list-item>
          <text:p text:style-name="P12"><text:span text:style-name="T1">Passo 3 (Lógica):</text:span> Use a regra do <text:span text:style-name="Source_20_Text">&amp;&amp;</text:span> para dar o veredito final.</text:p>
        </text:list-item>
      </text:list>
      <text:p text:style-name="P1">O que o console vai mostrar para <text:span text:style-name="Source_20_Text">testeFinal</text:span>: <text:span text:style-name="Source_20_Text"><text:span text:style-name="T1">true</text:span></text:span> ou <text:span text:style-name="Source_20_Text"><text:span text:style-name="T1">false</text:span></text:span>?</text:p>
      <text:p text:style-name="P1">Totalmente compreensível! Esse código é confuso de propósito porque ele mistura três assuntos diferentes em uma única linha. Na vida real, nenhum programador escreve assim porque fica horrível de ler.</text:p>
      <text:p text:style-name="P1">Vamos limpar essa confusão e desmontar essa bomba passo a passo. O segredo é fazer exatamente igual ao JavaScript: resolver <text:span text:style-name="T1">um pedaço por vez</text:span>.</text:p>
      <text:p text:style-name="P1">O código original é este:</text:p>
      <text:p text:style-name="P8">JavaScript</text:p>
      <text:p text:style-name="P5"><text:span text:style-name="Source_20_Text">const testeFinal = 10 + 5 === 15 &amp;&amp; 2 * 3 &gt; 7;</text:span></text:p>
      <text:p text:style-name="P1">Para não dar nó no cérebro, vamos dividir a linha em <text:span text:style-name="T1">três blocos</text:span>: os dois lados da matemática e o conector lógico (<text:span text:style-name="Source_20_Text">&amp;&amp;</text:span>) no meio.</text:p>
      <text:h text:style-name="P10" text:outline-level="3">Passo 1: Resolver as contas de matemática 🧮</text:h>
      <text:p text:style-name="P1">O JavaScript ignora todo o resto e faz primeiro as contas de somar e multiplicar:</text:p>
      <text:list text:style-name="L6">
        <text:list-item>
          <text:p text:style-name="P13">Do lado esquerdo: <text:span text:style-name="Source_20_Text">10 + 5</text:span> vira <text:span text:style-name="Source_20_Text"><text:span text:style-name="T1">15</text:span></text:span>.</text:p>
        </text:list-item>
        <text:list-item>
          <text:p text:style-name="P13">Do lado direito: <text:span text:style-name="Source_20_Text">2 * 3</text:span> vira <text:span text:style-name="Source_20_Text"><text:span text:style-name="T1">6</text:span></text:span>.</text:p>
        </text:list-item>
      </text:list>
      <text:p text:style-name="P1">Substituindo esses números no código, a linha agora ficou assim:</text:p>
      <text:p text:style-name="P8">JavaScript</text:p>
      <text:p text:style-name="P5"><text:span text:style-name="Source_20_Text">const testeFinal = 15 === 15 &amp;&amp; 6 &gt; 7;</text:span></text:p>
      <text:p text:style-name="P14">Já ficou um pouco mais limpa, né?</text:p>
      <text:p text:style-name="P1"/>
      <text:h text:style-name="P10" text:outline-level="3"><text:soft-page-break/>Passo 2: Resolver as comparações ⚖️</text:h>
      <text:p text:style-name="P1">Agora o JavaScript vai olhar para os sinais de comparação (<text:span text:style-name="Source_20_Text">===</text:span> e <text:span text:style-name="Source_20_Text">&gt;</text:span>) para responder <text:span text:style-name="Source_20_Text">true</text:span> ou <text:span text:style-name="Source_20_Text">false</text:span> para cada lado:</text:p>
      <text:list text:style-name="L7">
        <text:list-item>
          <text:p text:style-name="P15"><text:span text:style-name="T1">Lado esquerdo:</text:span> <text:span text:style-name="Source_20_Text">15 === 15</text:span>? Quinze é estritamente igual a quinze? <text:span text:style-name="T1">Sim (</text:span><text:span text:style-name="Source_20_Text"><text:span text:style-name="T1">true</text:span></text:span><text:span text:style-name="T1">)</text:span>.</text:p>
        </text:list-item>
        <text:list-item>
          <text:p text:style-name="P15"><text:span text:style-name="T1">Lado direito:</text:span> <text:span text:style-name="Source_20_Text">6 &gt; 7</text:span>? Seis é maior que sete? <text:span text:style-name="T1">Não (</text:span><text:span text:style-name="Source_20_Text"><text:span text:style-name="T1">false</text:span></text:span><text:span text:style-name="T1">)</text:span>.</text:p>
        </text:list-item>
      </text:list>
      <text:p text:style-name="P1">Substituindo os resultados das comparações, a linha agora virou isso:</text:p>
      <text:p text:style-name="P8">JavaScript</text:p>
      <text:p text:style-name="P5"><text:span text:style-name="Source_20_Text">const testeFinal = true &amp;&amp; false;</text:span></text:p>
      <text:h text:style-name="P10" text:outline-level="3">Passo 3: O veredito com o operador lógico 🧠</text:h>
      <text:p text:style-name="P1">Agora sobrou apenas o operador <text:span text:style-name="Source_20_Text">&amp;&amp;</text:span> (AND). Lembra da regra dele que vimos lá atrás? Para o <text:span text:style-name="Source_20_Text">&amp;&amp;</text:span> dar <text:span text:style-name="Source_20_Text">true</text:span>, <text:span text:style-name="T1">os dois lados precisam ser verdadeiros</text:span>.</text:p>
      <text:p text:style-name="P1">Como temos <text:span text:style-name="Source_20_Text">true</text:span> de um lado, mas <text:span text:style-name="Source_20_Text">false</text:span> do outro, o que acontece? Tudo desmorona.</text:p>
      <text:p text:style-name="P1">Portanto, o resultado final guardado em <text:span text:style-name="Source_20_Text">testeFinal</text:span> é: <text:span text:style-name="Source_20_Text"><text:span text:style-name="T1">false</text:span></text:span>.</text:p>
      <text:h text:style-name="P3" text:outline-level="3">Olhando o processo inteiro:</text:h>
      <text:p text:style-name="P8">Plaintext</text:p>
      <text:p text:style-name="P5"><text:span text:style-name="Source_20_Text">10 + 5 === 15 <text:s/>&amp;&amp; <text:s/>2 * 3 &gt; 7</text:span></text:p>
      <text:p text:style-name="P5"><text:span text:style-name="Source_20_Text"><text:s text:c="2"/>\ / <text:s text:c="15"/>\ /</text:span></text:p>
      <text:p text:style-name="P5"><text:span text:style-name="Source_20_Text"><text:s text:c="3"/>15 === 15 <text:s text:c="2"/>&amp;&amp; <text:s text:c="4"/>6 <text:s/>&gt; 7</text:span></text:p>
      <text:p text:style-name="P5"><text:span text:style-name="Source_20_Text"><text:s text:c="5"/>\ <text:s text:c="2"/>/ <text:s text:c="12"/>\ <text:s text:c="2"/>/</text:span></text:p>
      <text:p text:style-name="P5"><text:span text:style-name="Source_20_Text"><text:s text:c="5"/>true <text:s text:c="5"/>&amp;&amp; <text:s text:c="5"/>false</text:span></text:p>
      <text:p text:style-name="P5"><text:span text:style-name="Source_20_Text"><text:s text:c="9"/>\ <text:s text:c="11"/>/</text:span></text:p>
      <text:p text:style-name="P5"><text:span text:style-name="Source_20_Text"><text:s text:c="13"/>false</text:span></text:p>
      <text:p text:style-name="P1">Deu para clarear a mente agora que separamos o código em etapas, ou ainda tem alguma parte fazendo um nó aí na sua cabeça? Pode ser sincero!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3:06:42.848243677</dc:date>
    <dc:creator>João António</dc:creator>
    <meta:editing-duration>PT2H6M59S</meta:editing-duration>
    <meta:editing-cycles>13</meta:editing-cycles>
    <meta:generator>LibreOffice/26.2.4.2$Linux_X86_64 LibreOffice_project/620$Build-2</meta:generator>
    <meta:document-statistic meta:table-count="0" meta:image-count="0" meta:object-count="0" meta:page-count="3" meta:paragraph-count="76" meta:word-count="769" meta:character-count="4081" meta:non-whitespace-character-count="3310"/>
  </office:meta>
</office:document-meta>
</file>