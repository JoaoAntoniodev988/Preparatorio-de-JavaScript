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4%"/>
      <style:text-properties officeooo:rsid="001ef461"/>
    </style:style>
    <style:style style:name="P2" style:family="paragraph" style:parent-style-name="Text_20_body" style:list-style-name="L1">
      <style:paragraph-properties fo:line-height="114%"/>
      <style:text-properties officeooo:rsid="001ef461"/>
    </style:style>
    <style:style style:name="P3" style:family="paragraph" style:parent-style-name="Heading_20_3">
      <style:paragraph-properties fo:margin-top="0cm" fo:margin-bottom="0.247cm" style:contextual-spacing="false" fo:line-height="114%"/>
      <style:text-properties officeooo:rsid="001ef461"/>
    </style:style>
    <style:style style:name="P4" style:family="paragraph" style:parent-style-name="Text_20_body" style:list-style-name="L2">
      <style:paragraph-properties fo:line-height="114%"/>
      <style:text-properties officeooo:rsid="001ef461"/>
    </style:style>
    <style:style style:name="P5" style:family="paragraph" style:parent-style-name="Text_20_body">
      <style:paragraph-properties fo:margin-left="0cm" fo:margin-right="0cm" fo:line-height="114%" fo:text-indent="0cm" style:auto-text-indent="false"/>
      <style:text-properties officeooo:rsid="001ef461"/>
    </style:style>
    <style:style style:name="P6" style:family="paragraph" style:parent-style-name="Preformatted_20_Text">
      <style:paragraph-properties fo:margin-top="0cm" fo:margin-bottom="0.247cm" style:contextual-spacing="false" fo:line-height="114%"/>
      <style:text-properties officeooo:rsid="001ef461"/>
    </style:style>
    <style:style style:name="P7" style:family="paragraph" style:parent-style-name="Heading_20_3">
      <style:paragraph-properties fo:line-height="114%"/>
      <style:text-properties officeooo:rsid="001ef461"/>
    </style:style>
    <style:style style:name="P8" style:family="paragraph" style:parent-style-name="Heading_20_2">
      <style:paragraph-properties fo:margin-top="0cm" fo:margin-bottom="0.247cm" style:contextual-spacing="false" fo:line-height="114%"/>
      <style:text-properties officeooo:rsid="001ef461"/>
    </style:style>
    <style:style style:name="P9" style:family="paragraph" style:parent-style-name="Text_20_body" style:list-style-name="L3">
      <style:paragraph-properties fo:line-height="114%"/>
      <style:text-properties officeooo:rsid="001ef461"/>
    </style:style>
    <style:style style:name="P10" style:family="paragraph" style:parent-style-name="Text_20_body" style:list-style-name="L4">
      <style:paragraph-properties fo:line-height="114%"/>
      <style:text-properties officeooo:rsid="001ef461"/>
    </style:style>
    <style:style style:name="P11" style:family="paragraph" style:parent-style-name="Text_20_body" style:list-style-name="L5">
      <style:paragraph-properties fo:line-height="114%"/>
      <style:text-properties officeooo:rsid="001ef461"/>
    </style:style>
    <style:style style:name="P12" style:family="paragraph" style:parent-style-name="Text_20_body" style:list-style-name="L6">
      <style:paragraph-properties fo:line-height="114%"/>
      <style:text-properties officeooo:rsid="001ef461"/>
    </style:style>
    <style:style style:name="P13" style:family="paragraph" style:parent-style-name="Quotations">
      <style:paragraph-properties fo:margin-top="0cm" fo:margin-bottom="0.247cm" style:contextual-spacing="false" fo:line-height="114%"/>
      <style:text-properties officeooo:rsid="001ef461"/>
    </style:style>
    <style:style style:name="P14" style:family="paragraph" style:parent-style-name="Quotations" style:list-style-name="L7">
      <style:paragraph-properties fo:margin-top="0cm" fo:margin-bottom="0.247cm" style:contextual-spacing="false" fo:line-height="114%"/>
      <style:text-properties officeooo:rsid="001ef461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<text:span text:style-name="T1">Operadores Lógicos</text:span> servem para unir duas ou mais comparações na mesma linha de código. Eles nos ajudam a criar regras mais complexas e inteligentes para os nossos sistemas.</text:p>
      <text:p text:style-name="P1">Os dois principais que você vai usar 99% do tempo são:</text:p>
      <text:list text:style-name="L1">
        <text:list-item>
          <text:p text:style-name="P2"><text:span text:style-name="Source_20_Text">&amp;&amp;</text:span> (Operador <text:span text:style-name="T1">E</text:span> / <text:span text:style-name="T1">AND</text:span>)</text:p>
        </text:list-item>
        <text:list-item>
          <text:p text:style-name="P2"><text:span text:style-name="Source_20_Text">||</text:span> (Operador <text:span text:style-name="T1">OU</text:span> / <text:span text:style-name="T1">OR</text:span>)</text:p>
        </text:list-item>
      </text:list>
      <text:p text:style-name="P1">Vamos começar com o operador <text:span text:style-name="Source_20_Text">&amp;&amp;</text:span> (AND). A regra dele é rígida: para o resultado final ser <text:span text:style-name="Source_20_Text">true</text:span>, <text:span text:style-name="T1">todas</text:span> as condições precisam ser verdadeiras. Se apenas uma for falsa, tudo desmorona e vira <text:span text:style-name="Source_20_Text">false</text:span>.</text:p>
      <text:h text:style-name="P3" text:outline-level="3">Desafio 1: O Operador <text:span text:style-name="Source_20_Text">&amp;&amp;</text:span> (AND) — Saque no Banco</text:h>
      <text:p text:style-name="P1">Imagine que um cliente vai até um caixa eletrônico para sacar R$ 100,00. Para o caixa liberar o dinheiro, duas condições precisam ser verdadeiras ao mesmo tempo:</text:p>
      <text:list text:style-name="L2">
        <text:list-item>
          <text:p text:style-name="P4">O cliente precisa ter saldo na conta.</text:p>
        </text:list-item>
        <text:list-item>
          <text:p text:style-name="P4">O caixa precisa ter dinheiro físico dentro dele.</text:p>
        </text:list-item>
      </text:list>
      <text:p text:style-name="P1">Olha o cenário do código:</text:p>
      <text:p text:style-name="P5">JavaScript</text:p>
      <text:p text:style-name="P6"><text:span text:style-name="Source_20_Text">const temSaldoNaConta = true;</text:span></text:p>
      <text:p text:style-name="P6"><text:span text:style-name="Source_20_Text">const caixaTemDinheiro = false; // O caixa está sem notas físicas!</text:span></text:p>
      <text:p text:style-name="P6"/>
      <text:p text:style-name="P6"><text:span text:style-name="Source_20_Text">// O operador &amp;&amp; diz: "Isso E aquilo precisam ser true"</text:span></text:p>
      <text:p text:style-name="P6"><text:span text:style-name="Source_20_Text">const podeRealizarSaque = temSaldoNaConta &amp;&amp; caixaTemDinheiro;</text:span></text:p>
      <text:p text:style-name="P6"/>
      <text:p text:style-name="P6"><text:span text:style-name="Source_20_Text">console.log(podeRealizarSaque);</text:span></text:p>
      <text:p text:style-name="P1">Se você rodar esse código, o que o <text:span text:style-name="Source_20_Text">console.log</text:span> vai responder: <text:span text:style-name="Source_20_Text"><text:span text:style-name="T1">true</text:span></text:span> ou <text:span text:style-name="Source_20_Text"><text:span text:style-name="T1">false</text:span></text:span>?</text:p>
      <text:h text:style-name="P3" text:outline-level="3">Desafio 2: O Operador <text:span text:style-name="Source_20_Text">||</text:span> (OR) — Entrada na Balada</text:h>
      <text:p text:style-name="P1">O operador <text:span text:style-name="Source_20_Text">||</text:span> (OU) é muito mais amigável e generoso. Para ele dar <text:span text:style-name="Source_20_Text">true</text:span>, <text:span text:style-name="T1">basta que uma</text:span> das condições seja verdadeira. Ele só vai dar <text:span text:style-name="Source_20_Text">false</text:span> se absolutamente tudo for falso.</text:p>
      <text:p text:style-name="P1">Imagine a regra de entrada em uma festa VIP: você pode entrar se o seu nome estiver na lista de convidados <text:span text:style-name="T1">OU</text:span> se você pagar o ingresso VIP.</text:p>
      <text:p text:style-name="P1">Olha esse cenário:</text:p>
      <text:p text:style-name="P5">JavaScript</text:p>
      <text:p text:style-name="P6"><text:span text:style-name="Source_20_Text">const nomeNaLista = false; // O nome não está na lista</text:span></text:p>
      <text:p text:style-name="P6"><text:span text:style-name="Source_20_Text">const pagouIngressoVip = true; // Mas a pessoa comprou o ingresso VIP</text:span></text:p>
      <text:p text:style-name="P6"/>
      <text:p text:style-name="P6"><text:span text:style-name="Source_20_Text">// O operador || diz: "Se isso OU aquilo for true, tá valendo"</text:span></text:p>
      <text:p text:style-name="P6"><text:span text:style-name="Source_20_Text">const entradaLiberada = nomeNaLista || pagouIngressoVip;</text:span></text:p>
      <text:p text:style-name="P6"><text:soft-page-break/></text:p>
      <text:p text:style-name="P6"><text:span text:style-name="Source_20_Text">console.log(entradaLiberada);</text:span></text:p>
      <text:p text:style-name="P1">E nesse caso da balada, o JavaScript vai responder <text:span text:style-name="Source_20_Text"><text:span text:style-name="T1">true</text:span></text:span> ou <text:span text:style-name="Source_20_Text"><text:span text:style-name="T1">false</text:span></text:span>?</text:p>
      <text:h text:style-name="P7" text:outline-level="3">Desafio 3: O Operador <text:span text:style-name="Source_20_Text">!</text:span> (NOT) — Sistema de Alarme</text:h>
      <text:p text:style-name="P1">Imagine um sensor de presença de uma casa. Se não tem ninguém em casa, o sensor diz que o ambiente está vazio.</text:p>
      <text:p text:style-name="P5">JavaScript</text:p>
      <text:p text:style-name="P6"><text:span text:style-name="Source_20_Text">const temAlguemNaCasa = false; </text:span></text:p>
      <text:p text:style-name="P6"/>
      <text:p text:style-name="P6"><text:span text:style-name="Source_20_Text">// O símbolo ! colocado na frente inverte o valor de false para true</text:span></text:p>
      <text:p text:style-name="P6"><text:span text:style-name="Source_20_Text">const ativarAlarme = !temAlguemNaCasa;</text:span></text:p>
      <text:p text:style-name="P6"><text:span text:style-name="Source_20_Text">console.log(ativarAlarme);</text:span></text:p>
      <text:p text:style-name="P1">Pensando na inversão que o <text:span text:style-name="Source_20_Text">!</text:span> faz, qual será o resultado impresso no console: <text:span text:style-name="Source_20_Text"><text:span text:style-name="T1">true</text:span></text:span> ou <text:span text:style-name="Source_20_Text"><text:span text:style-name="T1">false</text:span></text:span>?</text:p>
      <text:p text:style-name="P1">Se os operadores de comparação são o "cérebro" que toma as decisões, os <text:span text:style-name="T1">Operadores Lógicos</text:span> são o "sistema nervoso" que permite criar regras de negócio inteligentes, combinando várias condições de uma vez só.</text:p>
      <text:p text:style-name="P1">Aqui está onde eles mandam no dia a dia da programação:</text:p>
      <text:h text:style-name="P8" text:outline-level="2">1. Segurança e Login (Duplo Fator de Autenticação)</text:h>
      <text:p text:style-name="P1">Sabe quando você vai entrar no aplicativo do seu banco e ele pede a sua senha <text:span text:style-name="T1">E</text:span> um código que chega por SMS?</text:p>
      <text:list text:style-name="L3">
        <text:list-item>
          <text:p text:style-name="P9"><text:span text:style-name="T1">Onde entra o </text:span><text:span text:style-name="Source_20_Text"><text:span text:style-name="T1">&amp;&amp;</text:span></text:span><text:span text:style-name="T1">:</text:span> O sistema só te dá acesso se: <text:span text:style-name="Source_20_Text">senhaCorreta === true &amp;&amp; codigoSmsCorreto === true</text:span>. Se você errar o SMS, mesmo com a senha certa, o <text:span text:style-name="Source_20_Text">&amp;&amp;</text:span> barra a sua entrada.</text:p>
        </text:list-item>
      </text:list>
      <text:h text:style-name="P8" text:outline-level="2">2. Sistemas de Desconto e Promoções (iFood, Uber, E-commerce)</text:h>
      <text:p text:style-name="P1">Imagine uma promoção de "Sexta-Feira do Frete Grátis" ou "Desconto para Novos Usuários".</text:p>
      <text:list text:style-name="L4">
        <text:list-item>
          <text:p text:style-name="P10"><text:span text:style-name="T1">Onde entra o </text:span><text:span text:style-name="Source_20_Text"><text:span text:style-name="T1">||</text:span></text:span><text:span text:style-name="T1">:</text:span> O aplicativo do iFood te dá frete grátis se: <text:span text:style-name="Source_20_Text">valorDaCompra &gt;= 100 || primeiraCompraDoUsuario === true</text:span>. Basta você cumprir <text:span text:style-name="T1">uma</text:span> das duas regras para o frete zerar. Se for a sua primeira compra, não importa se você gastou só R$ 15,00, o frete será grátis.</text:p>
        </text:list-item>
      </text:list>
      <text:h text:style-name="P8" text:outline-level="2">3. Bloqueio de Botões e Formulários</text:h>
      <text:p text:style-name="P1">Sabe quando você está preenchendo um cadastro na internet e o botão "Avançar" fica cinza (bloqueado) até você preencher tudo?</text:p>
      <text:list text:style-name="L5">
        <text:list-item>
          <text:p text:style-name="P11"><text:soft-page-break/><text:span text:style-name="T1">Onde entra o </text:span><text:span text:style-name="Source_20_Text"><text:span text:style-name="T1">&amp;&amp;</text:span></text:span><text:span text:style-name="T1">:</text:span> O JavaScript fica testando: <text:span text:style-name="Source_20_Text">nomeDigitado !== "" &amp;&amp; emailDigitado !== "" &amp;&amp; senhaDigitada !== ""</text:span>. Enquanto todas as caixas não forem <text:span text:style-name="Source_20_Text">true</text:span> (verdadeiras), o botão não ativa.</text:p>
        </text:list-item>
      </text:list>
      <text:h text:style-name="P8" text:outline-level="2">4. Inversão de Estados (Menus e Pop-ups)</text:h>
      <text:p text:style-name="P1">Sabe quando você está no menu de um site no celular (aqueles três risquinhos), você clica e o menu abre, você clica de novo e o menu fecha?</text:p>
      <text:list text:style-name="L6">
        <text:list-item>
          <text:p text:style-name="P12"><text:span text:style-name="T1">Onde entra o </text:span><text:span text:style-name="Source_20_Text"><text:span text:style-name="T1">!</text:span></text:span><text:span text:style-name="T1">:</text:span> O programador cria uma variável chamada <text:span text:style-name="Source_20_Text">menuAberto</text:span>. Quando você clica no botão, o sistema diz: <text:span text:style-name="Source_20_Text">menuAberto = !menuAberto</text:span>. Ou seja, se estava aberto (<text:span text:style-name="Source_20_Text">true</text:span>), vira fechado (<text:span text:style-name="Source_20_Text">false</text:span>). Se estava fechado, vira aberto. É um interruptor perfeito!</text:p>
        </text:list-item>
      </text:list>
      <text:p text:style-name="P13">💡 <text:span text:style-name="T1">Resumo da Ópera:</text:span></text:p>
      <text:list text:style-name="L7">
        <text:list-item>
          <text:p text:style-name="P14">O <text:span text:style-name="Source_20_Text">&amp;&amp;</text:span> serve para <text:span text:style-name="T1">exigir</text:span> que o usuário cumpra todos os requisitos de segurança ou cadastro.</text:p>
        </text:list-item>
        <text:list-item>
          <text:p text:style-name="P14">O <text:span text:style-name="Source_20_Text">||</text:span> serve para dar <text:span text:style-name="T1">alternativas</text:span> e facilidades para o usuário (vários caminhos que levam ao mesmo resultado).</text:p>
        </text:list-item>
        <text:list-item>
          <text:p text:style-name="P14">O <text:span text:style-name="Source_20_Text">!</text:span> serve para criar <text:span text:style-name="T1">interruptores</text:span> (ligar/desligar, abrir/fechar, ativar/desativar)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5T23:21:18.255979019</meta:creation-date>
    <dc:date>2026-06-26T01:29:30.523236691</dc:date>
    <dc:creator>João António</dc:creator>
    <meta:editing-duration>PT1H7M15S</meta:editing-duration>
    <meta:editing-cycles>8</meta:editing-cycles>
    <meta:generator>LibreOffice/26.2.4.2$Linux_X86_64 LibreOffice_project/620$Build-2</meta:generator>
    <meta:document-statistic meta:table-count="0" meta:image-count="0" meta:object-count="0" meta:page-count="3" meta:paragraph-count="54" meta:word-count="757" meta:character-count="4355" meta:non-whitespace-character-count="3659"/>
  </office:meta>
</office:document-meta>
</file>