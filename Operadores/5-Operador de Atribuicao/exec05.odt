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officeooo:rsid="001ef461"/>
    </style:style>
    <style:style style:name="P2" style:family="paragraph" style:parent-style-name="Heading_20_3">
      <style:paragraph-properties fo:margin-top="0cm" fo:margin-bottom="0.247cm" style:contextual-spacing="false" fo:line-height="114%"/>
      <style:text-properties officeooo:rsid="001ef461"/>
    </style:style>
    <style:style style:name="P3" style:family="paragraph" style:parent-style-name="Standard">
      <style:paragraph-properties fo:line-height="114%"/>
      <style:text-properties officeooo:rsid="001ef461"/>
    </style:style>
    <style:style style:name="P4" style:family="paragraph" style:parent-style-name="Preformatted_20_Text">
      <style:paragraph-properties fo:margin-top="0cm" fo:margin-bottom="0.247cm" style:contextual-spacing="false" fo:line-height="114%"/>
      <style:text-properties officeooo:rsid="001ef461"/>
    </style:style>
    <style:style style:name="P5" style:family="paragraph" style:parent-style-name="Text_20_body">
      <style:paragraph-properties fo:margin-left="0cm" fo:margin-right="0cm" fo:line-height="114%" fo:text-indent="0cm" style:auto-text-indent="false"/>
      <style:text-properties officeooo:rsid="001ef461"/>
    </style:style>
    <style:style style:name="P6" style:family="paragraph" style:parent-style-name="Heading_20_3">
      <style:paragraph-properties fo:line-height="114%"/>
      <style:text-properties officeooo:rsid="001ef461"/>
    </style:style>
    <style:style style:name="P7" style:family="paragraph" style:parent-style-name="Text_20_body">
      <style:paragraph-properties fo:line-height="114%"/>
      <style:text-properties style:font-name="Google Sans Text" officeooo:rsid="001ef461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officeooo:rsid="001ef461"/>
    </style:style>
    <style:style style:name="P9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1ef461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1ef461"/>
    </style:style>
    <style:style style:name="P11" style:family="paragraph" style:parent-style-name="Text_20_body" style:list-style-name="L1">
      <style:paragraph-properties fo:line-height="114%"/>
      <style:text-properties officeooo:rsid="001ef461"/>
    </style:style>
    <style:style style:name="P12" style:family="paragraph" style:parent-style-name="Text_20_body" style:list-style-name="L2">
      <style:paragraph-properties fo:line-height="114%"/>
      <style:text-properties officeooo:rsid="001ef461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ora que você pegou a lógica, vamos entrar nos <text:span text:style-name="T1">Operadores de Atribuição</text:span>. Você já conhece o mais famoso de todos, que é o sinal de igual (<text:span text:style-name="Source_20_Text">=</text:span>). Ele serve para guardar um valor dentro de uma variável.</text:p>
      <text:p text:style-name="P1">Mas no dia a dia, a gente precisa muito <text:span text:style-name="T1">atualizar</text:span> o valor de uma variável baseado no valor que ela já tinha antes. É aí que entram os operadores de <text:span text:style-name="T1">Atribuição Composta</text:span> (<text:span text:style-name="Source_20_Text">+=</text:span>, <text:span text:style-name="Source_20_Text">-=</text:span>, <text:span text:style-name="Source_20_Text">*=</text:span>, <text:span text:style-name="Source_20_Text">/=</text:span>). Eles são atalhos para escrever menos código.</text:p>
      <text:h text:style-name="P2" text:outline-level="3">Desafio 1: O Atalho da Adição (<text:span text:style-name="Source_20_Text">+=</text:span>)</text:h>
      <text:p text:style-name="P1">Imagine que você tem um jogo e o jogador começa com <text:span text:style-name="T1">10 pontos</text:span>. Ele acabou de derrotar um monstro e ganhou mais <text:span text:style-name="T1">5 pontos</text:span>.</text:p>
      <text:p text:style-name="P1">Sem o atalho, você escreveria assim (usando <text:span text:style-name="Source_20_Text">let</text:span> porque o valor vai mudar):</text:p>
      <text:p text:style-name="P3">JavaScript</text:p>
      <text:p text:style-name="P4"><text:span text:style-name="Source_20_Text">let pontos = 10;</text:span></text:p>
      <text:p text:style-name="P4"><text:span text:style-name="Source_20_Text">pontos = pontos + 5; // Pega os 10 que já tinha e soma 5</text:span></text:p>
      <text:p text:style-name="P1">Com o atalho do <text:span text:style-name="Source_20_Text">+=</text:span>, você faz exatamente a mesma coisa, só que mais rápido:</text:p>
      <text:p text:style-name="P3">JavaScript</text:p>
      <text:p text:style-name="P4"><text:span text:style-name="Source_20_Text">let pontos = 10;</text:span></text:p>
      <text:p text:style-name="P4"><text:span text:style-name="Source_20_Text">pontos += 5; // Isso significa: "pontos recebe ele mesmo mais 5"</text:span></text:p>
      <text:p text:style-name="P4"/>
      <text:p text:style-name="P4"><text:span text:style-name="Source_20_Text">console.log(pontos);</text:span></text:p>
      <text:p text:style-name="P1">Se você rodar esse código com o atalho, quantos pontos vão aparecer no <text:span text:style-name="Source_20_Text">console.log</text:span>?</text:p>
      <text:h text:style-name="P2" text:outline-level="3">Desafio 2: O Atalho da Subtração (<text:span text:style-name="Source_20_Text">-=</text:span>)</text:h>
      <text:p text:style-name="P1">O mesmo jogador agora tem <text:span text:style-name="T1">20 pontos de vida</text:span>. Ele caiu em uma armadilha e perdeu <text:span text:style-name="T1">3 pontos de vida</text:span>.</text:p>
      <text:p text:style-name="P1">Dessa vez, tente usar o atalho de subtração (<text:span text:style-name="Source_20_Text">-=</text:span>) para atualizar a vida dele. Complete o código:</text:p>
      <text:p text:style-name="P5">JavaScript</text:p>
      <text:p text:style-name="P4"><text:span text:style-name="Source_20_Text">let vida = 20;</text:span></text:p>
      <text:p text:style-name="P4"/>
      <text:p text:style-name="P4"><text:span text:style-name="Source_20_Text">// Use o atalho para tirar 3 da vida</text:span></text:p>
      <text:p text:style-name="P4"><text:span text:style-name="Source_20_Text">vida ___ 3;</text:span></text:p>
      <text:p text:style-name="P4"/>
      <text:p text:style-name="P4"><text:span text:style-name="Source_20_Text">console.log(vida);</text:span></text:p>
      <text:p text:style-name="P1">Qual operador entra no espaço e qual será o resultado final da <text:span text:style-name="Source_20_Text">vida</text:span> impresso no console?</text:p>
      <text:h text:style-name="P6" text:outline-level="3">Desafio 3: O Dobro de Moedas (<text:span text:style-name="Source_20_Text">*=</text:span>)</text:h>
      <text:p text:style-name="P1">No seu jogo, o personagem pegou um item especial que <text:span text:style-name="T1">dobra</text:span> a quantidade de moedas que ele tem. Ele tinha <text:span text:style-name="T1">15 moedas</text:span>.</text:p>
      <text:p text:style-name="P5"><text:soft-page-break/>JavaScript</text:p>
      <text:p text:style-name="P4"><text:span text:style-name="Source_20_Text">let moedas = 15;</text:span></text:p>
      <text:p text:style-name="P4"><text:span text:style-name="Source_20_Text">moedas *= 2; // Significa: moedas = moedas * 2</text:span></text:p>
      <text:p text:style-name="P4"/>
      <text:p text:style-name="P4"><text:span text:style-name="Source_20_Text">console.log(moedas);</text:span></text:p>
      <text:p text:style-name="P1">Qual será o resultado final impresso no console?</text:p>
      <text:h text:style-name="P2" text:outline-level="3">Desafio 4: Dividindo os Suprimentos (<text:span text:style-name="Source_20_Text">/=</text:span>)</text:h>
      <text:p text:style-name="P1">Um grupo de sobreviventes tinha <text:span text:style-name="T1">40 garrafas de água</text:span>. Eles precisaram dividir o estoque igualmente pela metade (<text:span text:style-name="Source_20_Text">/ 2</text:span>) para estocar em dois esconderijos diferentes.</text:p>
      <text:p text:style-name="P1">Complete o código usando o atalho de divisão:</text:p>
      <text:p text:style-name="P5">JavaScript</text:p>
      <text:p text:style-name="P4"><text:span text:style-name="Source_20_Text">let garrafasAgua = 40;</text:span></text:p>
      <text:p text:style-name="P4"/>
      <text:p text:style-name="P4"><text:span text:style-name="Source_20_Text">// Use o atalho para dividir por 2</text:span></text:p>
      <text:p text:style-name="P4"><text:span text:style-name="Source_20_Text">garrafasAgua ___ 2;</text:span></text:p>
      <text:p text:style-name="P4"/>
      <text:p text:style-name="P4"><text:span text:style-name="Source_20_Text">console.log(garrafasAgua);</text:span></text:p>
      <text:p text:style-name="P1">Qual operador entra no espaço e qual número vai aparecer no <text:span text:style-name="Source_20_Text">console.log</text:span>?</text:p>
      <text:p text:style-name="P7">Quase perfeito! Você acertou em cheio a lógica da divisão no segundo exercício, que deu <text:span text:style-name="T1">20</text:span>.</text:p>
      <text:p text:style-name="P8"><text:span text:style-name="T2">Mas dá uma olhada com atenção no primeiro exercício (o das moedas). Você colocou que o resultado seria </text:span><text:span text:style-name="Source_20_Text"><text:span text:style-name="T2">15</text:span></text:span><text:span text:style-name="T2">, mas lembre-se de que o operador </text:span><text:span text:style-name="Source_20_Text"><text:span text:style-name="T2">*= 2</text:span></text:span><text:span text:style-name="T2"> multiplica o valor atual por 2. Como ele tinha 15 moedas e o valor dobrou ($15 \times 2$), o resultado correto que o console vai mostrar é </text:span><text:span text:style-name="T3">30</text:span><text:span text:style-name="T2">.</text:span></text:p>
      <text:p text:style-name="P8"><text:span text:style-name="T2">Você percebeu como esses operadores economizam digitação? Em vez de escrever </text:span><text:span text:style-name="Source_20_Text"><text:span text:style-name="T2">moedas = moedas * 2</text:span></text:span><text:span text:style-name="T2">, você escreve apenas </text:span><text:span text:style-name="Source_20_Text"><text:span text:style-name="T2">moedas *= 2</text:span></text:span><text:span text:style-name="T2">.</text:span></text:p>
      <text:h text:style-name="P9" text:outline-level="3">Onde isso é usado em situações reais?</text:h>
      <text:p text:style-name="P10">Esses operadores de atribuição composta são os reis dos <text:span text:style-name="T1">contadores e atualizadores de status</text:span> em sistemas reais:</text:p>
      <text:p text:style-name="P1"><text:span text:style-name="T1">Carrinho de Compras (Adicionar Itens):</text:span> Quando você está na Amazon e clica para adicionar mais uma unidade de um produto, o sistema faz: <text:span text:style-name="Source_20_Text">totalCarrinho += precoDoProduto</text:span>.</text:p>
      <text:list text:style-name="L1">
        <text:list-item>
          <text:p text:style-name="P11"><text:span text:style-name="T1">Sistemas de Pontuação (Games):</text:span> Sempre que você mata um monstro ou completa uma missão, o jogo atualiza seus pontos com <text:span text:style-name="Source_20_Text">pontos += 100</text:span>.</text:p>
        </text:list-item>
        <text:list-item>
          <text:p text:style-name="P11"><text:soft-page-break/><text:span text:style-name="T1">Filtros de Desconto:</text:span> Se você aplica um cupom de 10% de desconto em uma loja, o sistema pode atualizar o preço direto na variável usando: <text:span text:style-name="Source_20_Text">preco *= 0.9</text:span> (reduzindo 10% do valor total).</text:p>
        </text:list-item>
      </text:list>
      <text:p text:style-name="P1">Fechamos mais um grupo! Agora você já conhece:</text:p>
      <text:list text:style-name="L2">
        <text:list-item>
          <text:p text:style-name="P12">Aritméticos (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)</text:p>
        </text:list-item>
        <text:list-item>
          <text:p text:style-name="P12">Comparação (<text:span text:style-name="Source_20_Text">&gt;</text:span>, <text:span text:style-name="Source_20_Text">&lt;</text:span>, <text:span text:style-name="Source_20_Text">===</text:span>, <text:span text:style-name="Source_20_Text">!==</text:span>)</text:p>
        </text:list-item>
        <text:list-item>
          <text:p text:style-name="P12">Lógicos (<text:span text:style-name="Source_20_Text">&amp;&amp;</text:span>, <text:span text:style-name="Source_20_Text">||</text:span>, <text:span text:style-name="Source_20_Text">!</text:span>)</text:p>
        </text:list-item>
        <text:list-item>
          <text:p text:style-name="P12">Ternário (<text:span text:style-name="Source_20_Text">? :</text:span>)</text:p>
        </text:list-item>
        <text:list-item>
          <text:p text:style-name="P12">Atribuição (<text:span text:style-name="Source_20_Text">=</text:span>, <text:span text:style-name="Source_20_Text">+=</text:span>, <text:span text:style-name="Source_20_Text">-=</text:span>, <text:span text:style-name="Source_20_Text">*=</text:span>, <text:span text:style-name="Source_20_Text">/=</text:span>)</text:p>
        </text:list-item>
      </text:list>
      <text:p text:style-name="P1">O que acha de fazermos um <text:span text:style-name="T1">Super Desafio Final</text:span> misturando esses conceitos para testar seu poder de leitura de código, ou prefere seguir para outro assunto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02:35:38.157119933</dc:date>
    <dc:creator>João António</dc:creator>
    <meta:editing-duration>PT1H38M39S</meta:editing-duration>
    <meta:editing-cycles>11</meta:editing-cycles>
    <meta:generator>LibreOffice/26.2.4.2$Linux_X86_64 LibreOffice_project/620$Build-2</meta:generator>
    <meta:document-statistic meta:table-count="0" meta:image-count="0" meta:object-count="0" meta:page-count="3" meta:paragraph-count="54" meta:word-count="654" meta:character-count="3588" meta:non-whitespace-character-count="2995"/>
  </office:meta>
</office:document-meta>
</file>