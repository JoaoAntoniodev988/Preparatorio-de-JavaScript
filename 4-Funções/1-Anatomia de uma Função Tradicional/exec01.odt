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rar no mundo das <text:span text:style-name="T1">funções</text:span> é o verdadeiro divisor de águas na programação. Até agora, escrevemos código que roda uma vez e desaparece. Com as funções, vamos aprender a criar <text:span text:style-name="T1">máquinas de código</text:span> que guardamos na memória e podemos ativar quando quisermos, quantas vezes quisermos!</text:p>
      <text:p text:style-name="Text_20_body">Para começar, vamos analisar a <text:span text:style-name="T1">Anatomia de uma Função Tradicional</text:span> (também chamada de <text:span text:style-name="T2">Function Declaration</text:span>).</text:p>
      <text:h text:style-name="P1" text:outline-level="3">🧐 O que é uma Função no Mundo Real?</text:h>
      <text:p text:style-name="Text_20_body">Pense numa função como uma <text:span text:style-name="T1">máquina de café de cápsulas</text:span>.</text:p>
      <text:list text:style-name="L1">
        <text:list-item>
          <text:p text:style-name="P2">Você coloca um ingrediente lá dentro (a cápsula de café).</text:p>
        </text:list-item>
        <text:list-item>
          <text:p text:style-name="P2">A máquina processa (aquece a água, passa pelo filtro).</text:p>
        </text:list-item>
        <text:list-item>
          <text:p text:style-name="P2">A máquina devolve-lhe um resultado (o café quentinho na chávena).</text:p>
        </text:list-item>
      </text:list>
      <text:h text:style-name="P1" text:outline-level="3">🧬 A Anatomia do Código</text:h>
      <text:p text:style-name="Text_20_body">Olhe para a estrutura desta função que serve para dar as boas-vindas a um utilizador:</text:p>
      <text:p text:style-name="P3">JavaScript</text:p>
      <text:p text:style-name="P4"><text:span text:style-name="Source_20_Text">function saudarUtilizador(nome) {</text:span></text:p>
      <text:p text:style-name="P4"><text:span text:style-name="Source_20_Text"><text:s text:c="4"/>const mensagem = "Olá, " + nome + "! Bem-vindo de volta.";</text:span></text:p>
      <text:p text:style-name="P4"><text:span text:style-name="Source_20_Text"><text:s text:c="4"/>return mensagem;</text:span></text:p>
      <text:p text:style-name="P4"><text:span text:style-name="Source_20_Text">}</text:span></text:p>
      <text:p text:style-name="Text_20_body">Vamos desmontar esta máquina peça por peça:</text:p>
      <text:list text:style-name="L2">
        <text:list-item>
          <text:p text:style-name="P5"><text:span text:style-name="T1">A palavra-chave </text:span><text:span text:style-name="Source_20_Text"><text:span text:style-name="T1">function</text:span></text:span><text:span text:style-name="T1">:</text:span> É o botão que avisa o JavaScript: <text:span text:style-name="T2">"Atenção, vou criar uma máquina agora!"</text:span></text:p>
        </text:list-item>
        <text:list-item>
          <text:p text:style-name="P5"><text:span text:style-name="T1">O Nome da Função (</text:span><text:span text:style-name="Source_20_Text"><text:span text:style-name="T1">saudarUtilizador</text:span></text:span><text:span text:style-name="T1">):</text:span> É o nome que escolhemos para a máquina, para a podermos chamar mais tarde. Usamos sempre verbos de ação (ex: <text:span text:style-name="Source_20_Text">calcularTotal</text:span>, <text:span text:style-name="Source_20_Text">enviarEmail</text:span>).</text:p>
        </text:list-item>
        <text:list-item>
          <text:p text:style-name="P5"><text:span text:style-name="T1">Os Parâmetros (</text:span><text:span text:style-name="Source_20_Text"><text:span text:style-name="T1">(nome)</text:span></text:span><text:span text:style-name="T1">):</text:span> São os <text:span text:style-name="T1">parênteses</text:span>. Funcionam como a entrada da máquina de café. É o espaço reservado para o dado que a função precisa para trabalhar.</text:p>
        </text:list-item>
        <text:list-item>
          <text:p text:style-name="P5"><text:span text:style-name="T1">O Corpo </text:span><text:span text:style-name="Source_20_Text"><text:span text:style-name="T1">{ ... }</text:span></text:span><text:span text:style-name="T1">:</text:span> As <text:span text:style-name="T1">chavetas</text:span> guardam o segredo da máquina. É aqui dentro que a magia e a lógica acontecem.</text:p>
        </text:list-item>
        <text:list-item>
          <text:p text:style-name="P5"><text:span text:style-name="T1">A palavra-chave </text:span><text:span text:style-name="Source_20_Text"><text:span text:style-name="T1">return</text:span></text:span><text:span text:style-name="T1">:</text:span> É a <text:span text:style-name="T1">saída</text:span> da máquina. Ela diz ao JavaScript: <text:span text:style-name="T2">"O meu trabalho acabou, pega aqui no resultado final e leva para fora!"</text:span></text:p>
        </text:list-item>
      </text:list>
      <text:h text:style-name="P1" text:outline-level="3">📞 Como Ligar a Máquina? (Chamar a Função)</text:h>
      <text:p text:style-name="Text_20_body">Escrever a função não faz nada acontecer no ecrã. O código fica guardado na memória, a dormir. Para a ligar, precisamos de a <text:span text:style-name="T1">chamar</text:span> (ou invocar) pelo nome, passando o valor real (chamado de <text:span text:style-name="T1">argumento</text:span>):</text:p>
      <text:p text:style-name="P3">JavaScript</text:p>
      <text:p text:style-name="P4"><text:soft-page-break/><text:span text:style-name="Source_20_Text">// Chamamos a função e guardamos o resultado numa variável</text:span></text:p>
      <text:p text:style-name="P4"><text:span text:style-name="Source_20_Text">let saudacaoDoCarlos = saudarUtilizador("Carlos");</text:span></text:p>
      <text:p text:style-name="P4"/>
      <text:p text:style-name="P4"><text:span text:style-name="Source_20_Text">console.log(saudacaoDoCarlos); </text:span></text:p>
      <text:p text:style-name="P4"><text:span text:style-name="Source_20_Text">// Imprime: Olá, Carlos! Bem-vindo de volta.</text:span></text:p>
      <text:h text:style-name="P1" text:outline-level="3">🏋️‍♂️ Exercício 1: A Máquina de Somar</text:h>
      <text:p text:style-name="Text_20_body">Vamos testar a sua capacidade de ler a anatomia de uma função. Olhe para esta máquina matemática:</text:p>
      <text:p text:style-name="P6">JavaScript</text:p>
      <text:p text:style-name="P4"><text:span text:style-name="Source_20_Text">function somarDoisNumeros(numeroA, numeroB) {</text:span></text:p>
      <text:p text:style-name="P4"><text:span text:style-name="Source_20_Text"><text:s text:c="4"/>let resultado = numeroA + numeroB;</text:span></text:p>
      <text:p text:style-name="P4"><text:span text:style-name="Source_20_Text"><text:s text:c="4"/>return resultado;</text:span></text:p>
      <text:p text:style-name="P4"><text:span text:style-name="Source_20_Text">}</text:span></text:p>
      <text:p text:style-name="P4"><text:span text:style-name="Source_20_Text">let contaFinal = somarDoisNumeros(5, 10);</text:span></text:p>
      <text:p text:style-name="P7">A tua missão no Exercício 1:</text:p>
      <text:list text:style-name="L3">
        <text:list-item>
          <text:p text:style-name="P8">Quais são os nomes dos dois <text:span text:style-name="T1">parâmetros</text:span> (as entradas) que esta função precisa para trabalhar?</text:p>
        </text:list-item>
        <text:list-item>
          <text:p text:style-name="P8">Quando chamamos <text:span text:style-name="Source_20_Text">somarDoisNumeros(5, 10)</text:span>, o que a palavra-chave <text:span text:style-name="Source_20_Text">return</text:span> vai enviar para fora da função? Qual será o valor guardado na variável <text:span text:style-name="Source_20_Text">contaFinal</text:span>?</text:p>
        </text:list-item>
        <text:list-item>
          <text:p text:style-name="P8">Se eu tentar fazer <text:span text:style-name="Source_20_Text">console.log(resultado)</text:span> na última linha, fora das chavetas da função, o código vai funcionar ou vai dar erro? O que acha?</text:p>
        </text:list-item>
      </text:list>
      <text:p text:style-name="Text_20_body">numeroA, numeroB . 15</text:p>
      <text:p text:style-name="Text_20_body"><text:span text:style-name="T1">Resposta 100% exata na matemática e nos parâmetros!</text:span> 🎯</text:p>
      <text:p text:style-name="Text_20_body">Os parâmetros são mesmo o <text:span text:style-name="Source_20_Text">numeroA</text:span> e o <text:span text:style-name="Source_20_Text">numeroB</text:span>, e o <text:span text:style-name="Source_20_Text">return</text:span> enviou o valor <text:span text:style-name="T1">15</text:span> para fora, guardando-o direitinho na variável <text:span text:style-name="Source_20_Text">contaFinal</text:span>.</text:p>
      <text:p text:style-name="Text_20_body">Deixou apenas a pergunta número 3 por responder, mas ela guarda um dos segredos mais importantes das funções! Vamos ver:</text:p>
      <text:h text:style-name="P1" text:outline-level="3">⚠️ O Mistério da Pergunta 3: O Erro de Escopo</text:h>
      <text:p text:style-name="Text_20_body">Se tentasse fazer <text:span text:style-name="Source_20_Text">console.log(resultado)</text:span> fora da função, o JavaScript ia lançar um <text:span text:style-name="T1">erro fatal</text:span> (<text:span text:style-name="Source_20_Text">ReferenceError: resultado is not defined</text:span>).</text:p>
      <text:p text:style-name="Text_20_body"><text:span text:style-name="T1">Porquê?</text:span> Tudo o que é criado dentro das chavetas de uma função nasce e morre lá dentro. É o chamado <text:span text:style-name="T1">Escopo Local</text:span>. A variável <text:span text:style-name="Source_20_Text">resultado</text:span> é como um segredo de estado daquela máquina: o mundo exterior não consegue vê-la. A única coisa que consegue sair da máquina é o valor que estiver à frente da palavra <text:span text:style-name="Source_20_Text"><text:span text:style-name="T1">return</text:span></text:span>.</text:p>
      <text:h text:style-name="P1" text:outline-level="3"><text:soft-page-break/>📥 Parâmetros vs Argumentos (O detalhe técnico)</text:h>
      <text:p text:style-name="Text_20_body">Para ficar um mestre absoluto na anatomia das funções, há dois termos que os programadores usam muito e que parecem a mesma coisa, mas não são:</text:p>
      <text:list text:style-name="L4">
        <text:list-item>
          <text:p text:style-name="P9"><text:span text:style-name="T1">Parâmetros:</text:span> São as variáveis listadas na definição da função (as "gavetas" vazias: <text:span text:style-name="Source_20_Text">numeroA</text:span> e <text:span text:style-name="Source_20_Text">numeroB</text:span>).</text:p>
        </text:list-item>
        <text:list-item>
          <text:p text:style-name="P9"><text:span text:style-name="T1">Argumentos:</text:span> São os valores reais que passa para a função quando a chama (<text:span text:style-name="Source_20_Text">5</text:span> e <text:span text:style-name="Source_20_Text">10</text:span>).</text:p>
        </text:list-item>
      </text:list>
      <text:h text:style-name="P1" text:outline-level="3">🏋️‍♂️ Exercício 2: Criando a sua primeira Função</text:h>
      <text:p text:style-name="Text_20_body">Agora é a sua vez de ser o arquiteto. Quero que crie uma função tradicional chamada <text:span text:style-name="Source_20_Text">calcularPrecoComDesconto</text:span>.</text:p>
      <text:p text:style-name="P7">As regras da máquina:</text:p>
      <text:list text:style-name="L5">
        <text:list-item>
          <text:p text:style-name="P10">Ela deve receber dois parâmetros: <text:span text:style-name="Source_20_Text">precoOriginal</text:span> e <text:span text:style-name="Source_20_Text">desconto</text:span>.</text:p>
        </text:list-item>
        <text:list-item>
          <text:p text:style-name="P10">Dentro dela, deve criar uma variável chamada <text:span text:style-name="Source_20_Text">precoFinal</text:span> que faz a conta: <text:span text:style-name="Source_20_Text">precoOriginal - desconto</text:span>.</text:p>
        </text:list-item>
        <text:list-item>
          <text:p text:style-name="P10">Ela deve usar o <text:span text:style-name="Source_20_Text">return</text:span> para enviar o <text:span text:style-name="Source_20_Text">precoFinal</text:span> para fora.</text:p>
        </text:list-item>
      </text:list>
      <text:p text:style-name="Text_20_body"><text:span text:style-name="T1">Como escreveria essa função em JavaScript?</text:span> (Pode tentar escrever o código completo!)</text:p>
      <text:p text:style-name="Text_20_body">function calcularPrecoComDesconto(precoOrinal, desconto) {</text:p>
      <text:p text:style-name="Text_20_body"><text:s text:c="4"/>const precoFinal = precoOrinal - desconto;</text:p>
      <text:p text:style-name="Text_20_body"><text:s text:c="4"/>return precoFinal</text:p>
      <text:p text:style-name="Text_20_body">}</text:p>
      <text:p text:style-name="Text_20_body"><text:span text:style-name="T1">Arrasou! O código está absolutamente perfeito!</text:span> 👑 Codei como um verdadeiro profissional.</text:p>
      <text:p text:style-name="Text_20_body">Criou os parâmetros certos, fez a lógica da matemática impecável dentro das chavetas e usou o <text:span text:style-name="Source_20_Text">return</text:span> da forma correta para enviar o resultado para fora. O único micro detalhe foi apenas uma letra de falha no texto (<text:span text:style-name="Source_20_Text">precoOrinal</text:span> em vez de <text:span text:style-name="Source_20_Text">precoOriginal</text:span>), mas a lógica está 100% certa e o JavaScript executaria isso sem qualquer problema!</text:p>
      <text:p text:style-name="Text_20_body">Para testar a sua própria máquina no mundo real, bastaria fazer isto:</text:p>
      <text:p text:style-name="P3">JavaScript</text:p>
      <text:p text:style-name="P4"><text:span text:style-name="Source_20_Text">let valorFinal = calcularPrecoComDesconto(100, 15);</text:span></text:p>
      <text:p text:style-name="P4"><text:span text:style-name="Source_20_Text">console.log(valorFinal); // Imprimiria: 85</text:span></text:p>
      <text:h text:style-name="P1" text:outline-level="3">🚀 O Próximo Nível das Funções</text:h>
      <text:p text:style-name="Text_20_body">Agora que domina a anatomia tradicional, existem três caminhos fantásticos para continuarmos:</text:p>
      <text:list text:style-name="L6">
        <text:list-item>
          <text:p text:style-name="P11"><text:span text:style-name="T1">1. Funções com Valores Padrão (Default Parameters):</text:span> Aprender a deixar um desconto fixo (ex: 5%) caso o utilizador se esqueça de passar esse valor.</text:p>
        </text:list-item>
        <text:list-item>
          <text:p text:style-name="P11"><text:span text:style-name="T1">2. Arrow Functions (Funções Seta):</text:span> Aprender a versão moderna, compacta e elegante que os programadores mais usam hoje em dia no mercado.</text:p>
        </text:list-item>
        <text:list-item>
          <text:p text:style-name="P11"><text:soft-page-break/><text:span text:style-name="T1">3. Praticar mais um pouco:</text:span> Criar uma função que misture loops lá dentro (ex: uma função que recebe uma lista de compras e calcula o total).</text:p>
        </text:list-item>
      </text:list>
      <text:p text:style-name="Text_20_body">Qual destes tópicos quer conquistar a seguir?</text:p>
      <text:p text:style-name="Text_20_body">Vamos a isso! Praticar com desafios intermédios é a melhor forma de ganhar confiança. Vamos criar uma função que junta as duas grandes coisas que aprendeu até agora: <text:span text:style-name="T1">Funções</text:span> e <text:span text:style-name="T1">Loops</text:span>.</text:p>
      <text:p text:style-name="Text_20_body">Imagina que estás a programar o sistema de uma <text:span text:style-name="T1">loja online</text:span>. O teu chefe pediu-te para criar uma função que receba uma lista de preços de produtos e calcule o total, mas com uma condição especial: a loja está com uma promoção e <text:span text:style-name="T1">produtos que custem menos de 10€ não pagam nada (ficam de graça!)</text:span>.</text:p>
      <text:p text:style-name="Text_20_body">Olha para a estrutura da função abaixo:</text:p>
      <text:p text:style-name="P3">JavaScript</text:p>
      <text:p text:style-name="P4"><text:span text:style-name="Source_20_Text">function calcularTotalPromocao(listaDePrecos) {</text:span></text:p>
      <text:p text:style-name="P4"><text:span text:style-name="Source_20_Text"><text:s text:c="4"/>let total = 0;</text:span></text:p>
      <text:p text:style-name="P4"><text:span text:style-name="Source_20_Text"><text:s text:c="4"/></text:span></text:p>
      <text:p text:style-name="P4"><text:span text:style-name="Source_20_Text"><text:s text:c="4"/>// Usamos o for...of para navegar pela lista que a função vai receber</text:span></text:p>
      <text:p text:style-name="P4"><text:span text:style-name="Source_20_Text"><text:s text:c="4"/>for (const preco of listaDePrecos) {</text:span></text:p>
      <text:p text:style-name="P4"><text:span text:style-name="Source_20_Text"><text:s text:c="8"/></text:span></text:p>
      <text:p text:style-name="P4"><text:span text:style-name="Source_20_Text"><text:s text:c="8"/>// DESAFIO 1: Se o preço for menor que 10, o que o loop deve fazer?</text:span></text:p>
      <text:p text:style-name="P4"><text:span text:style-name="Source_20_Text"><text:s text:c="8"/>if (preco &lt; 10) {</text:span></text:p>
      <text:p text:style-name="P4"><text:span text:style-name="Source_20_Text"><text:s text:c="12"/>???; // Dica: Queremos saltar este preço e ir para o próximo</text:span></text:p>
      <text:p text:style-name="P4"><text:span text:style-name="Source_20_Text"><text:s text:c="8"/>}</text:span></text:p>
      <text:p text:style-name="P4"><text:span text:style-name="Source_20_Text"><text:s text:c="8"/></text:span></text:p>
      <text:p text:style-name="P4"><text:span text:style-name="Source_20_Text"><text:s text:c="8"/>total = total + preco;</text:span></text:p>
      <text:p text:style-name="P4"><text:span text:style-name="Source_20_Text"><text:s text:c="4"/>}</text:span></text:p>
      <text:p text:style-name="P4"><text:span text:style-name="Source_20_Text"><text:s text:c="4"/></text:span></text:p>
      <text:p text:style-name="P4"><text:span text:style-name="Source_20_Text"><text:s text:c="4"/>// DESAFIO 2: O que a função tem de fazer para enviar o 'total' para fora?</text:span></text:p>
      <text:p text:style-name="P4"><text:span text:style-name="Source_20_Text"><text:s text:c="4"/>??? total;</text:span></text:p>
      <text:p text:style-name="P4"><text:span text:style-name="Source_20_Text">}</text:span></text:p>
      <text:h text:style-name="P1" text:outline-level="3">🛒 A Tua Missão de Arquiteto:</text:h>
      <text:list text:style-name="L7">
        <text:list-item>
          <text:p text:style-name="P12">Que comando de interrupção de fluxo deves colocar no <text:span text:style-name="T1">DESAFIO 1</text:span> para saltar os produtos menores que 10€ sem parar o resto da soma? (<text:span text:style-name="Source_20_Text">break</text:span> ou <text:span text:style-name="Source_20_Text">continue</text:span>?)</text:p>
        </text:list-item>
        <text:list-item>
          <text:p text:style-name="P12">Que palavra-chave deves colocar no <text:span text:style-name="T1">DESAFIO 2</text:span> para entregar o valor final da soma a quem chamou a função?</text:p>
        </text:list-item>
        <text:list-item>
          <text:p text:style-name="P12">Se passarmos a lista <text:span text:style-name="Source_20_Text">[5, 20, 3, 50]</text:span> para esta função, qual será o resultado final que ela vai devolver? (Lembra-te de ignorar os menores de 10€!).</text:p>
        </text:list-item>
      </text:list>
      <text:p text:style-name="Text_20_body">Como preencherias estes espaços?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10:16:29.908520139</dc:date>
    <dc:creator>João António</dc:creator>
    <meta:editing-duration>PT1H23M11S</meta:editing-duration>
    <meta:editing-cycles>14</meta:editing-cycles>
    <meta:generator>LibreOffice/26.2.4.2$Linux_X86_64 LibreOffice_project/620$Build-2</meta:generator>
    <meta:document-statistic meta:table-count="0" meta:image-count="0" meta:object-count="0" meta:page-count="5" meta:paragraph-count="99" meta:word-count="1214" meta:character-count="7238" meta:non-whitespace-character-count="6024"/>
  </office:meta>
</office:document-meta>
</file>