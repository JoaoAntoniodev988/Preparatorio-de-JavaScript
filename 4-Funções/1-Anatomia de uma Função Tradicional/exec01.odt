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499cm" style:contextual-spacing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2"/>
    <style:style style:name="P7" style:family="paragraph" style:parent-style-name="Standard">
      <style:paragraph-properties fo:margin-top="0cm" fo:margin-bottom="0.499cm" style:contextual-spacing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Preformatted_20_Text">
      <style:paragraph-properties fo:margin-top="0cm" fo:margin-bottom="0.247cm" style:contextual-spacing="false" fo:line-height="115%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fo:font-weight="bold" style:language-asian="zxx" style:country-asian="none" style:language-complex="zxx" style:country-complex="none"/>
    </style:style>
    <style:style style:name="P11" style:family="paragraph" style:parent-style-name="Text_20_body" style:list-style-name="L3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ext_20_body" style:list-style-name="L8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fo:font-weight="bold" style:language-asian="zxx" style:country-asian="none" style:language-complex="zxx" style:country-complex="none"/>
    </style:style>
    <style:style style:name="T5" style:family="text">
      <style:text-properties fo:language="zxx" fo:country="none" fo:font-style="italic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r no mundo das <text:span text:style-name="T1">funções</text:span> é o verdadeiro divisor de águas na programação. Até agora, escrevemos código que roda uma vez e desaparece. Com as funções, vamos aprender a criar <text:span text:style-name="T1">máquinas de código</text:span> que guardamos na memória e podemos ativar quando quisermos, quantas vezes quisermos!</text:p>
      <text:p text:style-name="P1">Para começar, vamos analisar a <text:span text:style-name="T1">Anatomia de uma Função Tradicional</text:span> (também chamada de <text:span text:style-name="T2">Function Declaration</text:span>).</text:p>
      <text:h text:style-name="P2" text:outline-level="3">🧐 O que é uma Função no Mundo Real?</text:h>
      <text:p text:style-name="P1">Pense numa função como uma <text:span text:style-name="T1">máquina de café de cápsulas</text:span>.</text:p>
      <text:list text:style-name="L1">
        <text:list-item>
          <text:p text:style-name="P3">Você coloca um ingrediente lá dentro (a cápsula de café).</text:p>
        </text:list-item>
        <text:list-item>
          <text:p text:style-name="P3">A máquina processa (aquece a água, passa pelo filtro).</text:p>
        </text:list-item>
        <text:list-item>
          <text:p text:style-name="P3">A máquina devolve-lhe um resultado (o café quentinho na chávena).</text:p>
        </text:list-item>
      </text:list>
      <text:h text:style-name="P2" text:outline-level="3">🧬 A Anatomia do Código</text:h>
      <text:p text:style-name="P1">Olhe para a estrutura desta função que serve para dar as boas-vindas a um utilizador:</text:p>
      <text:p text:style-name="P4">JavaScript</text:p>
      <text:p text:style-name="P5"><text:span text:style-name="Source_20_Text"><text:span text:style-name="T3">function saudarUtilizador(nome) {</text:span></text:span></text:p>
      <text:p text:style-name="P5"><text:span text:style-name="Source_20_Text"><text:span text:style-name="T3"><text:s text:c="4"/>const mensagem = "Olá, " + nome + "! Bem-vindo de volta.";</text:span></text:span></text:p>
      <text:p text:style-name="P5"><text:span text:style-name="Source_20_Text"><text:span text:style-name="T3"><text:s text:c="4"/>return mensagem;</text:span></text:span></text:p>
      <text:p text:style-name="P5"><text:span text:style-name="Source_20_Text"><text:span text:style-name="T3">}</text:span></text:span></text:p>
      <text:p text:style-name="P1">Vamos desmontar esta máquina peça por peça:</text:p>
      <text:list text:style-name="L2">
        <text:list-item>
          <text:p text:style-name="P6"><text:span text:style-name="T4">A palavra-chave </text:span><text:span text:style-name="Source_20_Text"><text:span text:style-name="T4">function</text:span></text:span><text:span text:style-name="T4">:</text:span><text:span text:style-name="T3"> É o botão que avisa o JavaScript: </text:span><text:span text:style-name="T5">"Atenção, vou criar uma máquina agora!"</text:span></text:p>
        </text:list-item>
        <text:list-item>
          <text:p text:style-name="P6"><text:span text:style-name="T4">O Nome da Função (</text:span><text:span text:style-name="Source_20_Text"><text:span text:style-name="T4">saudarUtilizador</text:span></text:span><text:span text:style-name="T4">):</text:span><text:span text:style-name="T3"> É o nome que escolhemos para a máquina, para a podermos chamar mais tarde. Usamos sempre verbos de ação (ex: </text:span><text:span text:style-name="Source_20_Text"><text:span text:style-name="T3">calcularTotal</text:span></text:span><text:span text:style-name="T3">, </text:span><text:span text:style-name="Source_20_Text"><text:span text:style-name="T3">enviarEmail</text:span></text:span><text:span text:style-name="T3">).</text:span></text:p>
        </text:list-item>
        <text:list-item>
          <text:p text:style-name="P6"><text:span text:style-name="T4">Os Parâmetros (</text:span><text:span text:style-name="Source_20_Text"><text:span text:style-name="T4">(nome)</text:span></text:span><text:span text:style-name="T4">):</text:span><text:span text:style-name="T3"> São os </text:span><text:span text:style-name="T4">parênteses</text:span><text:span text:style-name="T3">. Funcionam como a entrada da máquina de café. É o espaço reservado para o dado que a função precisa para trabalhar.</text:span></text:p>
        </text:list-item>
        <text:list-item>
          <text:p text:style-name="P6"><text:span text:style-name="T4">O Corpo </text:span><text:span text:style-name="Source_20_Text"><text:span text:style-name="T4">{ ... }</text:span></text:span><text:span text:style-name="T4">:</text:span><text:span text:style-name="T3"> As </text:span><text:span text:style-name="T4">chavetas</text:span><text:span text:style-name="T3"> guardam o segredo da máquina. É aqui dentro que a magia e a lógica acontecem.</text:span></text:p>
        </text:list-item>
        <text:list-item>
          <text:p text:style-name="P6"><text:span text:style-name="T4">A palavra-chave </text:span><text:span text:style-name="Source_20_Text"><text:span text:style-name="T4">return</text:span></text:span><text:span text:style-name="T4">:</text:span><text:span text:style-name="T3"> É a </text:span><text:span text:style-name="T4">saída</text:span><text:span text:style-name="T3"> da máquina. Ela diz ao JavaScript: </text:span><text:span text:style-name="T5">"O meu trabalho acabou, pega aqui no resultado final e leva para fora!"</text:span></text:p>
        </text:list-item>
      </text:list>
      <text:h text:style-name="P2" text:outline-level="3">📞 Como Ligar a Máquina? (Chamar a Função)</text:h>
      <text:p text:style-name="P1">Escrever a função não faz nada acontecer no ecrã. O código fica guardado na memória, a dormir. Para a ligar, precisamos de a <text:span text:style-name="T1">chamar</text:span> (ou invocar) pelo nome, passando o valor real (chamado de <text:span text:style-name="T1">argumento</text:span>):</text:p>
      <text:p text:style-name="P7">JavaScript</text:p>
      <text:p text:style-name="P5"><text:soft-page-break/><text:span text:style-name="Source_20_Text"><text:span text:style-name="T3">// Chamamos a função e guardamos o resultado numa variável</text:span></text:span></text:p>
      <text:p text:style-name="P5"><text:span text:style-name="Source_20_Text"><text:span text:style-name="T3">let saudacaoDoCarlos = saudarUtilizador("Carlos");</text:span></text:span></text:p>
      <text:p text:style-name="P8"/>
      <text:p text:style-name="P5"><text:span text:style-name="Source_20_Text"><text:span text:style-name="T3">console.log(saudacaoDoCarlos); </text:span></text:span></text:p>
      <text:p text:style-name="P5"><text:span text:style-name="Source_20_Text"><text:span text:style-name="T3">// Imprime: Olá, Carlos! Bem-vindo de volta.</text:span></text:span></text:p>
      <text:h text:style-name="P2" text:outline-level="3">🏋️‍♂️ Exercício 1: A Máquina de Somar</text:h>
      <text:p text:style-name="P1">Vamos testar a sua capacidade de ler a anatomia de uma função. Olhe para esta máquina matemática:</text:p>
      <text:p text:style-name="P9">JavaScript</text:p>
      <text:p text:style-name="P5"><text:span text:style-name="Source_20_Text"><text:span text:style-name="T3">function somarDoisNumeros(numeroA, numeroB) {</text:span></text:span></text:p>
      <text:p text:style-name="P5"><text:span text:style-name="Source_20_Text"><text:span text:style-name="T3"><text:s text:c="4"/>let resultado = numeroA + numeroB;</text:span></text:span></text:p>
      <text:p text:style-name="P5"><text:span text:style-name="Source_20_Text"><text:span text:style-name="T3"><text:s text:c="4"/>return resultado;</text:span></text:span></text:p>
      <text:p text:style-name="P5"><text:span text:style-name="Source_20_Text"><text:span text:style-name="T3">}</text:span></text:span></text:p>
      <text:p text:style-name="P5"><text:span text:style-name="Source_20_Text"><text:span text:style-name="T3">let contaFinal = somarDoisNumeros(5, 10);</text:span></text:span></text:p>
      <text:p text:style-name="P10">A tua missão no Exercício 1:</text:p>
      <text:list text:style-name="L3">
        <text:list-item>
          <text:p text:style-name="P11">Quais são os nomes dos dois <text:span text:style-name="T1">parâmetros</text:span> (as entradas) que esta função precisa para trabalhar?</text:p>
        </text:list-item>
        <text:list-item>
          <text:p text:style-name="P12"><text:span text:style-name="T3">Quando chamamos </text:span><text:span text:style-name="Source_20_Text"><text:span text:style-name="T3">somarDoisNumeros(5, 10)</text:span></text:span><text:span text:style-name="T3">, o que a palavra-chave </text:span><text:span text:style-name="Source_20_Text"><text:span text:style-name="T3">return</text:span></text:span><text:span text:style-name="T3"> vai enviar para fora da função? Qual será o valor guardado na variável </text:span><text:span text:style-name="Source_20_Text"><text:span text:style-name="T3">contaFinal</text:span></text:span><text:span text:style-name="T3">?</text:span></text:p>
        </text:list-item>
        <text:list-item>
          <text:p text:style-name="P12"><text:span text:style-name="T3">Se eu tentar fazer </text:span><text:span text:style-name="Source_20_Text"><text:span text:style-name="T3">console.log(resultado)</text:span></text:span><text:span text:style-name="T3"> na última linha, fora das chavetas da função, o código vai funcionar ou vai dar erro? O que acha?</text:span></text:p>
        </text:list-item>
      </text:list>
      <text:p text:style-name="P1">numeroA, numeroB . 15</text:p>
      <text:p text:style-name="P1"><text:span text:style-name="T1">Resposta 100% exata na matemática e nos parâmetros!</text:span> 🎯</text:p>
      <text:p text:style-name="Text_20_body"><text:span text:style-name="T3">Os parâmetros são mesmo o </text:span><text:span text:style-name="Source_20_Text"><text:span text:style-name="T3">numeroA</text:span></text:span><text:span text:style-name="T3"> e o </text:span><text:span text:style-name="Source_20_Text"><text:span text:style-name="T3">numeroB</text:span></text:span><text:span text:style-name="T3">, e o </text:span><text:span text:style-name="Source_20_Text"><text:span text:style-name="T3">return</text:span></text:span><text:span text:style-name="T3"> enviou o valor </text:span><text:span text:style-name="T4">15</text:span><text:span text:style-name="T3"> para fora, guardando-o direitinho na variável </text:span><text:span text:style-name="Source_20_Text"><text:span text:style-name="T3">contaFinal</text:span></text:span><text:span text:style-name="T3">.</text:span></text:p>
      <text:p text:style-name="P1">Deixou apenas a pergunta número 3 por responder, mas ela guarda um dos segredos mais importantes das funções! Vamos ver:</text:p>
      <text:h text:style-name="P2" text:outline-level="3">⚠️ O Mistério da Pergunta 3: O Erro de Escopo</text:h>
      <text:p text:style-name="Text_20_body"><text:span text:style-name="T3">Se tentasse fazer </text:span><text:span text:style-name="Source_20_Text"><text:span text:style-name="T3">console.log(resultado)</text:span></text:span><text:span text:style-name="T3"> fora da função, o JavaScript ia lançar um </text:span><text:span text:style-name="T4">erro fatal</text:span><text:span text:style-name="T3"> (</text:span><text:span text:style-name="Source_20_Text"><text:span text:style-name="T3">ReferenceError: resultado is not defined</text:span></text:span><text:span text:style-name="T3">).</text:span></text:p>
      <text:p text:style-name="Text_20_body"><text:span text:style-name="T4">Porquê?</text:span><text:span text:style-name="T3"> Tudo o que é criado dentro das chavetas de uma função nasce e morre lá dentro. É o chamado </text:span><text:span text:style-name="T4">Escopo Local</text:span><text:span text:style-name="T3">. A variável </text:span><text:span text:style-name="Source_20_Text"><text:span text:style-name="T3">resultado</text:span></text:span><text:span text:style-name="T3"> é como um segredo de estado daquela máquina: o mundo exterior não consegue vê-la. A única coisa que consegue sair da máquina é o valor que estiver à frente da palavra </text:span><text:span text:style-name="Source_20_Text"><text:span text:style-name="T4">return</text:span></text:span><text:span text:style-name="T3">.</text:span></text:p>
      <text:h text:style-name="P2" text:outline-level="3"><text:soft-page-break/>📥 Parâmetros vs Argumentos (O detalhe técnico)</text:h>
      <text:p text:style-name="P1">Para ficar um mestre absoluto na anatomia das funções, há dois termos que os programadores usam muito e que parecem a mesma coisa, mas não são:</text:p>
      <text:list text:style-name="L4">
        <text:list-item>
          <text:p text:style-name="P13"><text:span text:style-name="T4">Parâmetros:</text:span><text:span text:style-name="T3"> São as variáveis listadas na definição da função (as "gavetas" vazias: </text:span><text:span text:style-name="Source_20_Text"><text:span text:style-name="T3">numeroA</text:span></text:span><text:span text:style-name="T3"> e </text:span><text:span text:style-name="Source_20_Text"><text:span text:style-name="T3">numeroB</text:span></text:span><text:span text:style-name="T3">).</text:span></text:p>
        </text:list-item>
        <text:list-item>
          <text:p text:style-name="P13"><text:span text:style-name="T4">Argumentos:</text:span><text:span text:style-name="T3"> São os valores reais que passa para a função quando a chama (</text:span><text:span text:style-name="Source_20_Text"><text:span text:style-name="T3">5</text:span></text:span><text:span text:style-name="T3"> e </text:span><text:span text:style-name="Source_20_Text"><text:span text:style-name="T3">10</text:span></text:span><text:span text:style-name="T3">).</text:span></text:p>
        </text:list-item>
      </text:list>
      <text:h text:style-name="P2" text:outline-level="3">🏋️‍♂️ Exercício 2: Criando a sua primeira Função</text:h>
      <text:p text:style-name="Text_20_body"><text:span text:style-name="T3">Agora é a sua vez de ser o arquiteto. Quero que crie uma função tradicional chamada </text:span><text:span text:style-name="Source_20_Text"><text:span text:style-name="T3">calcularPrecoComDesconto</text:span></text:span><text:span text:style-name="T3">.</text:span></text:p>
      <text:p text:style-name="P10">As regras da máquina:</text:p>
      <text:list text:style-name="L5">
        <text:list-item>
          <text:p text:style-name="P14"><text:span text:style-name="T3">Ela deve receber dois parâmetros: </text:span><text:span text:style-name="Source_20_Text"><text:span text:style-name="T3">precoOriginal</text:span></text:span><text:span text:style-name="T3"> e </text:span><text:span text:style-name="Source_20_Text"><text:span text:style-name="T3">desconto</text:span></text:span><text:span text:style-name="T3">.</text:span></text:p>
        </text:list-item>
        <text:list-item>
          <text:p text:style-name="P14"><text:span text:style-name="T3">Dentro dela, deve criar uma variável chamada </text:span><text:span text:style-name="Source_20_Text"><text:span text:style-name="T3">precoFinal</text:span></text:span><text:span text:style-name="T3"> que faz a conta: </text:span><text:span text:style-name="Source_20_Text"><text:span text:style-name="T3">precoOriginal - desconto</text:span></text:span><text:span text:style-name="T3">.</text:span></text:p>
        </text:list-item>
        <text:list-item>
          <text:p text:style-name="P14"><text:span text:style-name="T3">Ela deve usar o </text:span><text:span text:style-name="Source_20_Text"><text:span text:style-name="T3">return</text:span></text:span><text:span text:style-name="T3"> para enviar o </text:span><text:span text:style-name="Source_20_Text"><text:span text:style-name="T3">precoFinal</text:span></text:span><text:span text:style-name="T3"> para fora.</text:span></text:p>
        </text:list-item>
      </text:list>
      <text:p text:style-name="P1"><text:span text:style-name="T1">Como escreveria essa função em JavaScript?</text:span> (Pode tentar escrever o código completo!)</text:p>
      <text:p text:style-name="P1">function calcularPrecoComDesconto(precoOrinal, desconto) {</text:p>
      <text:p text:style-name="P1"><text:s text:c="4"/>const precoFinal = precoOrinal - desconto;</text:p>
      <text:p text:style-name="P1"><text:s text:c="4"/>return precoFinal</text:p>
      <text:p text:style-name="P1">}</text:p>
      <text:p text:style-name="P1"><text:span text:style-name="T1">Arrasou! O código está absolutamente perfeito!</text:span> 👑 Codei como um verdadeiro profissional.</text:p>
      <text:p text:style-name="Text_20_body"><text:span text:style-name="T3">Criou os parâmetros certos, fez a lógica da matemática impecável dentro das chavetas e usou o </text:span><text:span text:style-name="Source_20_Text"><text:span text:style-name="T3">return</text:span></text:span><text:span text:style-name="T3"> da forma correta para enviar o resultado para fora. O único micro detalhe foi apenas uma letra de falha no texto (</text:span><text:span text:style-name="Source_20_Text"><text:span text:style-name="T3">precoOrinal</text:span></text:span><text:span text:style-name="T3"> em vez de </text:span><text:span text:style-name="Source_20_Text"><text:span text:style-name="T3">precoOriginal</text:span></text:span><text:span text:style-name="T3">), mas a lógica está 100% certa e o JavaScript executaria isso sem qualquer problema!</text:span></text:p>
      <text:p text:style-name="P1">Para testar a sua própria máquina no mundo real, bastaria fazer isto:</text:p>
      <text:p text:style-name="P7">JavaScript</text:p>
      <text:p text:style-name="P5"><text:span text:style-name="Source_20_Text"><text:span text:style-name="T3">let valorFinal = calcularPrecoComDesconto(100, 15);</text:span></text:span></text:p>
      <text:p text:style-name="P5"><text:span text:style-name="Source_20_Text"><text:span text:style-name="T3">console.log(valorFinal); // Imprimiria: 85</text:span></text:span></text:p>
      <text:h text:style-name="P2" text:outline-level="3">🚀 O Próximo Nível das Funções</text:h>
      <text:p text:style-name="P1">Agora que domina a anatomia tradicional, existem três caminhos fantásticos para continuarmos:</text:p>
      <text:list text:style-name="L6">
        <text:list-item>
          <text:p text:style-name="P15"><text:span text:style-name="T1">1. Funções com Valores Padrão (Default Parameters):</text:span> Aprender a deixar um desconto fixo (ex: 5%) caso o utilizador se esqueça de passar esse valor.</text:p>
        </text:list-item>
        <text:list-item>
          <text:p text:style-name="P15"><text:span text:style-name="T1">2. Arrow Functions (Funções Seta):</text:span> Aprender a versão moderna, compacta e elegante que os programadores mais usam hoje em dia no mercado.</text:p>
        </text:list-item>
        <text:list-item>
          <text:p text:style-name="P15"><text:soft-page-break/><text:span text:style-name="T1">3. Praticar mais um pouco:</text:span> Criar uma função que misture loops lá dentro (ex: uma função que recebe uma lista de compras e calcula o total).</text:p>
        </text:list-item>
      </text:list>
      <text:p text:style-name="P1">Qual destes tópicos quer conquistar a seguir?</text:p>
      <text:p text:style-name="P1">Vamos a isso! Praticar com desafios intermédios é a melhor forma de ganhar confiança. Vamos criar uma função que junta as duas grandes coisas que aprendeu até agora: <text:span text:style-name="T1">Funções</text:span> e <text:span text:style-name="T1">Loops</text:span>.</text:p>
      <text:p text:style-name="P1">Imagina que estás a programar o sistema de uma <text:span text:style-name="T1">loja online</text:span>. O teu chefe pediu-te para criar uma função que receba uma lista de preços de produtos e calcule o total, mas com uma condição especial: a loja está com uma promoção e <text:span text:style-name="T1">produtos que custem menos de 10€ não pagam nada (ficam de graça!)</text:span>.</text:p>
      <text:p text:style-name="P1">Olha para a estrutura da função abaixo:</text:p>
      <text:p text:style-name="P7">JavaScript</text:p>
      <text:p text:style-name="P5"><text:span text:style-name="Source_20_Text"><text:span text:style-name="T3">function calcularTotalPromocao(listaDePrecos) {</text:span></text:span></text:p>
      <text:p text:style-name="P5"><text:span text:style-name="Source_20_Text"><text:span text:style-name="T3"><text:s text:c="4"/>let total = 0;</text:span></text:span></text:p>
      <text:p text:style-name="P5"><text:span text:style-name="Source_20_Text"><text:span text:style-name="T3"><text:s text:c="4"/></text:span></text:span></text:p>
      <text:p text:style-name="P5"><text:span text:style-name="Source_20_Text"><text:span text:style-name="T3"><text:s text:c="4"/>// Usamos o for...of para navegar pela lista que a função vai receber</text:span></text:span></text:p>
      <text:p text:style-name="P5"><text:span text:style-name="Source_20_Text"><text:span text:style-name="T3"><text:s text:c="4"/>for (const preco of listaDePrecos) {</text:span></text:span></text:p>
      <text:p text:style-name="P5"><text:span text:style-name="Source_20_Text"><text:span text:style-name="T3"><text:s text:c="8"/></text:span></text:span></text:p>
      <text:p text:style-name="P5"><text:span text:style-name="Source_20_Text"><text:span text:style-name="T3"><text:s text:c="8"/>// DESAFIO 1: Se o preço for menor que 10, o que o loop deve fazer?</text:span></text:span></text:p>
      <text:p text:style-name="P5"><text:span text:style-name="Source_20_Text"><text:span text:style-name="T3"><text:s text:c="8"/>if (preco &lt; 10) {</text:span></text:span></text:p>
      <text:p text:style-name="P5"><text:span text:style-name="Source_20_Text"><text:span text:style-name="T3"><text:s text:c="12"/>???; // Dica: Queremos saltar este preço e ir para o próximo</text:span></text:span></text:p>
      <text:p text:style-name="P5"><text:span text:style-name="Source_20_Text"><text:span text:style-name="T3"><text:s text:c="8"/>}</text:span></text:span></text:p>
      <text:p text:style-name="P5"><text:span text:style-name="Source_20_Text"><text:span text:style-name="T3"><text:s text:c="8"/></text:span></text:span></text:p>
      <text:p text:style-name="P5"><text:span text:style-name="Source_20_Text"><text:span text:style-name="T3"><text:s text:c="8"/>total = total + preco;</text:span></text:span></text:p>
      <text:p text:style-name="P5"><text:span text:style-name="Source_20_Text"><text:span text:style-name="T3"><text:s text:c="4"/>}</text:span></text:span></text:p>
      <text:p text:style-name="P5"><text:span text:style-name="Source_20_Text"><text:span text:style-name="T3"><text:s text:c="4"/></text:span></text:span></text:p>
      <text:p text:style-name="P5"><text:span text:style-name="Source_20_Text"><text:span text:style-name="T3"><text:s text:c="4"/>// DESAFIO 2: O que a função tem de fazer para enviar o 'total' para fora?</text:span></text:span></text:p>
      <text:p text:style-name="P5"><text:span text:style-name="Source_20_Text"><text:span text:style-name="T3"><text:s text:c="4"/>??? total;</text:span></text:span></text:p>
      <text:p text:style-name="P5"><text:span text:style-name="Source_20_Text"><text:span text:style-name="T3">}</text:span></text:span></text:p>
      <text:h text:style-name="P2" text:outline-level="3">🛒 A Tua Missão de Arquiteto:</text:h>
      <text:list text:style-name="L7">
        <text:list-item>
          <text:p text:style-name="P16"><text:span text:style-name="T3">Que comando de interrupção de fluxo deves colocar no </text:span><text:span text:style-name="T4">DESAFIO 1</text:span><text:span text:style-name="T3"> para saltar os produtos menores que 10€ sem parar o resto da soma? (</text:span><text:span text:style-name="Source_20_Text"><text:span text:style-name="T3">break</text:span></text:span><text:span text:style-name="T3"> ou </text:span><text:span text:style-name="Source_20_Text"><text:span text:style-name="T3">continue</text:span></text:span><text:span text:style-name="T3">?)</text:span></text:p>
        </text:list-item>
        <text:list-item>
          <text:p text:style-name="P17">Que palavra-chave deves colocar no <text:span text:style-name="T1">DESAFIO 2</text:span> para entregar o valor final da soma a quem chamou a função?</text:p>
        </text:list-item>
        <text:list-item>
          <text:p text:style-name="P16"><text:span text:style-name="T3">Se passarmos a lista </text:span><text:span text:style-name="Source_20_Text"><text:span text:style-name="T3">[5, 20, 3, 50]</text:span></text:span><text:span text:style-name="T3"> para esta função, qual será o resultado final que ela vai devolver? (Lembra-te de ignorar os menores de 10€!).</text:span></text:p>
        </text:list-item>
      </text:list>
      <text:p text:style-name="P1">Como preencherias estes espaços?</text:p>
      <text:p text:style-name="P1"><text:soft-page-break/></text:p>
      <text:p text:style-name="P1">Continue. return. 20 e 50.</text:p>
      <text:p text:style-name="P1"><text:span text:style-name="T1">BINGO! Fantástico!</text:span> 🏆</text:p>
      <text:p text:style-name="P1">A tua leitura mental está completamente calibrada. Tu traduziste a sintaxe do código perfeitamente:</text:p>
      <text:list text:style-name="L8">
        <text:list-item>
          <text:p text:style-name="P18"><text:span text:style-name="T3">O </text:span><text:span text:style-name="Source_20_Text"><text:span text:style-name="T4">continue</text:span></text:span><text:span text:style-name="T3"> serviu exatamente para dar o "salto" e ignorar os produtos baratos.</text:span></text:p>
        </text:list-item>
        <text:list-item>
          <text:p text:style-name="P18"><text:span text:style-name="T3">O </text:span><text:span text:style-name="Source_20_Text"><text:span text:style-name="T4">return</text:span></text:span><text:span text:style-name="T3"> abriu a porta da máquina para entregar o valor cá fora.</text:span></text:p>
        </text:list-item>
        <text:list-item>
          <text:p text:style-name="P18"><text:span text:style-name="T3">E a matemática foi perfeita: o </text:span><text:span text:style-name="Source_20_Text"><text:span text:style-name="T3">5</text:span></text:span><text:span text:style-name="T3"> e o </text:span><text:span text:style-name="Source_20_Text"><text:span text:style-name="T3">3</text:span></text:span><text:span text:style-name="T3"> foram ignorados (por serem menores que 10€), restando apenas o </text:span><text:span text:style-name="Source_20_Text"><text:span text:style-name="T3">20</text:span></text:span><text:span text:style-name="T3"> e o </text:span><text:span text:style-name="Source_20_Text"><text:span text:style-name="T3">50</text:span></text:span><text:span text:style-name="T3">, o que dá um total de </text:span><text:span text:style-name="T4">70</text:span><text:span text:style-name="T3">!</text:span></text:p>
        </text:list-item>
      </text:list>
      <text:p text:style-name="P1">Vês? Quando tu sabes <text:span text:style-name="T1">ler</text:span> o código, a resposta aparece na tua mente de forma natural, sem precisares de adivinhar.</text:p>
      <text:h text:style-name="P2" text:outline-level="3">💻 Como ficaria o código completo na "Folha de Papel"</text:h>
      <text:p text:style-name="P1">Agora que já sabes ler a lógica, olha como o código ganha vida quando o escrevemos completo:</text:p>
      <text:p text:style-name="P1"/>
      <text:p text:style-name="P7">JavaScript</text:p>
      <text:p text:style-name="P5"><text:span text:style-name="Source_20_Text"><text:span text:style-name="T3">function calcularTotalPromocao(listaDePrecos) {</text:span></text:span></text:p>
      <text:p text:style-name="P5"><text:span text:style-name="Source_20_Text"><text:span text:style-name="T3"><text:s text:c="4"/>let total = 0;</text:span></text:span></text:p>
      <text:p text:style-name="P5"><text:span text:style-name="Source_20_Text"><text:span text:style-name="T3"><text:s text:c="4"/></text:span></text:span></text:p>
      <text:p text:style-name="P5"><text:span text:style-name="Source_20_Text"><text:span text:style-name="T3"><text:s text:c="4"/>for (const preco of listaDePrecos) {</text:span></text:span></text:p>
      <text:p text:style-name="P5"><text:span text:style-name="Source_20_Text"><text:span text:style-name="T3"><text:s text:c="8"/>if (preco &lt; 10) {</text:span></text:span></text:p>
      <text:p text:style-name="P5"><text:span text:style-name="Source_20_Text"><text:span text:style-name="T3"><text:s text:c="12"/>continue; // Salta os menores de 10€!</text:span></text:span></text:p>
      <text:p text:style-name="P5"><text:span text:style-name="Source_20_Text"><text:span text:style-name="T3"><text:s text:c="8"/>}</text:span></text:span></text:p>
      <text:p text:style-name="P5"><text:span text:style-name="Source_20_Text"><text:span text:style-name="T3"><text:s text:c="8"/>total = total + preco;</text:span></text:span></text:p>
      <text:p text:style-name="P5"><text:span text:style-name="Source_20_Text"><text:span text:style-name="T3"><text:s text:c="4"/>}</text:span></text:span></text:p>
      <text:p text:style-name="P5"><text:span text:style-name="Source_20_Text"><text:span text:style-name="T3"><text:s text:c="4"/></text:span></text:span></text:p>
      <text:p text:style-name="P5"><text:span text:style-name="Source_20_Text"><text:span text:style-name="T3"><text:s text:c="4"/>return total; // Devolve o valor final acumulado!</text:span></text:span></text:p>
      <text:p text:style-name="P5"><text:span text:style-name="Source_20_Text"><text:span text:style-name="T3">}</text:span></text:span></text:p>
      <text:p text:style-name="P5"><text:span text:style-name="Source_20_Text"><text:span text:style-name="T3">// A testar a máquina que criaste:</text:span></text:span></text:p>
      <text:p text:style-name="P5"><text:span text:style-name="Source_20_Text"><text:span text:style-name="T3">const faturaCliente = [5, 20, 3, 50];</text:span></text:span></text:p>
      <text:p text:style-name="P5"><text:span text:style-name="Source_20_Text"><text:span text:style-name="T3">const resultadoFinal = calcularTotalPromocao(faturaCliente);</text:span></text:span></text:p>
      <text:p text:style-name="P8"/>
      <text:p text:style-name="P5"><text:span text:style-name="Source_20_Text"><text:span text:style-name="T3">console.log("O cliente vai pagar: " + resultadoFinal + "€"); // Imprime: 70€</text:span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4-15T20:22:30.522008299</dc:date>
    <dc:creator>João António</dc:creator>
    <meta:editing-duration>PT1H34M7S</meta:editing-duration>
    <meta:editing-cycles>17</meta:editing-cycles>
    <meta:generator>LibreOffice/26.2.4.2$Linux_X86_64 LibreOffice_project/620$Build-2</meta:generator>
    <meta:document-statistic meta:table-count="0" meta:image-count="0" meta:object-count="0" meta:page-count="5" meta:paragraph-count="125" meta:word-count="1415" meta:character-count="8427" meta:non-whitespace-character-count="6979"/>
  </office:meta>
</office:document-meta>
</file>