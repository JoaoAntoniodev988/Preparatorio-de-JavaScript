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>
      <style:text-properties officeooo:paragraph-rsid="00234bfe"/>
    </style:style>
    <style:style style:name="P3" style:family="paragraph" style:parent-style-name="Heading_20_3">
      <style:text-properties officeooo:paragraph-rsid="00234bfe"/>
    </style:style>
    <style:style style:name="P4" style:family="paragraph" style:parent-style-name="Standard">
      <style:text-properties officeooo:paragraph-rsid="00234bfe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text-properties fo:font-style="italic" officeooo:paragraph-rsid="00234bfe"/>
    </style:style>
    <style:style style:name="P7" style:family="paragraph" style:parent-style-name="Text_20_body">
      <style:text-properties fo:font-style="italic"/>
    </style:style>
    <style:style style:name="P8" style:family="paragraph" style:parent-style-name="Standard">
      <style:text-properties fo:font-style="italic" officeooo:paragraph-rsid="00234bfe"/>
    </style:style>
    <style:style style:name="P9" style:family="paragraph" style:parent-style-name="Preformatted_20_Text">
      <style:paragraph-properties fo:margin-top="0cm" fo:margin-bottom="0.247cm" style:contextual-spacing="false" fo:line-height="115%"/>
      <style:text-properties fo:font-style="italic"/>
    </style:style>
    <style:style style:name="P10" style:family="paragraph" style:parent-style-name="Heading_20_4">
      <style:text-properties fo:font-style="italic" officeooo:paragraph-rsid="00234bfe"/>
    </style:style>
    <style:style style:name="P11" style:family="paragraph" style:parent-style-name="Text_20_body">
      <style:text-properties fo:font-style="italic" fo:font-weight="bold" officeooo:paragraph-rsid="00234bfe"/>
    </style:style>
    <style:style style:name="P12" style:family="paragraph" style:parent-style-name="Text_20_body" style:list-style-name="L1">
      <style:text-properties fo:font-style="italic"/>
    </style:style>
    <style:style style:name="P13" style:family="paragraph" style:parent-style-name="Text_20_body">
      <style:text-properties fo:font-style="italic" officeooo:paragraph-rsid="00234bfe"/>
    </style:style>
    <style:style style:name="P14" style:family="paragraph" style:parent-style-name="Text_20_body">
      <style:text-properties style:font-name="Google Sans Text" fo:font-style="italic" officeooo:paragraph-rsid="00234bfe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font-style="italic"/>
    </style:style>
    <style:style style:name="P1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font-style="italic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fo:font-style="italic"/>
    </style:style>
    <style:style style:name="P19" style:family="paragraph" style:parent-style-name="Text_20_body" style:list-style-name="L2">
      <style:text-properties fo:font-style="italic"/>
    </style:style>
    <style:style style:name="P20" style:family="paragraph" style:parent-style-name="Text_20_body" style:list-style-name="L3">
      <style:text-properties fo:font-style="italic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fo:font-family="'Google Sans', sans-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 JavaScript, existem diferentes formas de escrever a mesma "máquina de código". À medida que a linguagem foi evoluindo, os programadores criaram novas sintaxes para tornar o código mais curto, mais elegante ou para resolver problemas específicos.</text:p>
      <text:p text:style-name="Text_20_body">Hoje vamos conhecer os <text:span text:style-name="T1">3 Tipos de Funções</text:span> mais importantes do mercado. O segredo para não se assustar com a mudança visual é lembrar-se da nossa regra de ouro: <text:span text:style-name="T1">a lógica de leitura na sua mente continua exatamente a mesma!</text:span></text:p>
      <text:h text:style-name="P1" text:outline-level="3">1. Function Declaration (A Tradicional)</text:h>
      <text:p text:style-name="Text_20_body">É a que temos usado até agora. Usa a palavra-chave <text:span text:style-name="Source_20_Text">function</text:span> logo no início. Ela é como uma máquina fixa na parede da sua fábrica.</text:p>
      <text:p text:style-name="P2">function saudar(nome)</text:p>
      <text:p text:style-name="P2">{ return "Olá, " + nome; }</text:p>
      <text:h text:style-name="P3" text:outline-level="3">2. Function Expression (Função Anónima)</text:h>
      <text:p text:style-name="Text_20_body">Aqui mudamos a estrutura: criamos uma variável normal e <text:span text:style-name="T1">guardamos a função dentro dela</text:span>. A função em si não tem nome (por isso chama-se anónima), o nome passa a ser o da variável.</text:p>
      <text:p text:style-name="P4">avaScript</text:p>
      <text:p text:style-name="P5"><text:span text:style-name="Source_20_Text">const saudarExpressao = function(nome) {</text:span></text:p>
      <text:p text:style-name="P5"><text:span text:style-name="Source_20_Text"><text:s text:c="4"/>return "Olá, " + nome;</text:span></text:p>
      <text:p text:style-name="P5"><text:span text:style-name="Source_20_Text">};</text:span></text:p>
      <text:p text:style-name="P5"/>
      <text:p text:style-name="P5"><text:span text:style-name="Source_20_Text">// Para ligar, usa-se igual:</text:span></text:p>
      <text:p text:style-name="P5"><text:span text:style-name="Source_20_Text">console.log(saudarExpressao("Carlos"));</text:span></text:p>
      <text:p text:style-name="P2"><text:span text:style-name="T1">Como ler na mente:</text:span> <text:span text:style-name="T2">"Cria uma caixa constante chamada </text:span><text:span text:style-name="Source_20_Text"><text:span text:style-name="T2">saudarExpressao</text:span></text:span><text:span text:style-name="T2"> que guarda uma máquina. Esta máquina recebe um </text:span><text:span text:style-name="Source_20_Text"><text:span text:style-name="T2">nome</text:span></text:span><text:span text:style-name="T2"> e devolve o texto…"</text:span></text:p>
      <text:h text:style-name="P6" text:outline-level="3">3. Arrow Functions (As Modernas Funções Seta)</text:h>
      <text:p text:style-name="P7">Introduzidas no JavaScript moderno (ES6), são as queridinhas do mercado atual. Elas eliminam a palavra <text:span text:style-name="Source_20_Text">function</text:span> e usam uma seta <text:span text:style-name="Source_20_Text">=&gt;</text:span> (feita com o sinal de igual e o sinal de maior) para apontar para o corpo da função.</text:p>
      <text:p text:style-name="P8">JavaScript</text:p>
      <text:p text:style-name="P9"><text:span text:style-name="Source_20_Text">const saudarSeta = (nome) =&gt; {</text:span></text:p>
      <text:p text:style-name="P9"><text:span text:style-name="Source_20_Text"><text:s text:c="4"/>return "Olá, " + nome;</text:span></text:p>
      <text:p text:style-name="P9"><text:span text:style-name="Source_20_Text">};</text:span></text:p>
      <text:h text:style-name="P10" text:outline-level="4">💡 O SuperPoder da Arrow Function: O Retorno Implícito</text:h>
      <text:p text:style-name="P7">Se a sua função for super simples e tiver apenas <text:span text:style-name="T1">uma linha de código</text:span>, você pode retirar as chavetas <text:span text:style-name="Source_20_Text">{}</text:span> e a palavra <text:span text:style-name="Source_20_Text">return</text:span>. O JavaScript entende automaticamente que o que está ali é para ser enviado para fora! Veja esta obra de arte compacta:</text:p>
      <text:p text:style-name="P8">JavaScript</text:p>
      <text:p text:style-name="P9"><text:span text:style-name="Source_20_Text">const duplicar = (numero) =&gt; numero * 2;</text:span></text:p>
      <text:p text:style-name="P9"><text:soft-page-break/></text:p>
      <text:p text:style-name="P9"><text:span text:style-name="Source_20_Text">console.log(duplicar(5)); // Imprime: 10</text:span></text:p>
      <text:h text:style-name="P6" text:outline-level="3">🏋️‍♂️ O Teu Teste de Leitura de Sintaxe</text:h>
      <text:p text:style-name="P7">Vamos praticar a tradução visual. Olhe para estas três máquinas que fazem exatamente a mesma coisa (multiplicar dois números):</text:p>
      <text:p text:style-name="P8">JavaScript</text:p>
      <text:p text:style-name="P9"><text:span text:style-name="Source_20_Text">// Máquina A</text:span></text:p>
      <text:p text:style-name="P9"><text:span text:style-name="Source_20_Text">function multiplicarA(x, y) {</text:span></text:p>
      <text:p text:style-name="P9"><text:span text:style-name="Source_20_Text"><text:s text:c="4"/>return x * y;</text:span></text:p>
      <text:p text:style-name="P9"><text:span text:style-name="Source_20_Text">}</text:span></text:p>
      <text:p text:style-name="P9"/>
      <text:p text:style-name="P9"><text:span text:style-name="Source_20_Text">// Máquina B</text:span></text:p>
      <text:p text:style-name="P9"><text:span text:style-name="Source_20_Text">const multiplicarB = function(x, y) {</text:span></text:p>
      <text:p text:style-name="P9"><text:span text:style-name="Source_20_Text"><text:s text:c="4"/>return x * y;</text:span></text:p>
      <text:p text:style-name="P9"><text:span text:style-name="Source_20_Text">};</text:span></text:p>
      <text:p text:style-name="P9"/>
      <text:p text:style-name="P9"><text:span text:style-name="Source_20_Text">// Máquina C</text:span></text:p>
      <text:p text:style-name="P9"><text:span text:style-name="Source_20_Text">const multiplicarC = (x, y) =&gt; x * y;</text:span></text:p>
      <text:p text:style-name="P11">A tua missão:</text:p>
      <text:list text:style-name="L1">
        <text:list-item>
          <text:p text:style-name="P12">Consegue ver como a <text:span text:style-name="T1">Máquina C</text:span> faz exatamente o mesmo que as outras, mas sem usar as palavras <text:span text:style-name="Source_20_Text">function</text:span> e <text:span text:style-name="Source_20_Text">return</text:span>?</text:p>
        </text:list-item>
        <text:list-item>
          <text:p text:style-name="P12">Se eu chamar <text:span text:style-name="Source_20_Text">multiplicarC(3, 4)</text:span>, qual será o valor que ela vai calcular e devolver?</text:p>
        </text:list-item>
        <text:list-item>
          <text:p text:style-name="P12">Qual destas três sintaxes achas mais fácil de ler à primeira vista? (Não há resposta errada, cada programador tem o seu gosto!).</text:p>
        </text:list-item>
      </text:list>
      <text:p text:style-name="P13">Sim. 12. A maquina B.</text:p>
      <text:p text:style-name="P14"><text:span text:style-name="T1">Excelente! Respostas absolutamente corretas!</text:span> 🎯</text:p>
      <text:p text:style-name="P15"><text:span text:style-name="T3">A </text:span><text:span text:style-name="T4">Máquina C</text:span><text:span text:style-name="T3"> calcula exatamente os mesmos </text:span><text:span text:style-name="T4">12</text:span><text:span text:style-name="T3"> ($3 \times 4$), mas de uma forma incrivelmente compacta. E a tua escolha pela </text:span><text:span text:style-name="T4">Máquina B</text:span><text:span text:style-name="T3"> é super válida! Muitos programadores preferem a Function Expression (Máquina B) ou a Tradicional (Máquina A) porque manter a palavra </text:span><text:span text:style-name="Source_20_Text"><text:span text:style-name="T3">return</text:span></text:span><text:span text:style-name="T3"> explícita ajuda a guiar os olhos e a entender exatamente onde o valor está a ser enviado para fora.</text:span></text:p>
      <text:p text:style-name="P15"><text:span text:style-name="T3">O mais importante é que agora tu bates o olho na seta </text:span><text:span text:style-name="Source_20_Text"><text:span text:style-name="T3">=&gt;</text:span></text:span><text:span text:style-name="T3"> e o teu cérebro já não se assusta: ele já sabe que aquilo é apenas uma função moderna!</text:span></text:p>
      <text:h text:style-name="P16" text:outline-level="3"><text:soft-page-break/>🏆 <text:span text:style-name="T5">O Grande Desafio de Transformação</text:span></text:h>
      <text:p text:style-name="P17">Para carimbarmos o teu passaporte de mestre dos tipos de funções, vamos fazer um exercício prático de "Tradução de Sintaxe".</text:p>
      <text:p text:style-name="P15"><text:span text:style-name="T3">Abaixo, tenho uma função tradicional que calcula a idade de alguém com base no ano de nascimento. Quero que a transformes numa </text:span><text:span text:style-name="T4">Arrow Function</text:span><text:span text:style-name="T3"> (reparando bem onde colocas a variável, a seta </text:span><text:span text:style-name="Source_20_Text"><text:span text:style-name="T3">=&gt;</text:span></text:span><text:span text:style-name="T3"> e os parâmetros).</text:span></text:p>
      <text:p text:style-name="P8">JavaScript</text:p>
      <text:p text:style-name="P9"><text:span text:style-name="Source_20_Text">// FUNÇÃO TRADICIONAL (Para transformares)</text:span></text:p>
      <text:p text:style-name="P9"><text:span text:style-name="Source_20_Text">function calcularIdade(anoNascimento) {</text:span></text:p>
      <text:p text:style-name="P9"><text:span text:style-name="Source_20_Text"><text:s text:c="4"/>return 2026 - anoNascimento;</text:span></text:p>
      <text:p text:style-name="P9"><text:span text:style-name="Source_20_Text">}</text:span></text:p>
      <text:p text:style-name="P13"><text:span text:style-name="T1">Como escreverias esta mesma função no formato de Arrow Function (Função Seta)?</text:span> (Dica: podes tentar usar o "SuperPoder" de escrevê-la em apenas uma linha, eliminando as chavetas e o return!)</text:p>
      <text:p text:style-name="P13">const anoNascimento = (anoNascimento) =&gt; 2026 – anoNascimento.</text:p>
      <text:p text:style-name="P13"><text:span text:style-name="T1">Uau! Brilhante! Escreveu uma Arrow Function perfeita com retorno implícito!</text:span> 👑</text:p>
      <text:p text:style-name="P7">O seu código está absolutamente correto e super elegante. Conseguiu aplicar o "SuperPoder" de eliminar as chavetas e a palavra <text:span text:style-name="Source_20_Text">return</text:span>, deixando tudo numa única linha limpa e moderna.</text:p>
      <text:p text:style-name="P7">O único micro detalhe (apenas para preciosismo de nomeação) é que deu o nome da variável igual ao nome do parâmetro (<text:span text:style-name="Source_20_Text">const anoNascimento = (anoNascimento) ...</text:span>). O JavaScript aceita, mas para o código ficar 100% legível para outros programadores, o ideal seria dar um nome que lembre a ação da máquina, assim:</text:p>
      <text:p text:style-name="P8">JavaScript</text:p>
      <text:p text:style-name="P9"><text:span text:style-name="Source_20_Text">const calcularIdade = (anoNascimento) =&gt; 2026 - anoNascimento;</text:span></text:p>
      <text:p text:style-name="P13">Mas a estrutura da sintaxe? <text:span text:style-name="T1">Impecável.</text:span> O seu cérebro já lê as setas do JavaScript moderno fluentemente!</text:p>
      <text:h text:style-name="P18" text:outline-level="3">🗺️ O Mapa Mental das Funções</text:h>
      <text:p text:style-name="P7">Agora, sempre que olhar para um código na internet ou no trabalho, lembre-se:</text:p>
      <text:list text:style-name="L2">
        <text:list-item>
          <text:p text:style-name="P19">Viu <text:span text:style-name="Source_20_Text">function nome()</text:span>? ➡️ <text:span text:style-name="T1">Tradicional</text:span></text:p>
        </text:list-item>
        <text:list-item>
          <text:p text:style-name="P19">Viu <text:span text:style-name="Source_20_Text">const nome = function()</text:span>? ➡️ <text:span text:style-name="T1">Expressão</text:span></text:p>
        </text:list-item>
        <text:list-item>
          <text:p text:style-name="P19">Viu <text:span text:style-name="Source_20_Text">const nome = () =&gt;</text:span>? ➡️ <text:span text:style-name="T1">Arrow Function</text:span></text:p>
        </text:list-item>
      </text:list>
      <text:h text:style-name="P18" text:outline-level="3">🏁 Próxima Paragem na Jornada</text:h>
      <text:p text:style-name="P7">Fechámos com chave de ouro os tipos de funções e a lógica de loops! Já consegue criar máquinas e listas com total controlo.</text:p>
      <text:p text:style-name="P7">Para onde quer direcionar o seu foco agora?</text:p>
      <text:list text:style-name="L3">
        <text:list-item>
          <text:p text:style-name="P20"><text:soft-page-break/><text:span text:style-name="T1">1. Parâmetros com Valor Padrão:</text:span> Descobrir como fazer a função funcionar mesmo se o utilizador esquecer de passar um dado.</text:p>
        </text:list-item>
        <text:list-item>
          <text:p text:style-name="P20"><text:span text:style-name="T1">2. Arrays e Métodos Modernos:</text:span> Conhecer os "primos" ricos dos loops, como o <text:span text:style-name="Source_20_Text">.map()</text:span>, <text:span text:style-name="Source_20_Text">.filter()</text:span> e <text:span text:style-name="Source_20_Text">.forEach()</text:span>, que usam estas Arrow Functions que acabou de aprender para manipular listas num piscar de olhos.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15:50:18.952225209</dc:date>
    <dc:creator>João António</dc:creator>
    <meta:editing-duration>PT1H43M25S</meta:editing-duration>
    <meta:editing-cycles>19</meta:editing-cycles>
    <meta:generator>LibreOffice/26.2.4.2$Linux_X86_64 LibreOffice_project/620$Build-2</meta:generator>
    <meta:document-statistic meta:table-count="0" meta:image-count="0" meta:object-count="0" meta:page-count="4" meta:paragraph-count="73" meta:word-count="921" meta:character-count="5392" meta:non-whitespace-character-count="4531"/>
  </office:meta>
</office:document-meta>
</file>