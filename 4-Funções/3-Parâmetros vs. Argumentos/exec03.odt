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fo:font-style="italic"/>
    </style:style>
    <style:style style:name="P3" style:family="paragraph" style:parent-style-name="Standard">
      <style:text-properties fo:font-style="italic"/>
    </style:style>
    <style:style style:name="P4" style:family="paragraph" style:parent-style-name="Preformatted_20_Text">
      <style:paragraph-properties fo:margin-top="0cm" fo:margin-bottom="0.247cm" style:contextual-spacing="false" fo:line-height="115%"/>
      <style:text-properties fo:font-style="italic"/>
    </style:style>
    <style:style style:name="P5" style:family="paragraph" style:parent-style-name="Heading_20_3">
      <style:text-properties fo:font-style="italic"/>
    </style:style>
    <style:style style:name="P6" style:family="paragraph" style:parent-style-name="Text_20_body" style:list-style-name="L1">
      <style:text-properties fo:font-style="italic"/>
    </style:style>
    <style:style style:name="P7" style:family="paragraph" style:parent-style-name="Text_20_body">
      <style:text-properties fo:font-style="italic" fo:font-weight="bold"/>
    </style:style>
    <style:style style:name="P8" style:family="paragraph" style:parent-style-name="Text_20_body" style:list-style-name="L2">
      <style:text-properties fo:font-style="italic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! Embora tenhas visto estes dois termos de relance na anatomia das funções, os programadores usam-nos tanto no dia a dia que vale muito a pena fazermos um treino focado para nunca mais os confudires.</text:p>
      <text:p text:style-name="P1">A melhor forma de os diferenciar é pensar em <text:span text:style-name="T1">Tempo de Construção</text:span> vs. <text:span text:style-name="T1">Tempo de Execução</text:span>.</text:p>
      <text:h text:style-name="P2" text:outline-level="3">🧱 Parâmetros: Os Moldes (Na Construção)</text:h>
      <text:p text:style-name="P1">O <text:span text:style-name="T1">Parâmetro</text:span> é a variável que tu pões na definição da função. Ele não tem um valor real ainda; é apenas um <text:span text:style-name="T1">molde</text:span>, um espaço reservado (como uma gaveta vazia com uma etiqueta).</text:p>
      <text:p text:style-name="P3">JavaScript</text:p>
      <text:p text:style-name="P4"><text:span text:style-name="Source_20_Text">// O "nome" e o "cargo" são PARÂMETROS</text:span></text:p>
      <text:p text:style-name="P4"><text:span text:style-name="Source_20_Text">function criarCracha(nome, cargo) {</text:span></text:p>
      <text:p text:style-name="P4"><text:span text:style-name="Source_20_Text"><text:s text:c="4"/>return "Funcionário: " + nome + " | Cargo: " + cargo;</text:span></text:p>
      <text:p text:style-name="P4"><text:span text:style-name="Source_20_Text">}</text:span></text:p>
      <text:h text:style-name="P5" text:outline-level="3">📦 Argumentos: Os Dados Reais (Na Execução)</text:h>
      <text:p text:style-name="P1">O <text:span text:style-name="T1">Argumento</text:span> é o valor real que tu passas para dentro da função quando a estás a chamar (a ligar a máquina). É o dado concreto que vai preencher o molde.</text:p>
      <text:p text:style-name="P3">JavaScript</text:p>
      <text:p text:style-name="P4"><text:span text:style-name="Source_20_Text">// "Ana" e "Designer" são ARGUMENTOS</text:span></text:p>
      <text:p text:style-name="P4"><text:span text:style-name="Source_20_Text">let crachaDaAna = criarCracha("Ana", "Designer");</text:span></text:p>
      <text:h text:style-name="P5" text:outline-level="3">🎯 O Truque de Tradução Mental</text:h>
      <text:p text:style-name="P1">Para nunca mais esqueceres:</text:p>
      <text:list text:style-name="L1">
        <text:list-item>
          <text:p text:style-name="P6"><text:span text:style-name="T1">P</text:span>arâmetro começa com <text:span text:style-name="T1">P</text:span> de <text:span text:style-name="T1">Preparação</text:span> (Estou a preparar a função).</text:p>
        </text:list-item>
        <text:list-item>
          <text:p text:style-name="P6"><text:span text:style-name="T1">A</text:span>rgumento começa com <text:span text:style-name="T1">A</text:span> de <text:span text:style-name="T1">Ação</text:span> (Estou a pôr a função em ação com valores reais).</text:p>
        </text:list-item>
      </text:list>
      <text:h text:style-name="P2" text:outline-level="3">🏋️‍♂️ Exercício de Fixação: Detetive de Código</text:h>
      <text:p text:style-name="P1">Olha com atenção para este programa que calcula o preço de bilhetes de cinema com uma taxa fixa de sistema:</text:p>
      <text:p text:style-name="P3">JavaScript</text:p>
      <text:p text:style-name="P4"><text:span text:style-name="Source_20_Text">const taxaSistema = 2;</text:span></text:p>
      <text:p text:style-name="P4"/>
      <text:p text:style-name="P4"><text:span text:style-name="Source_20_Text">function calcularBilhete(quantidade, precoUnitario) {</text:span></text:p>
      <text:p text:style-name="P4"><text:span text:style-name="Source_20_Text"><text:s text:c="4"/>const total = (quantidade * precoUnitario) + taxaSistema;</text:span></text:p>
      <text:p text:style-name="P4"><text:span text:style-name="Source_20_Text"><text:s text:c="4"/>return total;</text:span></text:p>
      <text:p text:style-name="P4"><text:span text:style-name="Source_20_Text">}</text:span></text:p>
      <text:p text:style-name="P4"/>
      <text:p text:style-name="P4"><text:span text:style-name="Source_20_Text">const minhaConta = calcularBilhete(3, 7);</text:span></text:p>
      <text:p text:style-name="P7">A tua missão:</text:p>
      <text:list text:style-name="L2">
        <text:list-item>
          <text:p text:style-name="P8"><text:soft-page-break/>Quais são os <text:span text:style-name="T1">parâmetros</text:span> deste código?</text:p>
        </text:list-item>
        <text:list-item>
          <text:p text:style-name="P8">Quais são os <text:span text:style-name="T1">argumentos</text:span> utilizados?</text:p>
        </text:list-item>
        <text:list-item>
          <text:p text:style-name="P8">A variável <text:span text:style-name="Source_20_Text">taxaSistema</text:span> que está lá no topo é um parâmetro ou um argumento? (Cuidado com a rasteira!)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16:03:19.568537784</dc:date>
    <dc:creator>João António</dc:creator>
    <meta:editing-duration>PT1H45M40S</meta:editing-duration>
    <meta:editing-cycles>20</meta:editing-cycles>
    <meta:generator>LibreOffice/26.2.4.2$Linux_X86_64 LibreOffice_project/620$Build-2</meta:generator>
    <meta:document-statistic meta:table-count="0" meta:image-count="0" meta:object-count="0" meta:page-count="2" meta:paragraph-count="31" meta:word-count="293" meta:character-count="1695" meta:non-whitespace-character-count="1426"/>
  </office:meta>
</office:document-meta>
</file>