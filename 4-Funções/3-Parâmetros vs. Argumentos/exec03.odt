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tyle="italic"/>
    </style:style>
    <style:style style:name="P2" style:family="paragraph" style:parent-style-name="Heading_20_3">
      <style:paragraph-properties fo:margin-top="0cm" fo:margin-bottom="0.247cm" style:contextual-spacing="false" fo:line-height="115%"/>
      <style:text-properties fo:font-style="italic"/>
    </style:style>
    <style:style style:name="P3" style:family="paragraph" style:parent-style-name="Standard">
      <style:text-properties fo:font-style="italic"/>
    </style:style>
    <style:style style:name="P4" style:family="paragraph" style:parent-style-name="Preformatted_20_Text">
      <style:paragraph-properties fo:margin-top="0cm" fo:margin-bottom="0.247cm" style:contextual-spacing="false" fo:line-height="115%"/>
      <style:text-properties fo:font-style="italic"/>
    </style:style>
    <style:style style:name="P5" style:family="paragraph" style:parent-style-name="Heading_20_3">
      <style:text-properties fo:font-style="italic"/>
    </style:style>
    <style:style style:name="P6" style:family="paragraph" style:parent-style-name="Text_20_body" style:list-style-name="L1">
      <style:text-properties fo:font-style="italic"/>
    </style:style>
    <style:style style:name="P7" style:family="paragraph" style:parent-style-name="Text_20_body">
      <style:text-properties fo:font-style="italic" fo:font-weight="bold"/>
    </style:style>
    <style:style style:name="P8" style:family="paragraph" style:parent-style-name="Text_20_body" style:list-style-name="L2">
      <style:text-properties fo:font-style="italic"/>
    </style:style>
    <style:style style:name="P9" style:family="paragraph" style:parent-style-name="Text_20_body" style:list-style-name="L3">
      <style:text-properties fo:font-style="italic"/>
    </style:style>
    <style:style style:name="P10" style:family="paragraph" style:parent-style-name="Text_20_body" style:list-style-name="L4">
      <style:text-properties fo:font-style="italic"/>
    </style:style>
    <style:style style:name="P11" style:family="paragraph" style:parent-style-name="Text_20_body" style:list-style-name="L5">
      <style:text-properties fo:font-style="italic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celente escolha! Embora tenhas visto estes dois termos de relance na anatomia das funções, os programadores usam-nos tanto no dia a dia que vale muito a pena fazermos um treino focado para nunca mais os confudires.</text:p>
      <text:p text:style-name="P1">A melhor forma de os diferenciar é pensar em <text:span text:style-name="T1">Tempo de Construção</text:span> vs. <text:span text:style-name="T1">Tempo de Execução</text:span>.</text:p>
      <text:h text:style-name="P2" text:outline-level="3">🧱 Parâmetros: Os Moldes (Na Construção)</text:h>
      <text:p text:style-name="P1">O <text:span text:style-name="T1">Parâmetro</text:span> é a variável que tu pões na definição da função. Ele não tem um valor real ainda; é apenas um <text:span text:style-name="T1">molde</text:span>, um espaço reservado (como uma gaveta vazia com uma etiqueta).</text:p>
      <text:p text:style-name="P3">JavaScript</text:p>
      <text:p text:style-name="P4"><text:span text:style-name="Source_20_Text">// O "nome" e o "cargo" são PARÂMETROS</text:span></text:p>
      <text:p text:style-name="P4"><text:span text:style-name="Source_20_Text">function criarCracha(nome, cargo) {</text:span></text:p>
      <text:p text:style-name="P4"><text:span text:style-name="Source_20_Text"><text:s text:c="4"/>return "Funcionário: " + nome + " | Cargo: " + cargo;</text:span></text:p>
      <text:p text:style-name="P4"><text:span text:style-name="Source_20_Text">}</text:span></text:p>
      <text:h text:style-name="P5" text:outline-level="3">📦 Argumentos: Os Dados Reais (Na Execução)</text:h>
      <text:p text:style-name="P1">O <text:span text:style-name="T1">Argumento</text:span> é o valor real que tu passas para dentro da função quando a estás a chamar (a ligar a máquina). É o dado concreto que vai preencher o molde.</text:p>
      <text:p text:style-name="P3">JavaScript</text:p>
      <text:p text:style-name="P4"><text:span text:style-name="Source_20_Text">// "Ana" e "Designer" são ARGUMENTOS</text:span></text:p>
      <text:p text:style-name="P4"><text:span text:style-name="Source_20_Text">let crachaDaAna = criarCracha("Ana", "Designer");</text:span></text:p>
      <text:h text:style-name="P5" text:outline-level="3">🎯 O Truque de Tradução Mental</text:h>
      <text:p text:style-name="P1">Para nunca mais esqueceres:</text:p>
      <text:list text:style-name="L1">
        <text:list-item>
          <text:p text:style-name="P6"><text:span text:style-name="T1">P</text:span>arâmetro começa com <text:span text:style-name="T1">P</text:span> de <text:span text:style-name="T1">Preparação</text:span> (Estou a preparar a função).</text:p>
        </text:list-item>
        <text:list-item>
          <text:p text:style-name="P6"><text:span text:style-name="T1">A</text:span>rgumento começa com <text:span text:style-name="T1">A</text:span> de <text:span text:style-name="T1">Ação</text:span> (Estou a pôr a função em ação com valores reais).</text:p>
        </text:list-item>
      </text:list>
      <text:h text:style-name="P2" text:outline-level="3">🏋️‍♂️ Exercício de Fixação: Detetive de Código</text:h>
      <text:p text:style-name="P1">Olha com atenção para este programa que calcula o preço de bilhetes de cinema com uma taxa fixa de sistema:</text:p>
      <text:p text:style-name="P3">JavaScript</text:p>
      <text:p text:style-name="P4"><text:span text:style-name="Source_20_Text">const taxaSistema = 2;</text:span></text:p>
      <text:p text:style-name="P4"/>
      <text:p text:style-name="P4"><text:span text:style-name="Source_20_Text">function calcularBilhete(quantidade, precoUnitario) {</text:span></text:p>
      <text:p text:style-name="P4"><text:span text:style-name="Source_20_Text"><text:s text:c="4"/>const total = (quantidade * precoUnitario) + taxaSistema;</text:span></text:p>
      <text:p text:style-name="P4"><text:span text:style-name="Source_20_Text"><text:s text:c="4"/>return total;</text:span></text:p>
      <text:p text:style-name="P4"><text:span text:style-name="Source_20_Text">}</text:span></text:p>
      <text:p text:style-name="P4"/>
      <text:p text:style-name="P4"><text:span text:style-name="Source_20_Text">const minhaConta = calcularBilhete(3, 7);</text:span></text:p>
      <text:p text:style-name="P7">A tua missão:</text:p>
      <text:list text:style-name="L2">
        <text:list-item>
          <text:p text:style-name="P8"><text:soft-page-break/>Quais são os <text:span text:style-name="T1">parâmetros</text:span> deste código?</text:p>
        </text:list-item>
        <text:list-item>
          <text:p text:style-name="P8">Quais são os <text:span text:style-name="T1">argumentos</text:span> utilizados?</text:p>
        </text:list-item>
        <text:list-item>
          <text:p text:style-name="P8">A variável <text:span text:style-name="Source_20_Text">taxaSistema</text:span> que está lá no topo é um parâmetro ou um argumento? (Cuidado com a rasteira!).</text:p>
        </text:list-item>
      </text:list>
      <text:p text:style-name="P1">quantidade, precoUnitario. 3 e 7. É um parametro.</text:p>
      <text:p text:style-name="P1"><text:span text:style-name="T1">Acertou em cheio nas duas primeiras, mas caiu na rasteira da terceira!</text:span> Não se preocupe, essa rasteira foi armada de propósito porque é uma confusão muito comum. Vamos desfazê-la num segundo.</text:p>
      <text:p text:style-name="P1">As suas duas primeiras respostas estão <text:span text:style-name="T1">100% corretas</text:span>:</text:p>
      <text:list text:style-name="L3">
        <text:list-item>
          <text:p text:style-name="P9"><text:span text:style-name="T1">Parâmetros:</text:span> <text:span text:style-name="Source_20_Text">quantidade</text:span> e <text:span text:style-name="Source_20_Text">precoUnitario</text:span> (os moldes na definição).</text:p>
        </text:list-item>
        <text:list-item>
          <text:p text:style-name="P9"><text:span text:style-name="T1">Argumentos:</text:span> <text:span text:style-name="Source_20_Text">3</text:span> e <text:span text:style-name="Source_20_Text">7</text:span> (os valores reais na ação).</text:p>
        </text:list-item>
      </text:list>
      <text:h text:style-name="P2" text:outline-level="3">🕵️‍♂️ Desmascarando a Rasteira: O que é a <text:span text:style-name="Source_20_Text">taxaSistema</text:span>?</text:h>
      <text:p text:style-name="P1">A variável <text:span text:style-name="Source_20_Text">taxaSistema</text:span> <text:span text:style-name="T1">não é um parâmetro</text:span>.</text:p>
      <text:p text:style-name="P1"><text:span text:style-name="T1">Porquê?</text:span> Lembre-se da regra: os parâmetros vivem obrigatoriamente dentro dos parênteses da definição da função <text:span text:style-name="Source_20_Text">function calcularBilhete(quantidade, precoUnitario)</text:span>.</text:p>
      <text:p text:style-name="P1">Como a <text:span text:style-name="Source_20_Text">taxaSistema</text:span> foi criada fora da função, ela é apenas uma <text:span text:style-name="T1">Variável Global</text:span> normal. A função consegue olhar para fora e usá-la na conta, mas ela nunca passou pelo processo de ser um molde (parâmetro) ou de ser injetada na chamada (argumento).</text:p>
      <text:h text:style-name="P2" text:outline-level="3">🚀 O Próximo Nível: Parâmetros Predefinidos (Default Parameters)</text:h>
      <text:p text:style-name="P1">Agora que sabe a diferença exata, imagine que o seu chefe diz: "Olha, a maioria dos bilhetes de cinema custa 7€. Quero que a função assuma o valor 7 automaticamente se o utilizador se esquecer de passar o preço."</text:p>
      <text:p text:style-name="P1">No JavaScript moderno, podemos dar um "valor de fábrica" a um parâmetro diretamente no molde. Veja como se faz:</text:p>
      <text:p text:style-name="P3">JavaScript</text:p>
      <text:p text:style-name="P4"><text:span text:style-name="Source_20_Text">// O precoUnitario agora tem um valor padrão de 7</text:span></text:p>
      <text:p text:style-name="P4"><text:span text:style-name="Source_20_Text">function calcularBilhete(quantidade, precoUnitario = 7) {</text:span></text:p>
      <text:p text:style-name="P4"><text:span text:style-name="Source_20_Text"><text:s text:c="4"/>return (quantidade * precoUnitario) + 2;</text:span></text:p>
      <text:p text:style-name="P4"><text:span text:style-name="Source_20_Text">}</text:span></text:p>
      <text:p text:style-name="P4"/>
      <text:p text:style-name="P4"><text:span text:style-name="Source_20_Text">// Cenário A: Passamos os dois argumentos</text:span></text:p>
      <text:p text:style-name="P4"><text:span text:style-name="Source_20_Text">console.log(calcularBilhete(2, 10)); // Conta: (2 * 10) + 2 = 22</text:span></text:p>
      <text:p text:style-name="P4"/>
      <text:p text:style-name="P4"><text:span text:style-name="Source_20_Text">// Cenário B: Esquecemo-nos do segundo argumento!</text:span></text:p>
      <text:p text:style-name="P4"><text:span text:style-name="Source_20_Text">console.log(calcularBilhete(2)); <text:s text:c="4"/>// Conta: (2 * 7) + 2 = 16</text:span></text:p>
      <text:h text:style-name="P5" text:outline-level="3"><text:soft-page-break/>🏋️‍♂️ Pequeno Teste de Fogo</text:h>
      <text:p text:style-name="P1">Olhe para o <text:span text:style-name="T1">Cenário B</text:span> acima: <text:span text:style-name="Source_20_Text">calcularBilhete(2)</text:span>.</text:p>
      <text:list text:style-name="L4">
        <text:list-item>
          <text:p text:style-name="P10">Quantos <text:span text:style-name="T1">argumentos</text:span> enviámos nesta chamada?</text:p>
        </text:list-item>
        <text:list-item>
          <text:p text:style-name="P10">O parâmetro <text:span text:style-name="Source_20_Text">precoUnitario</text:span> vai assumir que valor nesta execução?</text:p>
        </text:list-item>
      </text:list>
      <text:p text:style-name="P1">Consegue ler o que vai acontecer aqui?</text:p>
      <text:p text:style-name="P1">1 argumento. Acho que vai assumir o valor de <text:s/>argumentos.</text:p>
      <text:p text:style-name="P1"><text:span text:style-name="T1">Exatamente! Enviámos apenas 1 argumento</text:span> (o número <text:span text:style-name="Source_20_Text">2</text:span>).</text:p>
      <text:p text:style-name="P1">E a sua intuição está certa no conceito, apenas a palavra falhou por um triz na hora de explicar: o <text:span text:style-name="Source_20_Text">precoUnitario</text:span> vai assumir o <text:span text:style-name="T1">valor padrão (ou default)</text:span> que deixámos guardado no molde, que é o <text:span text:style-name="Source_20_Text"><text:span text:style-name="T1">7</text:span></text:span>.</text:p>
      <text:p text:style-name="P1">Como o computador viu que nós não enviámos o segundo argumento, ele pensou: "Bem, ele não me deu o preço, por isso vou usar o valor de fábrica de 7€ que está aqui no parâmetro!"</text:p>
      <text:h text:style-name="P2" text:outline-level="3">🌟 Um Grande Marco na Sua Aprendizagem!</text:h>
      <text:p text:style-name="P1">Você agora domina a diferença crucial entre <text:span text:style-name="T1">Parâmetros</text:span> e <text:span text:style-name="T1">Argumentos</text:span>, sabe como criar valores padrão para evitar erros no código e já lê Arrow Functions como um profissional.</text:p>
      <text:p text:style-name="P1">Esta era a base sólida que precisava. A partir daqui, as coisas tornam-se ainda mais divertidas! Qual destas portas quer abrir agora?</text:p>
      <text:list text:style-name="L5">
        <text:list-item>
          <text:p text:style-name="P11"><text:span text:style-name="T1">1. Métodos Modernos de Arrays:</text:span> Aprender como o JavaScript usa estas funções para vasculhar, filtrar e transformar listas num piscar de olhos (com comandos mágicos como <text:span text:style-name="Source_20_Text">.filter()</text:span> e <text:span text:style-name="Source_20_Text">.map()</text:span>).</text:p>
        </text:list-item>
        <text:list-item>
          <text:p text:style-name="P11"><text:span text:style-name="T1">2. Projeto Prático 3:</text:span> Criar um sistema completo de "Carrinho de Compras" que use funções, parâmetros padrão e loops para calcular descontos reais.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7T16:28:15.006764148</dc:date>
    <dc:creator>João António</dc:creator>
    <meta:editing-duration>PT2H10M35S</meta:editing-duration>
    <meta:editing-cycles>22</meta:editing-cycles>
    <meta:generator>LibreOffice/26.2.4.2$Linux_X86_64 LibreOffice_project/620$Build-2</meta:generator>
    <meta:document-statistic meta:table-count="0" meta:image-count="0" meta:object-count="0" meta:page-count="3" meta:paragraph-count="66" meta:word-count="797" meta:character-count="4742" meta:non-whitespace-character-count="4001"/>
  </office:meta>
</office:document-meta>
</file>