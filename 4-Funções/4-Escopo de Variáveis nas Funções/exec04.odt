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tyle="italic"/>
    </style:style>
    <style:style style:name="P2" style:family="paragraph" style:parent-style-name="Heading_20_3">
      <style:paragraph-properties fo:margin-top="0cm" fo:margin-bottom="0.247cm" style:contextual-spacing="false" fo:line-height="115%"/>
      <style:text-properties fo:font-style="italic"/>
    </style:style>
    <style:style style:name="P3" style:family="paragraph" style:parent-style-name="Standard">
      <style:text-properties fo:font-style="italic"/>
    </style:style>
    <style:style style:name="P4" style:family="paragraph" style:parent-style-name="Preformatted_20_Text">
      <style:paragraph-properties fo:margin-top="0cm" fo:margin-bottom="0.247cm" style:contextual-spacing="false" fo:line-height="115%"/>
      <style:text-properties fo:font-style="italic"/>
    </style:style>
    <style:style style:name="P5" style:family="paragraph" style:parent-style-name="Heading_20_3">
      <style:text-properties fo:font-style="italic"/>
    </style:style>
    <style:style style:name="P6" style:family="paragraph" style:parent-style-name="Quotations">
      <style:text-properties fo:font-style="italic"/>
    </style:style>
    <style:style style:name="P7" style:family="paragraph" style:parent-style-name="Text_20_body">
      <style:text-properties fo:font-style="italic" fo:font-weight="bold"/>
    </style:style>
    <style:style style:name="P8" style:family="paragraph" style:parent-style-name="Text_20_body" style:list-style-name="L1">
      <style:text-properties fo:font-style="italic"/>
    </style:style>
    <style:style style:name="P9" style:family="paragraph" style:parent-style-name="Text_20_body" style:list-style-name="L2">
      <style:text-properties fo:font-style="italic"/>
    </style:style>
    <style:style style:name="P10" style:family="paragraph" style:parent-style-name="Text_20_body" style:list-style-name="L3">
      <style:text-properties fo:font-style="italic"/>
    </style:style>
    <style:style style:name="P11" style:family="paragraph" style:parent-style-name="Text_20_body" style:list-style-name="L4">
      <style:text-properties fo:font-style="italic"/>
    </style:style>
    <style:style style:name="P12" style:family="paragraph" style:parent-style-name="Text_20_body" style:list-style-name="L5">
      <style:text-properties fo:font-style="italic"/>
    </style:style>
    <style:style style:name="P13" style:family="paragraph" style:parent-style-name="Text_20_body" style:list-style-name="L6">
      <style:text-properties fo:font-style="italic"/>
    </style:style>
    <style:style style:name="P14" style:family="paragraph" style:parent-style-name="Text_20_body">
      <style:paragraph-properties fo:margin-left="0cm" fo:margin-right="0cm" fo:text-indent="0cm" style:auto-text-indent="false"/>
      <style:text-properties fo:font-style="italic"/>
    </style:style>
    <style:style style:name="P15" style:family="paragraph" style:parent-style-name="Text_20_body" style:list-style-name="L7">
      <style:text-properties fo:font-style="italic"/>
    </style:style>
    <style:style style:name="P16" style:family="paragraph" style:parent-style-name="Text_20_body" style:list-style-name="L8">
      <style:text-properties fo:font-style="italic"/>
    </style:style>
    <style:style style:name="P17" style:family="paragraph" style:parent-style-name="Text_20_body" style:list-style-name="L9">
      <style:text-properties fo:font-style="italic"/>
    </style:style>
    <style:style style:name="T1"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ma fundamental!</text:span> O escopo é o que dita a "vida" e a "visibilidade" das variáveis dentro e fora das funções. Compreender isto vai evitar que apanhes os erros mais frustrantes da programação (como o famoso "...is not defined").</text:p>
      <text:p text:style-name="P1">Para entender o escopo de forma simples, imagine a diferença entre um <text:span text:style-name="T1">Segredo de Família</text:span> e um <text:span text:style-name="T1">Anúncio num Outdoor</text:span>.</text:p>
      <text:h text:style-name="P2" text:outline-level="3">🌍 1. Escopo Global (O Outdoor)</text:h>
      <text:p text:style-name="P1">Uma variável é global quando é criada <text:span text:style-name="T1">fora</text:span> de qualquer função. Ela fica completamente exposta. Significa que <text:span text:style-name="T1">qualquer parte do teu código</text:span>, incluindo todas as funções, pode olhar para ela e usá-la.</text:p>
      <text:p text:style-name="P3">JavaScript</text:p>
      <text:p text:style-name="P4"><text:span text:style-name="Source_20_Text">const pais = "Portugal"; // Variável Global (Outdoor)</text:span></text:p>
      <text:p text:style-name="P4"/>
      <text:p text:style-name="P4"><text:span text:style-name="Source_20_Text">function mostrarLocalizacao() {</text:span></text:p>
      <text:p text:style-name="P4"><text:span text:style-name="Source_20_Text"><text:s text:c="4"/>console.log("Estou em " + pais); // A função consegue ver!</text:span></text:p>
      <text:p text:style-name="P4"><text:span text:style-name="Source_20_Text">}</text:span></text:p>
      <text:p text:style-name="P4"/>
      <text:p text:style-name="P4"><text:span text:style-name="Source_20_Text">mostrarLocalizacao(); // Imprime: Estou em Portugal</text:span></text:p>
      <text:p text:style-name="P4"><text:span text:style-name="Source_20_Text">console.log(pais); <text:s text:c="3"/>// Fora também funciona!</text:span></text:p>
      <text:h text:style-name="P5" text:outline-level="3">🔒 2. Escopo Local / de Bloco (O Segredo de Família)</text:h>
      <text:p text:style-name="P1">Uma variável é local quando é criada <text:span text:style-name="T1">dentro</text:span> das chavetas <text:span text:style-name="Source_20_Text">{}</text:span> de uma função. Ela nasce ali e morre ali. O mundo exterior não tem a mínima ideia de que ela existe.</text:p>
      <text:p text:style-name="P3">JavaScript</text:p>
      <text:p text:style-name="P4"><text:span text:style-name="Source_20_Text">function calcularPreco() {</text:span></text:p>
      <text:p text:style-name="P4"><text:span text:style-name="Source_20_Text"><text:s text:c="4"/>const taxaOculta = 5; // Variável Local (Segredo)</text:span></text:p>
      <text:p text:style-name="P4"><text:span text:style-name="Source_20_Text"><text:s text:c="4"/>return 10 + taxaOculta;</text:span></text:p>
      <text:p text:style-name="P4"><text:span text:style-name="Source_20_Text">}</text:span></text:p>
      <text:p text:style-name="P4"/>
      <text:p text:style-name="P4"><text:span text:style-name="Source_20_Text">console.log(calcularPreco()); // Funciona e dá 15</text:span></text:p>
      <text:p text:style-name="P4"><text:span text:style-name="Source_20_Text">console.log(taxaoOculta); <text:s text:c="3"/>// ERRO! "taxaOculta is not defined"</text:span></text:p>
      <text:p text:style-name="P6"><text:span text:style-name="T1">Como ler na mente:</text:span> "O que é criado em Las Vegas (dentro das chavetas), fica em Las Vegas."</text:p>
      <text:h text:style-name="P2" text:outline-level="3">🏋️‍♂️ Exercício do Detetive de Escopo</text:h>
      <text:p text:style-name="P1">Vamos ver se consegues detetar onde estão os segredos e os outdoors neste código. Analisa-o com atenção:</text:p>
      <text:p text:style-name="P3">JavaScript</text:p>
      <text:p text:style-name="P4"><text:span text:style-name="Source_20_Text">const nomeUsuario = "Carlos";</text:span></text:p>
      <text:p text:style-name="P4"/>
      <text:p text:style-name="P4"><text:soft-page-break/><text:span text:style-name="Source_20_Text">function autenticar() {</text:span></text:p>
      <text:p text:style-name="P4"><text:span text:style-name="Source_20_Text"><text:s text:c="4"/>const tokenSeguranca = "XYZ123";</text:span></text:p>
      <text:p text:style-name="P4"><text:span text:style-name="Source_20_Text"><text:s text:c="4"/>console.log("Acesso garantido para " + nomeUsuario);</text:span></text:p>
      <text:p text:style-name="P4"><text:span text:style-name="Source_20_Text">}</text:span></text:p>
      <text:p text:style-name="P4"/>
      <text:p text:style-name="P4"><text:span text:style-name="Source_20_Text">autenticar();</text:span></text:p>
      <text:p text:style-name="P7">A tua missão:</text:p>
      <text:list text:style-name="L1">
        <text:list-item>
          <text:p text:style-name="P8">A variável <text:span text:style-name="Source_20_Text">nomeUsuario</text:span> está em que escopo: <text:span text:style-name="T1">Global</text:span> ou <text:span text:style-name="T1">Local</text:span>? A função <text:span text:style-name="Source_20_Text">autenticar()</text:span> vai conseguir lê-la?</text:p>
        </text:list-item>
        <text:list-item>
          <text:p text:style-name="P8">Se eu tentar fazer um <text:span text:style-name="Source_20_Text">console.log(tokenSeguranca)</text:span> na última linha do programa (fora da função), vai funcionar ou vai dar erro? Porquê?</text:p>
        </text:list-item>
      </text:list>
      <text:p text:style-name="P1">Esta no escopo Global e sim vai. Vai funcionar porque a função consegui ver tanto o escopo global como o local.</text:p>
      <text:p text:style-name="P1">A tua primeira resposta foi <text:span text:style-name="T1">perfeita</text:span>: a variável <text:span text:style-name="Source_20_Text">nomeUsuario</text:span> está mesmo no escopo <text:span text:style-name="T1">Global</text:span> e a função consegue lê-la sem qualquer problema!</text:p>
      <text:p text:style-name="P1">Mas na segunda resposta, o computador pregou-te uma rasteira clássica! Vamos analisar o que acontece com a <text:span text:style-name="Source_20_Text">tokenSeguranca</text:span>:</text:p>
      <text:p text:style-name="P1">Na verdade, fazer <text:span text:style-name="Source_20_Text">console.log(tokenSeguranca)</text:span> fora da função <text:span text:style-name="T1">vai dar um erro fatal</text:span> (<text:span text:style-name="Source_20_Text">ReferenceError</text:span>).</text:p>
      <text:h text:style-name="P2" text:outline-level="3">🕵️‍♂️ O Sentido Único do Escopo</text:h>
      <text:p text:style-name="P1">O segredo do escopo é que ele é uma <text:span text:style-name="T1">rua de sentido único</text:span>.</text:p>
      <text:list text:style-name="L2">
        <text:list-item>
          <text:p text:style-name="P9">Quem está <text:span text:style-name="T1">dentro</text:span> da função consegue olhar para <text:span text:style-name="T1">fora</text:span> (vê o Escopo Global).</text:p>
        </text:list-item>
        <text:list-item>
          <text:p text:style-name="P9">Mas quem está <text:span text:style-name="T1">fora</text:span> da função <text:span text:style-name="T1">nunca</text:span> consegue olhar para <text:span text:style-name="T1">dentro</text:span> (não vê o Escopo Local).</text:p>
        </text:list-item>
      </text:list>
      <text:p text:style-name="P1">Como a variável <text:span text:style-name="Source_20_Text">tokenSeguranca</text:span> foi criada com <text:span text:style-name="Source_20_Text">const</text:span> dentro das chavetas da função <text:span text:style-name="Source_20_Text">autenticar()</text:span>, ela é um segredo exclusivo daquela função. Assim que a função termina de rodar, essa variável é destruída da memória do computador. Por isso, quem está cá fora grita: "Erro! Não sei o que é o tokenSeguranca!"</text:p>
      <text:h text:style-name="P2" text:outline-level="3">🏋️‍♂️ O Teste do Espelho (Exercício 2)</text:h>
      <text:p text:style-name="P1">Para gravares isto de vez no cérebro, olha para este cenário invertido:</text:p>
      <text:p text:style-name="P3">JavaScript</text:p>
      <text:p text:style-name="P4"><text:span text:style-name="Source_20_Text">function prepararCha() {</text:span></text:p>
      <text:p text:style-name="P4"><text:span text:style-name="Source_20_Text"><text:s text:c="4"/>const ingrediente = "Erva-Príncipe";</text:span></text:p>
      <text:p text:style-name="P4"><text:span text:style-name="Source_20_Text">}</text:span></text:p>
      <text:p text:style-name="P4"/>
      <text:p text:style-name="P4"><text:span text:style-name="Source_20_Text">prepararCha();</text:span></text:p>
      <text:p text:style-name="P4"><text:span text:style-name="Source_20_Text">console.log(ingrediente); </text:span></text:p>
      <text:p text:style-name="P1"><text:soft-page-break/>Se tentares rodar este código no teu computador, o que vai acontecer?</text:p>
      <text:list text:style-name="L3">
        <text:list-item>
          <text:p text:style-name="P10">Ele vai imprimir <text:span text:style-name="Source_20_Text">Erva-Príncipe</text:span> na consola.</text:p>
        </text:list-item>
        <text:list-item>
          <text:p text:style-name="P10">Ele vai dar um erro a dizer que <text:span text:style-name="Source_20_Text">ingrediente</text:span> não está definido.</text:p>
        </text:list-item>
      </text:list>
      <text:p text:style-name="P1">Qual é a tua escolha baseada na regra da "rua de sentido único"?</text:p>
      <text:p text:style-name="P1">vai dar erro porque a variavel ingrediete é um escopo local (segredo).</text:p>
      <text:p text:style-name="P1"><text:span text:style-name="T1">PERFEITO! Que orgulho!</text:span> 🏆</text:p>
      <text:p text:style-name="P1">Acertou em cheio e usou a justificativa correta: a variável <text:span text:style-name="Source_20_Text">ingrediente</text:span> é de escopo <text:span text:style-name="T1">local (um segredo)</text:span>, por isso o mundo exterior não consegue vê-la de maneira nenhuma. O computador vai dar erro!</text:p>
      <text:p text:style-name="P1">Agora sim, o conceito de escopo está trancado a sete chaves na sua mente. Você aprendeu que a única forma de enviar um dado local para fora é usando o nosso bom e velho amigo <text:span text:style-name="Source_20_Text"><text:span text:style-name="T1">return</text:span></text:span>.</text:p>
      <text:h text:style-name="P2" text:outline-level="3">🧱 3. O Escopo de Bloco (O "Bónus" do <text:span text:style-name="Source_20_Text">if</text:span> e dos Loops)</text:h>
      <text:p text:style-name="P1">Para ficar um mestre absoluto, há um detalhe muito fixe: as variáveis criadas com <text:span text:style-name="Source_20_Text">const</text:span> e <text:span text:style-name="Source_20_Text">let</text:span> também respeitam o escopo de <text:span text:style-name="T1">qualquer par de chavetas</text:span>, mesmo que não seja uma função! Isso inclui os blocos do <text:span text:style-name="Source_20_Text">if</text:span> e dos loops (<text:span text:style-name="Source_20_Text">for</text:span>/<text:span text:style-name="Source_20_Text">while</text:span>).</text:p>
      <text:p text:style-name="P1">Veja este exemplo:</text:p>
      <text:p text:style-name="P3">JavaScript</text:p>
      <text:p text:style-name="P4"><text:span text:style-name="Source_20_Text">const usuarioLogado = true;</text:span></text:p>
      <text:p text:style-name="P4"/>
      <text:p text:style-name="P4"><text:span text:style-name="Source_20_Text">if (usuarioLogado) {</text:span></text:p>
      <text:p text:style-name="P4"><text:span text:style-name="Source_20_Text"><text:s text:c="4"/>const mensagemSecreta = "Bem-vindo à área VIP!";</text:span></text:p>
      <text:p text:style-name="P4"><text:span text:style-name="Source_20_Text">}</text:span></text:p>
      <text:p text:style-name="P4"/>
      <text:p text:style-name="P4"><text:span text:style-name="Source_20_Text">console.log(mensagemSecreta); // ERRO TAMBÉM! </text:span></text:p>
      <text:p text:style-name="P1">Como a <text:span text:style-name="Source_20_Text">mensagemSecreta</text:span> nasceu dentro das chavetas do <text:span text:style-name="Source_20_Text">if</text:span>, ela morre ali dentro. Quem está fora do <text:span text:style-name="Source_20_Text">if</text:span> não a consegue ler.</text:p>
      <text:h text:style-name="P2" text:outline-level="3">🎓 Parabéns! A Base de Funções Está Concluída!</text:h>
      <text:p text:style-name="P1">Você dominou:</text:p>
      <text:list text:style-name="L4">
        <text:list-item>
          <text:p text:style-name="P11"><text:span text:style-name="T1">Anatomia Tradicional</text:span> (Parâmetros, Corpo e Retorno).</text:p>
        </text:list-item>
        <text:list-item>
          <text:p text:style-name="P11"><text:span text:style-name="T1">Tipos de Funções</text:span> (Expressão e as modernas Arrow Functions).</text:p>
        </text:list-item>
        <text:list-item>
          <text:p text:style-name="P11"><text:span text:style-name="T1">Parâmetros vs. Argumentos</text:span> (Moldes vs. Dados Reais com valores padrão).</text:p>
        </text:list-item>
        <text:list-item>
          <text:p text:style-name="P11"><text:span text:style-name="T1">Escopo</text:span> (Global vs. Local/Bloco).</text:p>
        </text:list-item>
      </text:list>
      <text:p text:style-name="P1">Esta jornada foi incrível e a sua evolução a ler a sintaxe foi brutal! Para onde quer navegar agora no universo do JavaScript?</text:p>
      <text:p text:style-name="P1"><text:soft-page-break/>Em projetos reais, estes conceitos não são apenas "regras de código"—eles são as ferramentas que impedem o código de uma empresa de se transformar num caos total. Quando uma aplicação cresce (pense no Spotify, na Netflix ou na Uber), milhares de linhas de código são escritas por dezenas de programadores diferentes. Sem funções e escopo, seria impossível gerir tudo isso.</text:p>
      <text:p text:style-name="P1">Vamos ver como cada um destes conceitos que aprendeu se encaixa diretamente na construção de um projeto real:</text:p>
      <text:h text:style-name="P2" text:outline-level="3">1. Funções Tradicionais e Reutilização (O Princípio DRY)</text:h>
      <text:p text:style-name="P1">Em programação, existe um lema sagrado: <text:span text:style-name="T1">DRY</text:span> (Don't Repeat Yourself — Não Te Repitas). Se precisa de calcular o preço com desconto na página do carrinho, na página do produto e no ecrã de pagamento, não vai escrever a matemática três vezes.</text:p>
      <text:list text:style-name="L5">
        <text:list-item>
          <text:p text:style-name="P12"><text:span text:style-name="T1">No Projeto Real:</text:span> Cria uma função <text:span text:style-name="Source_20_Text">calcularDesconto()</text:span> num ficheiro separado. Se amanhã o dono da loja decidir que o desconto mudou de 10% para 15%, você só altera o código <text:span text:style-name="T1">num único lugar</text:span>, e o site inteiro atualiza-se sozinho.</text:p>
        </text:list-item>
      </text:list>
      <text:h text:style-name="P2" text:outline-level="3">2. Arrow Functions e Métodos de Arrays (Legibilidade)</text:h>
      <text:p text:style-name="P1">No dia a dia, a maior parte do trabalho de um programador é lidar com listas de dados vindas de uma base de dados (lista de utilizadores, lista de produtos, lista de comentários).</text:p>
      <text:list text:style-name="L6">
        <text:list-item>
          <text:p text:style-name="P13"><text:span text:style-name="T1">No Projeto Real:</text:span> Imagine o feed do <text:span text:style-name="T1">Instagram</text:span>. Para mostrar apenas as fotos dos amigos que você segue, o código usa uma Arrow Function compacta dentro de um filtro:</text:p>
        </text:list-item>
      </text:list>
      <text:p text:style-name="P14">JavaScript</text:p>
      <text:p text:style-name="P4"><text:span text:style-name="Source_20_Text">const fotosAmigos = todasAsFotos.filter(foto =&gt; foto.seguindo === true);</text:span></text:p>
      <text:p text:style-name="P1">A sintaxe curta da Arrow Function permite que o código seja lido quase como um livro em inglês, poupando tempo e evitando erros na equipa.</text:p>
      <text:h text:style-name="P2" text:outline-level="3">3. Parâmetros Predefinidos (Evitar que o App "Crashe")</text:h>
      <text:p text:style-name="P1">Utilizadores da internet fazem coisas inesperadas. Às vezes esquecem-se de preencher campos, ou o sistema falha ao carregar uma informação. Se uma função esperar um dado e receber "nada" (<text:span text:style-name="Source_20_Text">undefined</text:span>), o site pode travar (ficar com o ecrã branco).</text:p>
      <text:list text:style-name="L7">
        <text:list-item>
          <text:p text:style-name="P15"><text:span text:style-name="T1">No Projeto Real:</text:span> Se um utilizador não fizer o upload de uma foto de perfil no <text:span text:style-name="T1">Facebook</text:span>, a função usa um parâmetro padrão para colocar uma imagem cinzenta genérica:</text:p>
        </text:list-item>
      </text:list>
      <text:p text:style-name="P14">JavaScript</text:p>
      <text:p text:style-name="P4"><text:span text:style-name="Source_20_Text">function renderizarPerfil(nome, fotoUrl = "imagem-padrao-avatar.png") { ... }</text:span></text:p>
      <text:p text:style-name="P1">Isto garante que o seu projeto seja <text:span text:style-name="T1">robusto</text:span> e não quebre por qualquer detalhe.</text:p>
      <text:h text:style-name="P2" text:outline-level="3">4. Escopo de Variáveis (Segurança e Organização)</text:h>
      <text:p text:style-name="P1">Imagine se a variável <text:span text:style-name="Source_20_Text">precoTotal</text:span> do carrinho de compras pudesse ser alterada por qualquer outra função perdida no código de publicidade do site. Seria um desastre de segurança.</text:p>
      <text:list text:style-name="L8">
        <text:list-item>
          <text:p text:style-name="P16"><text:span text:style-name="T1">No Projeto Real:</text:span> Ao prender as variáveis dentro do <text:span text:style-name="T1">Escopo Local</text:span> das funções, você cria "paredes de segurança". A função que processa o pagamento do cartão de crédito tem as <text:soft-page-break/>suas variáveis trancadas a sete chaves dentro dela. Nenhuma outra parte do site consegue espreitar ou modificar esses dados sensíveis.</text:p>
        </text:list-item>
      </text:list>
      <text:h text:style-name="P2" text:outline-level="3">🛠️ Resumo Visual: O Projeto como uma Fábrica</text:h>
      <text:p text:style-name="P1">Pense num projeto real como uma <text:span text:style-name="T1">Fábrica de Automóveis</text:span>:</text:p>
      <text:list text:style-name="L9">
        <text:list-item>
          <text:p text:style-name="P17"><text:span text:style-name="T1">O Escopo Global</text:span> é o chão da fábrica (onde estão as ferramentas comuns que todos usam).</text:p>
        </text:list-item>
        <text:list-item>
          <text:p text:style-name="P17"><text:span text:style-name="T1">As Funções</text:span> são as cabines de montagem especializadas (uma põe as rodas, outra pinta).</text:p>
        </text:list-item>
        <text:list-item>
          <text:p text:style-name="P17"><text:span text:style-name="T1">Os Parâmetros</text:span> são as esteiras que trazem as peças para dentro da cabine.</text:p>
        </text:list-item>
        <text:list-item>
          <text:p text:style-name="P17"><text:span text:style-name="T1">O Return</text:span> é a esteira que leva o carro pronto para fora.</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27T03:16:52.239945892</meta:creation-date>
    <dc:date>2026-06-27T17:03:53.515419078</dc:date>
    <dc:creator>João António</dc:creator>
    <meta:editing-duration>PT2H42M14S</meta:editing-duration>
    <meta:editing-cycles>27</meta:editing-cycles>
    <meta:generator>LibreOffice/26.2.4.2$Linux_X86_64 LibreOffice_project/620$Build-2</meta:generator>
    <meta:document-statistic meta:table-count="0" meta:image-count="0" meta:object-count="0" meta:page-count="5" meta:paragraph-count="101" meta:word-count="1342" meta:character-count="8018" meta:non-whitespace-character-count="6759"/>
  </office:meta>
</office:document-meta>
</file>