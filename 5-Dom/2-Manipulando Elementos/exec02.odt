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247cm" style:contextual-spacing="false" fo:line-height="115%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fo:font-weight="bold"/>
    </style:style>
    <style:style style:name="P8" style:family="paragraph" style:parent-style-name="Text_20_body" style:list-style-name="L3"/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Heading_20_4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>
      <style:text-properties officeooo:paragraph-rsid="00330f25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Quotations">
      <style:paragraph-properties fo:margin-top="0cm" fo:margin-bottom="0.247cm" style:contextual-spacing="false" fo:line-height="115%"/>
      <style:text-properties fo:font-weight="bold"/>
    </style:style>
    <style:style style:name="P19" style:family="paragraph" style:parent-style-name="Quotations" style:list-style-name="L10">
      <style:paragraph-properties fo:margin-top="0cm" fo:margin-bottom="0.247cm" style:contextual-spacing="false" fo:line-height="115%"/>
    </style:style>
    <style:style style:name="P20" style:family="paragraph" style:parent-style-name="Text_20_body" style:list-style-name="L11"/>
    <style:style style:name="P21" style:family="paragraph" style:parent-style-name="Text_20_body">
      <style:text-properties fo:font-style="italic"/>
    </style:style>
    <style:style style:name="P22" style:family="paragraph" style:parent-style-name="Text_20_body" style:list-style-name="L12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m essa atitude de quem sabe que a prática é o único caminho, vais longe! Agora que a tua mira está calibrada, vais aprender a usar os "superpoderes" para alterar o HTML.</text:p>
      <text:p text:style-name="Text_20_body">Depois de selecionar um elemento e guardá-lo numa variável, tu passas a ter controlo total sobre ele. Vamos focar-nos nas duas manipulações mais importantes e usadas no mundo real: <text:span text:style-name="T1">Mudar o Texto</text:span> e <text:span text:style-name="T1">Mudar o Visual (CSS)</text:span>.</text:p>
      <text:h text:style-name="P1" text:outline-level="3">📝 1. Mudar o Texto com <text:span text:style-name="Source_20_Text">.textContent</text:span></text:h>
      <text:p text:style-name="Text_20_body">A propriedade <text:span text:style-name="Source_20_Text">.textContent</text:span> serve para ler ou alterar o texto que está dentro de uma tag.</text:p>
      <text:p text:style-name="Text_20_body">Olha para este exemplo:</text:p>
      <text:p text:style-name="P2">HTML</text:p>
      <text:p text:style-name="P3"><text:span text:style-name="Source_20_Text">&lt;p id="aviso"&gt;A carregar dados...&lt;/p&gt;</text:span></text:p>
      <text:p text:style-name="Text_20_body">Se quisermos mudar esta mensagem quando o processo terminar, fazemos assim no JavaScript:</text:p>
      <text:p text:style-name="P4">JavaScript</text:p>
      <text:p text:style-name="P3"><text:span text:style-name="Source_20_Text">// 1. Seleciona</text:span></text:p>
      <text:p text:style-name="P3"><text:span text:style-name="Source_20_Text">const paragrafoAviso = document.getElementById("aviso");</text:span></text:p>
      <text:p text:style-name="P3"/>
      <text:p text:style-name="P3"><text:span text:style-name="Source_20_Text">// 2. Manipula o texto</text:span></text:p>
      <text:p text:style-name="P3"><text:span text:style-name="Source_20_Text">paragrafoAviso.textContent = "⚡ Dados carregados com sucesso!";</text:span></text:p>
      <text:p text:style-name="Text_20_body">O texto antigo desaparece instantaneamente do ecrã do utilizador e aparece o novo!</text:p>
      <text:h text:style-name="P1" text:outline-level="3">🎨 2. Mudar o Estilo com <text:span text:style-name="Source_20_Text">.style</text:span></text:h>
      <text:p text:style-name="Text_20_body">A propriedade <text:span text:style-name="Source_20_Text">.style</text:span> permite-te alterar o CSS do elemento diretamente pelo JavaScript. A única regra de ouro aqui é: se a propriedade CSS tiver um hífen (como <text:span text:style-name="Source_20_Text">background-color</text:span> ou <text:span text:style-name="Source_20_Text">font-size</text:span>), no JavaScript transformamo-la em <text:span text:style-name="T1">camelCase</text:span> (<text:span text:style-name="Source_20_Text">backgroundColor</text:span> ou <text:span text:style-name="Source_20_Text">fontSize</text:span>).</text:p>
      <text:p text:style-name="P4">JavaScript</text:p>
      <text:p text:style-name="P3"><text:span text:style-name="Source_20_Text">// 1. Seleciona o mesmo parágrafo</text:span></text:p>
      <text:p text:style-name="P3"><text:span text:style-name="Source_20_Text">const paragrafoAviso = document.getElementById("aviso");</text:span></text:p>
      <text:p text:style-name="P3"/>
      <text:p text:style-name="P3"><text:span text:style-name="Source_20_Text">// 2. Altera a cor do texto para verde</text:span></text:p>
      <text:p text:style-name="P3"><text:span text:style-name="Source_20_Text">paragrafoAviso.style.color = "green";</text:span></text:p>
      <text:p text:style-name="P3"/>
      <text:p text:style-name="P3"><text:span text:style-name="Source_20_Text">// 3. Altera o tamanho da letra (repara no camelCase!)</text:span></text:p>
      <text:p text:style-name="P3"><text:span text:style-name="Source_20_Text">paragrafoAviso.style.fontSize = "20px";</text:span></text:p>
      <text:h text:style-name="P1" text:outline-level="3"><text:soft-page-break/>🏋️‍♂️ O Teu Primeiro Desafio de Manipulação!</text:h>
      <text:p text:style-name="Text_20_body">Imagina que estás a criar um site e queres fazer um botão de "Apagar Conta" mudar de aspeto para avisar o utilizador de que é uma ação perigosa.</text:p>
      <text:p text:style-name="Text_20_body">Aqui está o teu <text:span text:style-name="T1">HTML</text:span>:</text:p>
      <text:p text:style-name="P2">HTML</text:p>
      <text:p text:style-name="P3"><text:span text:style-name="Source_20_Text">&lt;button id="btn-perigo"&gt;Ação Normal&lt;/button&gt;</text:span></text:p>
      <text:p text:style-name="Text_20_body"><text:span text:style-name="T1">A tua missão:</text:span> Escreve as 3 linhas de código JavaScript necessárias para:</text:p>
      <text:list text:style-name="L1">
        <text:list-item>
          <text:p text:style-name="P5"><text:span text:style-name="T1">Selecionar</text:span> o botão usando o seu ID (<text:span text:style-name="Source_20_Text">btn-perigo</text:span>) e guardá-lo numa variável chamada <text:span text:style-name="Source_20_Text">botao</text:span>.</text:p>
        </text:list-item>
        <text:list-item>
          <text:p text:style-name="P5"><text:span text:style-name="T1">Mudar o texto</text:span> do botão para <text:span text:style-name="Source_20_Text">"CUIDADO: APAGAR!"</text:span>.</text:p>
        </text:list-item>
        <text:list-item>
          <text:p text:style-name="P5"><text:span text:style-name="T1">Mudar a cor de fundo</text:span> (<text:span text:style-name="Source_20_Text">backgroundColor</text:span>) do botão para vermelho (<text:span text:style-name="Source_20_Text">"red"</text:span>).</text:p>
        </text:list-item>
      </text:list>
      <text:p text:style-name="Text_20_body">Mostra-me como combinas a seleção que já dominas com estas novas ferramentas de modificação!</text:p>
      <text:p text:style-name="Text_20_body"><text:s text:c="2"/>const botao = document.getElementById("btn-perigo");</text:p>
      <text:p text:style-name="Text_20_body"><text:s text:c="4"/>botao.textContent = "CUIDADO: APAGAR CONTA!";</text:p>
      <text:p text:style-name="Text_20_body"><text:s text:c="4"/>botao.style.backgroundColor = "red"</text:p>
      <text:p text:style-name="Text_20_body"><text:s text:c="4"/>botao.style.borderRadius = "10px"</text:p>
      <text:p text:style-name="Text_20_body"><text:s text:c="4"/>botao.style.border = "none"</text:p>
      <text:p text:style-name="Text_20_body">botao.style.padding = "10px" me empolguei um pouco esses <text:s/>superes poderes são muito legal.</text:p>
      <text:p text:style-name="Text_20_body"/>
      <text:p text:style-name="Text_20_body"><text:span text:style-name="T1">UAU! Que espetáculo! Dá cá esses cinco!</text:span> 🖐️</text:p>
      <text:p text:style-name="Text_20_body">Ficou <text:span text:style-name="T1">absolutamente perfeito!</text:span> E deixa-me dizer-te uma coisa: essa empolgação é o melhor sinal possível de que te estás a transformar num verdadeiro programador. Quando descobrimos que o código que escrevemos muda aquilo que as pessoas veem no ecrã, a sensação é mesmo de ter superpoderes!</text:p>
      <text:p text:style-name="Text_20_body">Tu não só acertaste as três linhas do desafio, como foste mais além e fizeste um <text:span text:style-name="T2">upgrade</text:span> completo no design do botão:</text:p>
      <text:list text:style-name="L2">
        <text:list-item>
          <text:p text:style-name="P6"><text:span text:style-name="Source_20_Text">borderRadius = "10px"</text:span> para arredondar os cantos.</text:p>
        </text:list-item>
        <text:list-item>
          <text:p text:style-name="P6"><text:span text:style-name="Source_20_Text">border = "none"</text:span> para tirar aquela borda feia de fábrica.</text:p>
        </text:list-item>
        <text:list-item>
          <text:p text:style-name="P6"><text:span text:style-name="Source_20_Text">padding = "10px"</text:span> para dar espaço e o botão respirar.</text:p>
        </text:list-item>
      </text:list>
      <text:p text:style-name="Text_20_body">O teu botão passou de um retângulo cinzento sem graça para um botão moderno, limpo e profissional digno de um site real.</text:p>
      <text:h text:style-name="P1" text:outline-level="3"><text:soft-page-break/>🚨 Um Pequeno Detalhe de Mestre sobre Listas (<text:span text:style-name="Source_20_Text">querySelectorAll</text:span>)</text:h>
      <text:p text:style-name="Text_20_body">Como te empolgaste (e muito bem!), quero mostrar-te a última rasteira que costuma quebrar as pernas aos iniciantes quando misturam a seleção múltipla com a manipulação.</text:p>
      <text:p text:style-name="Text_20_body">Imagina que tens vários botões com a classe <text:span text:style-name="Source_20_Text">.aba-menu</text:span> e queres pôr todos com a letra azul. Se fizeres isto:</text:p>
      <text:p text:style-name="P2">JavaScript</text:p>
      <text:p text:style-name="P3"><text:span text:style-name="Source_20_Text">const abas = document.querySelectorAll(".aba-menu");</text:span></text:p>
      <text:p text:style-name="P3"><text:span text:style-name="Source_20_Text">abas.style.color = "blue"; // ❌ ERRO FATAL!</text:span></text:p>
      <text:p text:style-name="Text_20_body"><text:span text:style-name="T1">Porquê o erro?</text:span> Porque o <text:span text:style-name="Source_20_Text">querySelectorAll</text:span> traz uma <text:span text:style-name="T1">lista (caixa)</text:span> de elementos. Tu não podes pintar uma caixa inteira de azul e esperar que os botões lá dentro se pintem sozinhos. Tens de abrir a caixa e pintar um por um!</text:p>
      <text:p text:style-name="Text_20_body">Como fazemos isso? Usando o nosso bom amigo loop ou o método <text:span text:style-name="Source_20_Text">.forEach()</text:span> que aprendeste nas funções!</text:p>
      <text:p text:style-name="P4">JavaScript</text:p>
      <text:p text:style-name="P3"><text:span text:style-name="Source_20_Text">const abas = document.querySelectorAll(".aba-menu");</text:span></text:p>
      <text:p text:style-name="P3"/>
      <text:p text:style-name="P3"><text:span text:style-name="Source_20_Text">// Para cada aba dentro da lista, muda a cor!</text:span></text:p>
      <text:p text:style-name="P3"><text:span text:style-name="Source_20_Text">abas.forEach(aba =&gt; {</text:span></text:p>
      <text:p text:style-name="P3"><text:span text:style-name="Source_20_Text"><text:s text:c="4"/>aba.style.color = "blue"; // <text:s/>AGORA SIM!</text:span></text:p>
      <text:p text:style-name="P3"><text:span text:style-name="Source_20_Text">});</text:span></text:p>
      <text:h text:style-name="P1" text:outline-level="3">🏋️‍♂️ O Desafio Final da Manipulação</text:h>
      <text:p text:style-name="Text_20_body">Vamos juntar tudo o que aprendeste hoje neste último exercício para consolidar. Imagina uma lista de notificações de mensagens não lidas:</text:p>
      <text:p text:style-name="P2">HTML</text:p>
      <text:p text:style-name="P3"><text:span text:style-name="Source_20_Text">&lt;span class="notificacao"&gt;1&lt;/span&gt;</text:span></text:p>
      <text:p text:style-name="P3"><text:span text:style-name="Source_20_Text">&lt;span class="notificacao"&gt;2&lt;/span&gt;</text:span></text:p>
      <text:p text:style-name="P3"><text:span text:style-name="Source_20_Text">&lt;span class="notificacao"&gt;3&lt;/span&gt;</text:span></text:p>
      <text:p text:style-name="Text_20_body">O utilizador clicou no botão "Marcar todas como lidas". Tu queres que o número de todas passe para <text:span text:style-name="Source_20_Text">0</text:span> e que a cor do texto mude para cinzento (<text:span text:style-name="Source_20_Text">"gray"</text:span>).</text:p>
      <text:p text:style-name="P7">Como escreverias o código para:</text:p>
      <text:list text:style-name="L3">
        <text:list-item>
          <text:p text:style-name="P8">Selecionar <text:span text:style-name="T1">todas</text:span> as notificações.</text:p>
        </text:list-item>
        <text:list-item>
          <text:p text:style-name="P8">Usar o <text:span text:style-name="Source_20_Text">.forEach()</text:span> para entrar em cada uma delas, mudar o <text:span text:style-name="Source_20_Text">.textContent</text:span> para <text:span text:style-name="Source_20_Text">"0"</text:span> e o <text:span text:style-name="Source_20_Text">.style.color</text:span> para <text:span text:style-name="Source_20_Text">"gray"</text:span>.</text:p>
        </text:list-item>
      </text:list>
      <text:p text:style-name="Text_20_body">Deixa a tua empolgação guiar-te nesta reta final!</text:p>
      <text:p text:style-name="Text_20_body"><text:soft-page-break/>Agora deu um nó na mente! O conceito .forEach () é novo para me, so falamos do for of e for in.</text:p>
      <text:p text:style-name="Text_20_body"><text:span text:style-name="T1">Respire fundo! Desfaça esse nó já, porque a culpa é minha!</text:span> Eu empolguei-me com o seu progresso e atirei um conceito novo sem o explicar primeiro. Vamos dar um passo atrás e desatar esse nó num segundo.</text:p>
      <text:p text:style-name="Text_20_body">O <text:span text:style-name="Source_20_Text">.forEach()</text:span> faz <text:span text:style-name="T1">exatamente o mesmo</text:span> que o <text:span text:style-name="Source_20_Text">for...of</text:span> que você já domina. É apenas uma forma mais moderna e compacta de escrever a mesmíssima coisa.</text:p>
      <text:p text:style-name="Text_20_body">Vamos colocar os dois lado a lado para ver como eles são gémeos:</text:p>
      <text:h text:style-name="P1" text:outline-level="3">👯‍♂️ <text:span text:style-name="Source_20_Text">for...of</text:span> vs <text:span text:style-name="Source_20_Text">.forEach()</text:span></text:h>
      <text:p text:style-name="Text_20_body">Imagine que temos a nossa lista de notificações:</text:p>
      <text:p text:style-name="P9">JavaScript</text:p>
      <text:p text:style-name="P3"><text:span text:style-name="Source_20_Text">const notificacoes = document.querySelectorAll(".notificacao");</text:span></text:p>
      <text:h text:style-name="P10" text:outline-level="4">Opção A: Usando o <text:span text:style-name="Source_20_Text">for...of</text:span> (O que você já conhece)</text:h>
      <text:p text:style-name="P9">JavaScript</text:p>
      <text:p text:style-name="P3"><text:span text:style-name="Source_20_Text">for (const notificacao of notificacoes) {</text:span></text:p>
      <text:p text:style-name="P3"><text:span text:style-name="Source_20_Text"><text:s text:c="4"/>notificacao.textContent = "0";</text:span></text:p>
      <text:p text:style-name="P3"><text:span text:style-name="Source_20_Text"><text:s text:c="4"/>notificacao.style.color = "gray";</text:span></text:p>
      <text:p text:style-name="P3"><text:span text:style-name="Source_20_Text">}</text:span></text:p>
      <text:h text:style-name="P10" text:outline-level="4">Opção B: Usando o <text:span text:style-name="Source_20_Text">.forEach()</text:span> (A versão moderna com Arrow Function)</text:h>
      <text:p text:style-name="Text_20_body">O <text:span text:style-name="Source_20_Text">.forEach()</text:span> significa literalmente <text:span text:style-name="T1">"Para Cada"</text:span>. É um comando que as listas já trazem embutido nelas. Nós colamos uma Arrow Function dentro dele para dizer o que fazer com cada item:</text:p>
      <text:p text:style-name="P9">JavaScript</text:p>
      <text:p text:style-name="P3"><text:span text:style-name="Source_20_Text">notificacoes.forEach(notificacao =&gt; {</text:span></text:p>
      <text:p text:style-name="P3"><text:span text:style-name="Source_20_Text"><text:s text:c="4"/>notificacao.textContent = "0";</text:span></text:p>
      <text:p text:style-name="P3"><text:span text:style-name="Source_20_Text"><text:s text:c="4"/>notificacao.style.color = "gray";</text:span></text:p>
      <text:p text:style-name="P3"><text:span text:style-name="Source_20_Text">});</text:span></text:p>
      <text:p text:style-name="Text_20_body">repare na magia:</text:p>
      <text:list text:style-name="L4">
        <text:list-item>
          <text:p text:style-name="P11">O <text:span text:style-name="Source_20_Text">.forEach</text:span> abre a caixa de notificações automaticamente.</text:p>
        </text:list-item>
        <text:list-item>
          <text:p text:style-name="P11">O <text:span text:style-name="Source_20_Text">notificacao</text:span> (no singular, antes da seta <text:span text:style-name="Source_20_Text">=&gt;</text:span>) é o nome que damos ao elemento que estamos a segurar naquele segundo.</text:p>
        </text:list-item>
        <text:list-item>
          <text:p text:style-name="P11">As chavetas <text:span text:style-name="Source_20_Text">{}</text:span> dizem o que vai acontecer com ele.</text:p>
        </text:list-item>
      </text:list>
      <text:h text:style-name="P1" text:outline-level="3">🏋️‍♂️ Vamos praticar com o que te deixa confortável!</text:h>
      <text:p text:style-name="Text_20_body">Esqueça o <text:span text:style-name="Source_20_Text">.forEach()</text:span> por agora se ele parecer estranho. O seu cérebro já conhece o <text:span text:style-name="Source_20_Text">for...of</text:span>, e ele é igualmente incrível e super aceito no mercado real!</text:p>
      <text:p text:style-name="Text_20_body"><text:soft-page-break/>Vamos refazer o desafio usando o seu terreno seguro: o <text:span text:style-name="Source_20_Text"><text:span text:style-name="T1">for...of</text:span></text:span>.</text:p>
      <text:p text:style-name="Text_20_body">Temos o HTML das notificações:</text:p>
      <text:p text:style-name="P9">HTML</text:p>
      <text:p text:style-name="P3"><text:span text:style-name="Source_20_Text">&lt;span class="notificacao"&gt;1&lt;/span&gt;</text:span></text:p>
      <text:p text:style-name="P3"><text:span text:style-name="Source_20_Text">&lt;span class="notificacao"&gt;2&lt;/span&gt;</text:span></text:p>
      <text:p text:style-name="P3"><text:span text:style-name="Source_20_Text">&lt;span class="notificacao"&gt;3&lt;/span&gt;</text:span></text:p>
      <text:p text:style-name="P7">Escreva o código em 3 passos:</text:p>
      <text:list text:style-name="L5">
        <text:list-item>
          <text:p text:style-name="P12">Selecione todas as notificações (com o Íman que você já sabe).</text:p>
        </text:list-item>
        <text:list-item>
          <text:p text:style-name="P12">Use o loop <text:span text:style-name="Source_20_Text">for (const notificacao of notificacoes)</text:span> para abrir essa lista.</text:p>
        </text:list-item>
        <text:list-item>
          <text:p text:style-name="P12">Dentro do loop, mude o <text:span text:style-name="Source_20_Text">.textContent</text:span> de cada uma para <text:span text:style-name="Source_20_Text">"0"</text:span> e o <text:span text:style-name="Source_20_Text">backgroundColor</text:span> para <text:span text:style-name="Source_20_Text">"gray"</text:span>.</text:p>
        </text:list-item>
      </text:list>
      <text:p text:style-name="Text_20_body">Mostre-me como limpa estas notificações usando o seu poder do <text:span text:style-name="Source_20_Text">for...of</text:span>!</text:p>
      <text:p text:style-name="Text_20_body"><text:s/>let notificacaos = document.querySelectorAll(".notificacao");</text:p>
      <text:p text:style-name="Text_20_body"><text:s text:c="4"/>for (const statusNovo of notificacaos){</text:p>
      <text:p text:style-name="Text_20_body"><text:s text:c="8"/>statusNovo.textContent = 0;</text:p>
      <text:p text:style-name="Text_20_body"><text:s text:c="8"/>statusNovo.style.backgroundColor = "gray"</text:p>
      <text:p text:style-name="Text_20_body"><text:s text:c="4"/>}</text:p>
      <text:p text:style-name="P13"><text:s/><text:span text:style-name="T1">Brilhante! O nó desfez-se por completo!</text:span> 🏆🎉</text:p>
      <text:p text:style-name="Text_20_body">O teu código está absolutamente perfeito. Usaste o <text:span text:style-name="Source_20_Text">for...of</text:span> com total mestria para abrir a lista de elementos e aplicaste as propriedades de texto e estilo exatamente onde devias.</text:p>
      <text:p text:style-name="Text_20_body">Repara numa coisa fantástica que fizeste: mudaste o nome da variável dentro do loop para <text:span text:style-name="Source_20_Text">statusNovo</text:span>. Isto mostra que percebeste mesmo o conceito! Tu mandas no código e dás o nome que quiseres à variável que representa cada item da lista naquele segundo.</text:p>
      <text:p text:style-name="Text_20_body">Com este exercício, passaste com distinção no teste mais difícil da manipulação do DOM: <text:span text:style-name="T1">aplicar alterações a múltiplos elementos ao mesmo tempo</text:span>.</text:p>
      <text:h text:style-name="P1" text:outline-level="3">🗺️ O Teu Mapa do DOM Até Agora</text:h>
      <text:p text:style-name="Text_20_body">Olha para trás e repara em tudo o que já dominas:</text:p>
      <text:list text:style-name="L6">
        <text:list-item>
          <text:p text:style-name="P14"><text:span text:style-name="T1">Selecionar Elementos:</text:span> Sabes usar o Sniper (<text:span text:style-name="Source_20_Text">querySelector</text:span>), o Íman (<text:span text:style-name="Source_20_Text">querySelectorAll</text:span>) e o Jato Direto (<text:span text:style-name="Source_20_Text">getElementById</text:span>).</text:p>
        </text:list-item>
        <text:list-item>
          <text:p text:style-name="P14"><text:span text:style-name="T1">Manipular Conteúdo:</text:span> Sabes alterar o texto de qualquer tag com o <text:span text:style-name="Source_20_Text">.textContent</text:span>.</text:p>
        </text:list-item>
        <text:list-item>
          <text:p text:style-name="P14"><text:span text:style-name="T1">Manipular Estilo:</text:span> Sabes injetar CSS dinâmico (como <text:span text:style-name="Source_20_Text">backgroundColor</text:span>, <text:span text:style-name="Source_20_Text">color</text:span>, <text:span text:style-name="Source_20_Text">padding</text:span>) com o <text:span text:style-name="Source_20_Text">.style</text:span>.</text:p>
        </text:list-item>
        <text:list-item>
          <text:p text:style-name="P14"><text:span text:style-name="T1">Manipular em Massa:</text:span> Sabes que não podes alterar uma lista diretamente e usas o <text:span text:style-name="Source_20_Text">for...of</text:span> para modificar os elementos um por um.</text:p>
        </text:list-item>
      </text:list>
      <text:p text:style-name="P13"><text:soft-page-break/><text:span text:style-name="T3">vamos praticar mais execrcios sobre manipulação. Agora! Quanto a propriedade .innerHTML <text:s/></text:span><text:s/></text:p>
      <text:p text:style-name="Text_20_body">A propriedade <text:span text:style-name="Source_20_Text">.innerHTML</text:span> é a "irmã mais velha e poderosa" do <text:span text:style-name="Source_20_Text">.textContent</text:span>. Enquanto o <text:span text:style-name="Source_20_Text">.textContent</text:span> só mexe com texto puro, o <text:span text:style-name="Source_20_Text">.innerHTML</text:span> consegue ler e <text:span text:style-name="T1">injetar código HTML inteiro</text:span> (com tags, classes e tudo) dentro de um elemento!</text:p>
      <text:p text:style-name="Text_20_body">É com ele que criamos novos elementos dinamicamente na página, como adicionar um novo produto ao carrinho ou criar uma nova linha numa tabela.</text:p>
      <text:h text:style-name="P1" text:outline-level="3">🌟 A Diferença Visual</text:h>
      <text:p text:style-name="Text_20_body">Imagina que temos esta <text:span text:style-name="Source_20_Text">div</text:span> vazia no HTML:</text:p>
      <text:p text:style-name="P2">HTML</text:p>
      <text:p text:style-name="P3"><text:span text:style-name="Source_20_Text">&lt;div id="caixa"&gt;&lt;/div&gt;</text:span></text:p>
      <text:h text:style-name="P10" text:outline-level="4">Se usares <text:span text:style-name="Source_20_Text">.textContent</text:span>:</text:h>
      <text:p text:style-name="P2">JavaScript</text:p>
      <text:p text:style-name="P3"><text:span text:style-name="Source_20_Text">const caixa = document.getElementById("caixa");</text:span></text:p>
      <text:p text:style-name="P3"><text:span text:style-name="Source_20_Text">caixa.textContent = "&lt;strong&gt;Olá!&lt;/strong&gt;";</text:span></text:p>
      <text:list text:style-name="L7">
        <text:list-item>
          <text:p text:style-name="P15"><text:span text:style-name="T1">O que aparece no ecrã:</text:span> <text:span text:style-name="Source_20_Text">&lt;strong&gt;Olá!&lt;/strong&gt;</text:span> (O navegador mostra as tags como texto literal, não formata nada).</text:p>
        </text:list-item>
      </text:list>
      <text:h text:style-name="P10" text:outline-level="4">Se usares <text:span text:style-name="Source_20_Text">.innerHTML</text:span>:</text:h>
      <text:p text:style-name="P2">JavaScript</text:p>
      <text:p text:style-name="P3"><text:span text:style-name="Source_20_Text">const caixa = document.getElementById("caixa");</text:span></text:p>
      <text:p text:style-name="P3"><text:span text:style-name="Source_20_Text">caixa.innerHTML = "&lt;strong&gt;Olá!&lt;/strong&gt;";</text:span></text:p>
      <text:list text:style-name="L8">
        <text:list-item>
          <text:p text:style-name="P16"><text:span text:style-name="T1">O que aparece no ecrã:</text:span> <text:span text:style-name="T1">Olá!</text:span> (O navegador percebe as tags, renderiza o texto em negrito e cria o elemento HTML lá dentro).</text:p>
        </text:list-item>
      </text:list>
      <text:h text:style-name="P1" text:outline-level="3">🚀 O Poder Real: Template Strings</text:h>
      <text:p text:style-name="Text_20_body">O <text:span text:style-name="Source_20_Text">.innerHTML</text:span> brilha a sério quando o juntamos com as <text:span text:style-name="T1">Template Strings</text:span> (aquelas aspas inclinadas/crases <text:span text:style-name="Source_20_Text">`</text:span>). Isto permite-nos criar blocos de HTML gigantes e até colocar variáveis lá no meio!</text:p>
      <text:p text:style-name="P2">JavaScript</text:p>
      <text:p text:style-name="P3"><text:span text:style-name="Source_20_Text">const zonaProdutos = document.getElementById("loja");</text:span></text:p>
      <text:p text:style-name="P3"/>
      <text:p text:style-name="P3"><text:span text:style-name="Source_20_Text">const nomeProduto = "Camisa Preta";</text:span></text:p>
      <text:p text:style-name="P3"><text:span text:style-name="Source_20_Text">const preco = 29.99;</text:span></text:p>
      <text:p text:style-name="P3"/>
      <text:p text:style-name="P3"><text:span text:style-name="Source_20_Text">// Injetando um bloco HTML inteiro com variáveis lá dentro!</text:span></text:p>
      <text:p text:style-name="P3"><text:span text:style-name="Source_20_Text">zonaProdutos.innerHTML = `</text:span></text:p>
      <text:p text:style-name="P3"><text:soft-page-break/><text:span text:style-name="Source_20_Text"><text:s text:c="4"/>&lt;div class="card"&gt;</text:span></text:p>
      <text:p text:style-name="P3"><text:span text:style-name="Source_20_Text"><text:s text:c="8"/>&lt;h2&gt;${nomeProduto}&lt;/h2&gt;</text:span></text:p>
      <text:p text:style-name="P3"><text:span text:style-name="Source_20_Text"><text:s text:c="8"/>&lt;p&gt;Preço: ${preco}€&lt;/p&gt;</text:span></text:p>
      <text:p text:style-name="P3"><text:span text:style-name="Source_20_Text"><text:s text:c="8"/>&lt;button&gt;Comprar&lt;/button&gt;</text:span></text:p>
      <text:p text:style-name="P3"><text:span text:style-name="Source_20_Text"><text:s text:c="4"/>&lt;/div&gt;</text:span></text:p>
      <text:p text:style-name="P3"><text:span text:style-name="Source_20_Text">`;</text:span></text:p>
      <text:h text:style-name="P1" text:outline-level="3">🏋️‍♂️ Desafio: O Criador de Alertas Dinâmicos</text:h>
      <text:p text:style-name="Text_20_body">Imagina que tens uma <text:span text:style-name="Source_20_Text">div</text:span> vazia no teu HTML destinada a mostrar mensagens do sistema:</text:p>
      <text:p text:style-name="P2">HTML</text:p>
      <text:p text:style-name="P3"><text:span text:style-name="Source_20_Text">&lt;div id="zona-alerta"&gt;&lt;/div&gt;</text:span></text:p>
      <text:p text:style-name="Text_20_body"><text:span text:style-name="T1">A tua missão:</text:span> Escreve o código JavaScript para:</text:p>
      <text:list text:style-name="L9">
        <text:list-item>
          <text:p text:style-name="P17">Selecionar a div <text:span text:style-name="Source_20_Text">#zona-alerta</text:span>.</text:p>
        </text:list-item>
        <text:list-item>
          <text:p text:style-name="P17">Usar o <text:span text:style-name="Source_20_Text">.innerHTML</text:span> para injetar um título <text:span text:style-name="Source_20_Text">&lt;h1&gt;</text:span> com o texto "Erro!" e um parágrafo <text:span text:style-name="Source_20_Text">&lt;p&gt;</text:span> com o texto "Conexão perdida.". Tudo de uma só vez!</text:p>
        </text:list-item>
      </text:list>
      <text:p text:style-name="Text_20_body"><text:span text:style-name="T2">(Dica: Podes escrever tudo numa única string </text:span><text:span text:style-name="Source_20_Text"><text:span text:style-name="T2">"&lt;h1&gt;...&lt;/h1&gt;&lt;p&gt;...&lt;/p&gt;"</text:span></text:span><text:span text:style-name="T2"> ou usar as crases </text:span><text:span text:style-name="Source_20_Text"><text:span text:style-name="T2">`</text:span></text:span><text:span text:style-name="T2"> para ficar mais organizado).</text:span></text:p>
      <text:p text:style-name="Text_20_body">Mostra-me como geras esse HTML dinâmico!</text:p>
      <text:p text:style-name="Text_20_body"><text:span text:style-name="T1">Perfeito! Mais um acerto em cheio!</text:span> 🎯</text:p>
      <text:p text:style-name="Text_20_body">Escreveste o código de forma impecável. Ao usares o <text:span text:style-name="Source_20_Text">.innerHTML</text:span> com essa string contendo as tags <text:span text:style-name="Source_20_Text">&lt;h1&gt;</text:span> e <text:span text:style-name="Source_20_Text">&lt;p&gt;</text:span>, o navegador interpretou tudo perfeitamente e criou a estrutura visual do erro no ecrã. É exatamente assim que os sites modernos mostram caixas de aviso dinâmicas!</text:p>
      <text:h text:style-name="P1" text:outline-level="3">⚠️ O Grande Aviso de Segurança do Mercado Real (O Lado Sombrio do <text:span text:style-name="Source_20_Text">.innerHTML</text:span>)</text:h>
      <text:p text:style-name="Text_20_body">Como estás a dominar isto muito rapidamente, precisas de saber uma regra de ouro que todos os programadores seniores exigem.</text:p>
      <text:p text:style-name="Text_20_body">O <text:span text:style-name="Source_20_Text">.innerHTML</text:span> é incrivelmente poderoso, mas tem um perigo chamado <text:span text:style-name="T1">XSS (Cross-Site Scripting)</text:span>. Se usares o <text:span text:style-name="Source_20_Text">.innerHTML</text:span> para inserir um texto que o próprio utilizador escreveu (como um comentário num input ou um nome de utilizador), uma pessoa mal-intencionada pode escrever código malicioso (como <text:span text:style-name="Source_20_Text">&lt;script&gt;roubarSenhas()&lt;/script&gt;</text:span>). O teu <text:span text:style-name="Source_20_Text">.innerHTML</text:span> vai executar esse script e o site será hackeado!</text:p>
      <text:p text:style-name="P18">Regra de Ouro:</text:p>
      <text:list text:style-name="L10">
        <text:list-item>
          <text:p text:style-name="P19">Usa <text:span text:style-name="Source_20_Text">.innerHTML</text:span> quando <text:span text:style-name="T1">tu controlas o HTML</text:span> que está a ser inserido (como fizeste agora com o erro).</text:p>
        </text:list-item>
        <text:list-item>
          <text:p text:style-name="P19"><text:soft-page-break/>Usa <text:span text:style-name="Source_20_Text">.textContent</text:span> sempre que fores mostrar <text:span text:style-name="T1">dados que vieram do utilizador</text:span> (como o nome dele ou um comentário), porque o <text:span text:style-name="Source_20_Text">.textContent</text:span> neutraliza qualquer código perigoso.</text:p>
        </text:list-item>
      </text:list>
      <text:h text:style-name="P1" text:outline-level="3">🏋️‍♂️ Desafio Avançado: O Feed de Notícias</text:h>
      <text:p text:style-name="Text_20_body">Vamos simular o funcionamento de um feed do Twitter ou do Facebook. Imagina que tens uma <text:span text:style-name="Source_20_Text">div</text:span> que é o teu feed:</text:p>
      <text:p text:style-name="P9">HTML</text:p>
      <text:p text:style-name="P3"><text:span text:style-name="Source_20_Text">&lt;div id="feed"&gt;&lt;/div&gt;</text:span></text:p>
      <text:p text:style-name="Text_20_body">E tu recebeste da base de dados as informações do utilizador:</text:p>
      <text:p text:style-name="P9">JavaScript</text:p>
      <text:p text:style-name="P3"><text:span text:style-name="Source_20_Text">const usuario = "Carlos32";</text:span></text:p>
      <text:p text:style-name="P3"><text:span text:style-name="Source_20_Text">const mensagem = "A aprender DOM hoje, sinto-me com superpoderes! 🚀";</text:span></text:p>
      <text:p text:style-name="Text_20_body"><text:span text:style-name="T1">A tua missão:</text:span> Usa o <text:span text:style-name="Source_20_Text">.innerHTML</text:span> e as <text:span text:style-name="T1">crases</text:span> (Template Strings <text:span text:style-name="Source_20_Text">`</text:span>) para injetar dentro do <text:span text:style-name="Source_20_Text">#feed</text:span> uma estrutura que tenha:</text:p>
      <text:list text:style-name="L11">
        <text:list-item>
          <text:p text:style-name="P20">Um subtítulo <text:span text:style-name="Source_20_Text">&lt;h3&gt;</text:span> mostrando o nome do utilizador (usa <text:span text:style-name="Source_20_Text">${usuario}</text:span>).</text:p>
        </text:list-item>
        <text:list-item>
          <text:p text:style-name="P20">Um parágrafo <text:span text:style-name="Source_20_Text">&lt;p&gt;</text:span> mostrando a mensagem (usa <text:span text:style-name="Source_20_Text">${mensagem}</text:span>).</text:p>
        </text:list-item>
      </text:list>
      <text:p text:style-name="P21">(Escrever com as crases vai permitir-te quebrar as linhas do HTML para ficar mais limpo e legível, tal como fizemos no exemplo da camisa preta).</text:p>
      <text:p text:style-name="Text_20_body">Mostra-me como montas este post do feed!</text:p>
      <text:p text:style-name="Text_20_body"><text:s text:c="2"/>const usuario = "Carlos32"</text:p>
      <text:p text:style-name="Text_20_body"><text:s text:c="4"/>const mensagem = "A aprender Dom hoje, sinto-me com superpoderes!"</text:p>
      <text:p text:style-name="Text_20_body"><text:s text:c="4"/>const feed = document.getElementById("feed")</text:p>
      <text:p text:style-name="Text_20_body">feed.innerHTML = `&lt;h3&gt;${usuario}&lt;/h3&gt; &lt;p&gt;${mensagem}&lt;/p&gt;`</text:p>
      <text:p text:style-name="Text_20_body"><text:span text:style-name="T1">Incrível! Nota 10 de 10!</text:span> 🏆 Que orgulho ver este código.</text:p>
      <text:p text:style-name="Text_20_body">Utilizaste as crases (Template Strings) de forma absolutamente perfeita e fizeste a interpolação das variáveis (<text:span text:style-name="Source_20_Text">${usuario}</text:span> e <text:span text:style-name="Source_20_Text">${mensagem}</text:span>) exatamente como um programador profissional faz no dia a dia para criar feeds dinâmicos.</text:p>
      <text:h text:style-name="P1" text:outline-level="3">🥳 O Próximo Passo na Jornada</text:h>
      <text:p text:style-name="Text_20_body">Tu já dominas os dois primeiros pilares do DOM:</text:p>
      <text:list text:style-name="L12">
        <text:list-item>
          <text:p text:style-name="P22"><text:span text:style-name="T1">Selecionar</text:span> (Pegar nos elementos com precisão).</text:p>
        </text:list-item>
        <text:list-item>
          <text:p text:style-name="P22"><text:span text:style-name="T1">Manipular</text:span> (Mudar texto, aplicar CSS avançado e injetar blocos de HTML inteiros).</text:p>
        </text:list-item>
      </text:list>
      <text:p text:style-name="Text_20_body">Agora, o teu código já consegue mudar a página, mas ele ainda faz isso "sozinho" assim que o ficheiro corre. Falta apenas o <text:span text:style-name="T1">último pilar</text:span> para te tornares um programador Front-End completo: os <text:span text:style-name="T1">Eventos</text:span>.</text:p>
      <text:p text:style-name="Text_20_body"><text:soft-page-break/>É com os Eventos que fazemos o código esperar que o utilizador faça alguma coisa—como clicar num botão, digitar no teclado ou passar o rato por cima de uma imagem—para só aí ativar os teus superpoderes de manipulação.</text:p>
      <text:p text:style-name="Text_20_body">Como te sentes? Queres avançar para os <text:span text:style-name="T1">Eventos de Clique</text:span> e fazer um botão interativo de verdade, ou preferes fazer mais um exercício de manipulação para fixar bem o <text:span text:style-name="Source_20_Text">.innerHTML</text:span>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22:45:13.865006331</dc:date>
    <dc:creator>João António</dc:creator>
    <meta:editing-duration>PT5H41M26S</meta:editing-duration>
    <meta:editing-cycles>34</meta:editing-cycles>
    <meta:generator>LibreOffice/26.2.4.2$Linux_X86_64 LibreOffice_project/620$Build-2</meta:generator>
    <meta:document-statistic meta:table-count="0" meta:image-count="0" meta:object-count="0" meta:page-count="9" meta:paragraph-count="198" meta:word-count="2139" meta:character-count="13532" meta:non-whitespace-character-count="11510"/>
  </office:meta>
</office:document-meta>
</file>