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Google Sans Text" svg:font-family="'Google Sans Text'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ela1" style:family="table">
      <style:table-properties style:width="17cm" table:align="left"/>
    </style:style>
    <style:style style:name="Tabela1.A" style:family="table-column">
      <style:table-column-properties style:column-width="4.228cm"/>
    </style:style>
    <style:style style:name="Tabela1.B" style:family="table-column">
      <style:table-column-properties style:column-width="5.812cm"/>
    </style:style>
    <style:style style:name="Tabela1.C" style:family="table-column">
      <style:table-column-properties style:column-width="6.96cm"/>
    </style:style>
    <style:style style:name="Tabela1.A1" style:family="table-cell">
      <style:table-cell-properties style:vertical-align="middle" fo:padding-left="0.318cm" fo:padding-right="0.318cm" fo:padding-top="0.212cm" fo:padding-bottom="0.212cm" fo:border="0.05pt solid #c4c7c5"/>
    </style:style>
    <style:style style:name="P1" style:family="paragraph" style:parent-style-name="Heading_20_3">
      <style:paragraph-properties fo:margin-top="0cm" fo:margin-bottom="0.247cm" style:contextual-spacing="false" fo:line-height="115%"/>
    </style:style>
    <style:style style:name="P2" style:family="paragraph" style:parent-style-name="Heading_20_4">
      <style:paragraph-properties fo:margin-top="0cm" fo:margin-bottom="0.247cm" style:contextual-spacing="false" fo:line-height="115%"/>
    </style:style>
    <style:style style:name="P3" style:family="paragraph" style:parent-style-name="Text_20_body">
      <style:text-properties officeooo:paragraph-rsid="0026b72f"/>
    </style:style>
    <style:style style:name="P4" style:family="paragraph" style:parent-style-name="Standard">
      <style:paragraph-properties fo:margin-top="0cm" fo:margin-bottom="0.499cm" style:contextual-spacing="false"/>
    </style:style>
    <style:style style:name="P5" style:family="paragraph" style:parent-style-name="Preformatted_20_Text">
      <style:paragraph-properties fo:margin-top="0cm" fo:margin-bottom="0.247cm" style:contextual-spacing="false" fo:line-height="115%"/>
    </style:style>
    <style:style style:name="P6" style:family="paragraph" style:parent-style-name="Standard">
      <style:paragraph-properties fo:margin-left="0cm" fo:margin-right="0cm" fo:margin-top="0cm" fo:margin-bottom="0.499cm" style:contextual-spacing="false" fo:text-indent="0cm" style:auto-text-indent="false"/>
    </style:style>
    <style:style style:name="P7" style:family="paragraph" style:parent-style-name="Text_20_body">
      <style:text-properties fo:font-weight="bold"/>
    </style:style>
    <style:style style:name="P8" style:family="paragraph" style:parent-style-name="Text_20_body" style:list-style-name="L1"/>
    <style:style style:name="P9" style:family="paragraph" style:parent-style-name="Quotations">
      <style:paragraph-properties fo:margin-top="0cm" fo:margin-bottom="0.247cm" style:contextual-spacing="false" fo:line-height="115%"/>
    </style:style>
    <style:style style:name="P10" style:family="paragraph" style:parent-style-name="Text_20_body" style:list-style-name="L2"/>
    <style:style style:name="P11" style:family="paragraph" style:parent-style-name="Text_20_body" style:list-style-name="L3"/>
    <style:style style:name="P12" style:family="paragraph" style:parent-style-name="Text_20_body">
      <style:text-properties officeooo:paragraph-rsid="0028b99a"/>
    </style:style>
    <style:style style:name="P13" style:family="paragraph" style:parent-style-name="Text_20_body" style:list-style-name="L4"/>
    <style:style style:name="P14" style:family="paragraph" style:parent-style-name="Text_20_body" style:list-style-name="L5"/>
    <style:style style:name="P15" style:family="paragraph" style:parent-style-name="Text_20_body" style:list-style-name="L6"/>
    <style:style style:name="P16" style:family="paragraph" style:parent-style-name="Text_20_body" style:list-style-name="L7"/>
    <style:style style:name="P17" style:family="paragraph" style:parent-style-name="Table_20_Contents">
      <style:paragraph-properties fo:margin-left="0cm" fo:margin-right="0cm" fo:margin-top="0cm" fo:margin-bottom="0cm" style:contextual-spacing="false" fo:line-height="114%" fo:text-indent="0cm" style:auto-text-indent="false"/>
    </style:style>
    <style:style style:name="P18" style:family="paragraph" style:parent-style-name="Table_20_Contents">
      <style:paragraph-properties fo:margin-left="0cm" fo:margin-right="0cm" fo:margin-top="0cm" fo:margin-bottom="0.247cm" style:contextual-spacing="false" fo:line-height="114%" fo:text-indent="0cm" style:auto-text-indent="false"/>
    </style:style>
    <style:style style:name="P19" style:family="paragraph" style:parent-style-name="Table_20_Contents">
      <style:paragraph-properties fo:margin-left="0cm" fo:margin-right="0cm" fo:margin-top="0cm" fo:margin-bottom="0.247cm" style:contextual-spacing="false" fo:line-height="114%" fo:text-indent="0cm" style:auto-text-indent="false"/>
      <style:text-properties style:font-name="Google Sans Text" fo:font-style="italic"/>
    </style:style>
    <style:style style:name="P20" style:family="paragraph" style:parent-style-name="Table_20_Contents">
      <style:paragraph-properties fo:margin-left="0cm" fo:margin-right="0cm" fo:margin-top="0cm" fo:margin-bottom="0.247cm" style:contextual-spacing="false" fo:line-height="114%" fo:text-indent="0cm" style:auto-text-indent="false"/>
      <style:text-properties style:font-name="Google Sans Text"/>
    </style:style>
    <style:style style:name="P21" style:family="paragraph" style:parent-style-name="Table_20_Contents">
      <style:paragraph-properties fo:margin-left="0cm" fo:margin-right="0cm" fo:margin-top="0cm" fo:margin-bottom="0.247cm" style:contextual-spacing="false" fo:line-height="114%" fo:text-indent="0cm" style:auto-text-indent="false"/>
      <style:text-properties style:font-name="Google Sans Text" fo:font-weight="bold"/>
    </style:style>
    <style:style style:name="P22" style:family="paragraph" style:parent-style-name="Text_20_body" style:list-style-name="L8"/>
    <style:style style:name="P23" style:family="paragraph" style:parent-style-name="Text_20_body">
      <style:paragraph-properties fo:margin-left="0cm" fo:margin-right="0cm" fo:text-indent="0cm" style:auto-text-indent="false"/>
    </style:style>
    <style:style style:name="P24" style:family="paragraph" style:parent-style-name="Text_20_body" style:list-style-name="L9"/>
    <style:style style:name="P25" style:family="paragraph" style:parent-style-name="Text_20_body" style:list-style-name="L10"/>
    <style:style style:name="P26" style:family="paragraph" style:parent-style-name="Text_20_body" style:list-style-name="L11"/>
    <style:style style:name="P27" style:family="paragraph" style:parent-style-name="Text_20_body" style:list-style-name="L12"/>
    <style:style style:name="P28" style:family="paragraph" style:parent-style-name="Text_20_body" style:list-style-name="L13"/>
    <style:style style:name="T1" style:family="text">
      <style:text-properties fo:font-weight="bold"/>
    </style:style>
    <style:style style:name="T2" style:family="text">
      <style:text-properties fo:font-style="italic"/>
    </style:style>
    <style:style style:name="T3" style:family="text">
      <style:text-properties style:font-name="Google Sans Text"/>
    </style:style>
    <style:style style:name="T4" style:family="text">
      <style:text-properties style:font-name="Google Sans Text" fo:font-weight="bol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Que excelente escolha! Entrar no <text:span text:style-name="T1">DOM (Document Object Model)</text:span> é o momento em que a programação ganha vida visual. É aqui que o JavaScript deixa de rodar apenas na consola e passa a controlar o site de verdade: mudar cores, fazer botões funcionar, ler o que o utilizador digitou e fazer elementos aparecerem ou desaparecerem.</text:p>
      <text:p text:style-name="Text_20_body">Para dominar o DOM, o primeiro passo absoluto é saber <text:span text:style-name="T1">Selecionar Elementos</text:span>. Pense nisto como o "mecanismo de mira" do JavaScript: antes de mudar um elemento na página, você precisa de apontar para ele e dizer: <text:span text:style-name="T2">"És tu que eu quero mudar!"</text:span></text:p>
      <text:h text:style-name="P1" text:outline-level="3">🌐 O que é o DOM na nossa mente?</text:h>
      <text:p text:style-name="Text_20_body">Quando o navegador carrega uma página HTML, ele transforma todas as tags (<text:span text:style-name="Source_20_Text">&lt;h1&gt;</text:span>, <text:span text:style-name="Source_20_Text">&lt;p&gt;</text:span>, <text:span text:style-name="Source_20_Text">&lt;button&gt;</text:span>) numa árvore de objetos. O JavaScript usa o objeto global <text:span text:style-name="Source_20_Text"><text:span text:style-name="T1">document</text:span></text:span> para entrar nessa árvore e mexer em tudo.</text:p>
      <text:h text:style-name="P1" text:outline-level="3">🎯 As 3 Formas Modernas de "Apontar a Mira" (Selecionar)</text:h>
      <text:p text:style-name="Text_20_body">Esqueça os comandos antigos que vê em tutoriais velhos (como <text:span text:style-name="Source_20_Text">getElementsByClassName</text:span>). Hoje em dia, no mercado real, usamos quase sempre estes três comandos baseados em seletores CSS:</text:p>
      <text:h text:style-name="P2" text:outline-level="4">1. <text:span text:style-name="Source_20_Text">document.querySelector()</text:span> — O Sniper (Seleciona apenas UM)</text:h>
      <text:p text:style-name="Text_20_body">Procura na página e traz o <text:span text:style-name="T1">primeiro</text:span> elemento que encontrar que combine com o seletor CSS que colocou entre parênteses.</text:p>
      <text:p text:style-name="P3">// Selecionar por Tag HTML</text:p>
      <text:p text:style-name="P3">const titulo = document.querySelector("h1");</text:p>
      <text:p text:style-name="P3">// Selecionar por Classe (usa o ponto .)</text:p>
      <text:p text:style-name="P3">const botaoSucesso = document.querySelector(".btn-enviar");</text:p>
      <text:p text:style-name="P3">// Selecionar por ID (usa o cardinal #)</text:p>
      <text:p text:style-name="P3"><text:s/>const campoNome = document.querySelector("#input-nome");</text:p>
      <text:h text:style-name="P2" text:outline-level="4">2. <text:span text:style-name="Source_20_Text">document.querySelectorAll()</text:span> — O Íman (Seleciona TODOS)</text:h>
      <text:p text:style-name="Text_20_body">Se tiver vários elementos com a mesma classe (por exemplo, uma lista de produtos) e quiser selecionar todos ao mesmo tempo, usa este. Ele devolve uma lista (uma <text:span text:style-name="T2">NodeList</text:span>, que funciona de forma muito parecida a um Array).</text:p>
      <text:p text:style-name="P4">JavaScript</text:p>
      <text:p text:style-name="P5"><text:span text:style-name="Source_20_Text">// Seleciona TODOS os elementos que têm a classe .produto</text:span></text:p>
      <text:p text:style-name="P5"><text:span text:style-name="Source_20_Text">const todosOsProdutos = document.querySelectorAll(".produto");</text:span></text:p>
      <text:h text:style-name="P2" text:outline-level="4">3. <text:span text:style-name="Source_20_Text">document.getElementById()</text:span> — O Jato Direto (Pelo ID exclusivo)</text:h>
      <text:p text:style-name="Text_20_body">Uma forma ultra rápida e muito comum de pegar num elemento específico se ele tiver um ID único no HTML. (Aqui não se usa o <text:span text:style-name="Source_20_Text">#</text:span>).</text:p>
      <text:p text:style-name="P4">JavaScript</text:p>
      <text:p text:style-name="P5"><text:soft-page-break/><text:span text:style-name="Source_20_Text">const bannerPrincipal = document.getElementById("banner-principal");</text:span></text:p>
      <text:h text:style-name="P1" text:outline-level="3">🏋️‍♂️ Exercício de Leitura e Mira do DOM</text:h>
      <text:p text:style-name="Text_20_body">Imagine que temos este pedaço de código <text:span text:style-name="T1">HTML</text:span> na nossa página Web:</text:p>
      <text:p text:style-name="P6">HTML</text:p>
      <text:p text:style-name="P5"><text:span text:style-name="Source_20_Text">&lt;h1 id="titulo-pagina"&gt;Bem-vindo à Loja&lt;/h1&gt;</text:span></text:p>
      <text:p text:style-name="P5"/>
      <text:p text:style-name="P5"><text:span text:style-name="Source_20_Text">&lt;button class="botao-comprar"&gt;Comprar Item 1&lt;/button&gt;</text:span></text:p>
      <text:p text:style-name="P5"><text:span text:style-name="Source_20_Text">&lt;button class="botao-comprar"&gt;Comprar Item 2&lt;/button&gt;</text:span></text:p>
      <text:p text:style-name="P5"><text:span text:style-name="Source_20_Text">&lt;button class="botao-comprar"&gt;Comprar Item 3&lt;/button&gt;</text:span></text:p>
      <text:p text:style-name="P5"/>
      <text:p text:style-name="P5"><text:span text:style-name="Source_20_Text">&lt;p class="rodape"&gt;Todos os direitos reservados.&lt;/p&gt;</text:span></text:p>
      <text:p text:style-name="P7">A tua missão de detetive do DOM:</text:p>
      <text:list text:style-name="L1">
        <text:list-item>
          <text:p text:style-name="P8">Se eu escrever <text:span text:style-name="Source_20_Text">const elemento = document.querySelector(".botao-comprar");</text:span>, o JavaScript vai selecionar <text:span text:style-name="T1">quantos e quais</text:span> botões?</text:p>
        </text:list-item>
        <text:list-item>
          <text:p text:style-name="P8">Que comando deves escrever para selecionar <text:span text:style-name="T1">todos</text:span> os três botões de compra ao mesmo tempo e guardá-los numa variável?</text:p>
        </text:list-item>
        <text:list-item>
          <text:p text:style-name="P8">Como escreverias o comando usando <text:span text:style-name="Source_20_Text">getElementById</text:span> para selecionar o <text:span text:style-name="Source_20_Text">&lt;h1&gt;</text:span> lá do topo?</text:p>
        </text:list-item>
      </text:list>
      <text:p text:style-name="Text_20_body">Como soa esta "mira" na tua cabeça?</text:p>
      <text:p text:style-name="Text_20_body">Vai selecionar todos os botões porque fazem parte de uma classe. </text:p>
      <text:p text:style-name="Text_20_body">const elemento = document.querySelectorAll(.botao-comprar). </text:p>
      <text:p text:style-name="Text_20_body">const elemento = getElementById(.botao-comprar).</text:p>
      <text:p text:style-name="Text_20_body"><text:span text:style-name="T1">Quase perfeito! A tua lógica está excelente, mas as rasteiras da sintaxe do DOM apanharam-te nos detalhes.</text:span> Não te preocupes, isto é o mais comum quando se começa no DOM, porque as regras mudam ligeiramente do CSS para o JavaScript.</text:p>
      <text:p text:style-name="Text_20_body">Vamos analisar as tuas respostas e corrigir esses micro-detalhes para te tornares um mestre da "mira" do DOM:</text:p>
      <text:h text:style-name="P1" text:outline-level="3">Análise da Resposta 1 (O Sniper):</text:h>
      <text:p text:style-name="P9"><text:span text:style-name="T1">A tua resposta:</text:span> Vai selecionar todos os botões porque fazem parte de uma classe.</text:p>
      <text:p text:style-name="Text_20_body"><text:span text:style-name="T1">A Rasteira:</text:span> Na verdade, o <text:span text:style-name="Source_20_Text">document.querySelector(".botao-comprar")</text:span> vai selecionar <text:span text:style-name="T1">apenas o PRIMEIRO botão</text:span> (o "Comprar Item 1").</text:p>
      <text:p text:style-name="Text_20_body"><text:span text:style-name="T1">A Regra:</text:span> Pensa no <text:span text:style-name="Source_20_Text">querySelector</text:span> como um sniper. Ele dispara, acerta no primeiro alvo que corresponde à classe e para a procura. Ele não se importa que existam outros alvos iguais mais à frente. Se queres todos, precisas de usar o "Íman".</text:p>
      <text:h text:style-name="P1" text:outline-level="3"><text:soft-page-break/>Análise da Resposta 2 (O Íman - O seletor CSS):</text:h>
      <text:p text:style-name="P9"><text:span text:style-name="T1">A tua resposta:</text:span> <text:span text:style-name="Source_20_Text">const elemento = document.querySelectorAll(.botao-comprar).</text:span></text:p>
      <text:p text:style-name="Text_20_body"><text:span text:style-name="T1">O Erro de Sintaxe:</text:span> Faltaram as <text:span text:style-name="T1">aspas</text:span> e o <text:span text:style-name="T1">ponto ( . )</text:span> dentro dos parênteses!</text:p>
      <text:p text:style-name="Text_20_body"><text:span text:style-name="T1">A Correção:</text:span> No DOM, os seletores CSS têm de ser strings (textos), por isso precisam de aspas. E como é uma classe, precisa do ponto. O comando correto seria:</text:p>
      <text:p text:style-name="P4">JavaScript</text:p>
      <text:p text:style-name="P5"><text:span text:style-name="Source_20_Text">const elemento = document.querySelectorAll(".botao-comprar"); // Com aspas e ponto!</text:span></text:p>
      <text:h text:style-name="P1" text:outline-level="3">Análise da Resposta 3 (O Jato Direto - O ID exclusivo):</text:h>
      <text:p text:style-name="P9"><text:span text:style-name="T1">A tua resposta:</text:span> <text:span text:style-name="Source_20_Text">const elemento = getElementById(.botao-comprar).</text:span></text:p>
      <text:p text:style-name="P7">Dois erros de Sintaxe aqui:</text:p>
      <text:list text:style-name="L2">
        <text:list-item>
          <text:p text:style-name="P10">Faltou o <text:span text:style-name="Source_20_Text"><text:span text:style-name="T1">document.</text:span></text:span> antes do comando. Lembra-te: no DOM, tudo começa no <text:span text:style-name="Source_20_Text">document</text:span>.</text:p>
        </text:list-item>
        <text:list-item>
          <text:p text:style-name="P10">O <text:span text:style-name="Source_20_Text">getElementById</text:span> é um comando especial que já sabe que estás à procura de um ID. Por isso, <text:span text:style-name="T1">NÃO podes usar o cardinal (#) nem o ponto (.)</text:span> aqui. Só pões o nome do ID direto.</text:p>
        </text:list-item>
      </text:list>
      <text:p text:style-name="Text_20_body"><text:span text:style-name="T1">A Correção:</text:span> Para selecionar o <text:span text:style-name="Source_20_Text">h1</text:span> que tinha o ID <text:span text:style-name="Source_20_Text">titulo-pagina</text:span>, o comando correto seria:</text:p>
      <text:p text:style-name="P4">JavaScript</text:p>
      <text:p text:style-name="P5"><text:span text:style-name="Source_20_Text">const elemento = document.getElementById("titulo-pagina"); // Sem # e sem document!</text:span></text:p>
      <text:h text:style-name="P1" text:outline-level="3">🏋️‍♂️ O Segundo Round da Mira do DOM (A Vingança)</text:h>
      <text:p text:style-name="Text_20_body">O melhor mestre é aquele que aprende com as rasteiras. Vamos usar o mesmo HTML para um novo teste. Desta vez, presta atenção máxima às aspas e se estás a usar o Sniper ou o Íman!</text:p>
      <text:p text:style-name="P4">HTML</text:p>
      <text:p text:style-name="P5"><text:span text:style-name="Source_20_Text">&lt;div class="card-produto"&gt;</text:span></text:p>
      <text:p text:style-name="P5"><text:span text:style-name="Source_20_Text"><text:s text:c="4"/>&lt;h2 id="nome-produto"&gt;Ténis Desportivos&lt;/h2&gt;</text:span></text:p>
      <text:p text:style-name="P5"><text:span text:style-name="Source_20_Text"><text:s text:c="4"/>&lt;p class="descricao"&gt;Ténis de corrida leves e confortáveis.&lt;/p&gt;</text:span></text:p>
      <text:p text:style-name="P5"><text:span text:style-name="Source_20_Text"><text:s text:c="4"/>&lt;button class="botao-adicionar"&gt;+&lt;/button&gt;</text:span></text:p>
      <text:p text:style-name="P5"><text:span text:style-name="Source_20_Text"><text:s text:c="4"/>&lt;button class="botao-remover"&gt;-&lt;/button&gt;</text:span></text:p>
      <text:p text:style-name="P5"><text:span text:style-name="Source_20_Text">&lt;/div&gt;</text:span></text:p>
      <text:p text:style-name="P7">A tua nova missão:</text:p>
      <text:list text:style-name="L3">
        <text:list-item>
          <text:p text:style-name="P11">Que comando escreves para selecionar <text:span text:style-name="T1">o elemento h2</text:span> usando o ID <text:span text:style-name="Source_20_Text">nome-produto</text:span>?</text:p>
        </text:list-item>
        <text:list-item>
          <text:p text:style-name="P11"><text:soft-page-break/>Que comando escreves para selecionar <text:span text:style-name="T1">apenas a descrição</text:span> do produto usando a classe? (Dica: é só uma descrição).</text:p>
        </text:list-item>
        <text:list-item>
          <text:p text:style-name="P11">Se quiseres selecionar <text:span text:style-name="T1">ambos os botões</text:span> de mais e menos ao mesmo tempo (talvez para mudar a cor deles), que comando e seletor usarias? (Repara que eles têm classes diferentes, mas ambos são botões).</text:p>
        </text:list-item>
      </text:list>
      <text:p text:style-name="P12">const elemento = document.getElementById("h2");</text:p>
      <text:p text:style-name="P12">const descricaoProduto = document.querySelector(".descrição");</text:p>
      <text:p text:style-name="Text_20_body">const botao = document.querySelectorAll("button");</text:p>
      <text:p text:style-name="Text_20_body">Apanhaste a mecânica visual da coisa muito mais rápido desta vez! As tuas três respostas demonstram que percebeste perfeitamente o conceito de quando usar o Sniper (<text:span text:style-name="Source_20_Text">querySelector</text:span>) e o Íman (<text:span text:style-name="Source_20_Text">querySelectorAll</text:span>).</text:p>
      <text:p text:style-name="Text_20_body">Mas o JavaScript é um "detetive picuínhas" com as palavras exatas. Vamos ver onde acertaste em cheio e afinar os pequenos pormenores:</text:p>
      <text:h text:style-name="P1" text:outline-level="3">🔍 O Teu Diagnóstico de Código</text:h>
      <text:h text:style-name="P2" text:outline-level="4">1. A Seleção do H2</text:h>
      <text:p text:style-name="P9"><text:span text:style-name="T1">O teu código:</text:span> <text:span text:style-name="Source_20_Text">const elemento = document.getElementById("h2");</text:span></text:p>
      <text:list text:style-name="L4">
        <text:list-item>
          <text:p text:style-name="P13"><text:span text:style-name="T1">O Veredicto:</text:span> Quase lá! O erro aqui foi colocares <text:span text:style-name="Source_20_Text">"h2"</text:span> dentro do <text:span text:style-name="Source_20_Text">getElementById</text:span>.</text:p>
        </text:list-item>
        <text:list-item>
          <text:p text:style-name="P13"><text:span text:style-name="T1">O Porquê:</text:span> O <text:span text:style-name="Source_20_Text">getElementById</text:span> procura pelo conteúdo que está escrito dentro do atributo <text:span text:style-name="Source_20_Text">id="..."</text:span> no HTML (que era <text:span text:style-name="Source_20_Text">"nome-produto"</text:span>). Se passares <text:span text:style-name="Source_20_Text">"h2"</text:span>, ele vai procurar por um ID chamado literalmente "h2" e não vai encontrar nada.</text:p>
        </text:list-item>
        <text:list-item>
          <text:p text:style-name="P13"><text:span text:style-name="T1">O Correto:</text:span> <text:span text:style-name="Source_20_Text">const elemento = document.getElementById("nome-produto");</text:span> <text:span text:style-name="T2">(Ou, se quisesses usar a tag h2, usarias </text:span><text:span text:style-name="Source_20_Text"><text:span text:style-name="T2">document.querySelector("h2")</text:span></text:span><text:span text:style-name="T2">).</text:span></text:p>
        </text:list-item>
      </text:list>
      <text:h text:style-name="P2" text:outline-level="4">2. A Seleção da Descrição</text:h>
      <text:p text:style-name="P9"><text:span text:style-name="T1">O teu código:</text:span> <text:span text:style-name="Source_20_Text">const descricaoProduto = document.querySelector(".descrição");</text:span></text:p>
      <text:list text:style-name="L5">
        <text:list-item>
          <text:p text:style-name="P14"><text:span text:style-name="T1">O Veredicto:</text:span> <text:span text:style-name="T1">Quase perfeito!</text:span> Só falhou por causa de uma rasteira da língua portuguesa.</text:p>
        </text:list-item>
        <text:list-item>
          <text:p text:style-name="P14"><text:span text:style-name="T1">O Porquê:</text:span> No HTML, a classe foi escrita sem o 'ç' e sem o 'ã' (<text:span text:style-name="Source_20_Text">class="descricao"</text:span>). Como o JavaScript é sensível a letras maiúsculas, minúsculas e acentos, tens de escrever exatamente igual ao que está no HTML.</text:p>
        </text:list-item>
        <text:list-item>
          <text:p text:style-name="P14"><text:span text:style-name="T1">O Correto:</text:span> <text:span text:style-name="Source_20_Text">const descricaoProduto = document.querySelector(".descricao");</text:span></text:p>
        </text:list-item>
      </text:list>
      <text:h text:style-name="P2" text:outline-level="4">3. A Seleção dos Botões</text:h>
      <text:p text:style-name="P9"><text:span text:style-name="T1">O teu código:</text:span> <text:span text:style-name="Source_20_Text">const botao = document.querySelectorAll("button");</text:span></text:p>
      <text:list text:style-name="L6">
        <text:list-item>
          <text:p text:style-name="P15"><text:span text:style-name="T1">O Veredicto:</text:span> <text:span text:style-name="T1">100% CORRETO! Incrível!</text:span> 🏆</text:p>
        </text:list-item>
        <text:list-item>
          <text:p text:style-name="P15"><text:soft-page-break/><text:span text:style-name="T1">O Porquê:</text:span> Usaste o <text:span text:style-name="Source_20_Text">querySelectorAll</text:span> (o íman) e apontaste para a tag <text:span text:style-name="Source_20_Text">"button"</text:span>. Como ambos os elementos são botões, o JavaScript foi buscar os dois ao mesmo tempo e guardou-os na tua variável. Excelente jogada!</text:p>
        </text:list-item>
      </text:list>
      <text:p text:style-name="Text_20_body">Antes de começarmos a manipular elemento vamos continuar praticar a seleção de elementos. Por que ainda continua um pouco abistrato na minha mente.</text:p>
      <text:p text:style-name="Text_20_body">Completamente compreensível! A seleção de elementos no DOM pode parecer muito abstrata no início porque estamos a tentar fazer uma ponte entre um ficheiro de texto (<text:span text:style-name="T1">HTML</text:span>) e comandos de programação (<text:span text:style-name="T1">JavaScript</text:span>) que não vemos a acontecer fisicamente.</text:p>
      <text:p text:style-name="Text_20_body">Para ancorar isto de vez na tua mente, vamos esquecer o código por um segundo e usar uma analogia do mundo real: <text:span text:style-name="T1">O Catálogo de uma Biblioteca</text:span>.</text:p>
      <text:h text:style-name="P1" text:outline-level="3">📚 A Analogia da Biblioteca</text:h>
      <text:p text:style-name="Text_20_body">Imagina que o teu documento HTML é uma biblioteca cheia de livros. O JavaScript é o bibliotecário.</text:p>
      <text:list text:style-name="L7">
        <text:list-item>
          <text:p text:style-name="P16">Quando usas <text:span text:style-name="Source_20_Text"><text:span text:style-name="T1">document</text:span></text:span>, estás a dizer ao bibliotecário para ir ao catálogo daquela biblioteca específica.</text:p>
        </text:list-item>
        <text:list-item>
          <text:p text:style-name="P16">O comando que escolhes a seguir (<text:span text:style-name="Source_20_Text">querySelector</text:span>, <text:span text:style-name="Source_20_Text">querySelectorAll</text:span> ou <text:span text:style-name="Source_20_Text">getElementById</text:span>) é o <text:span text:style-name="T1">método de busca</text:span> que vais usar.</text:p>
        </text:list-item>
        <text:list-item>
          <text:p text:style-name="P16">O que colocas dentro dos parênteses <text:span text:style-name="Source_20_Text">("...")</text:span> são os <text:span text:style-name="T1">critérios de busca</text:span> (as pistas).</text:p>
        </text:list-item>
      </text:list>
      <text:p text:style-name="Text_20_body"/>
      <table:table table:name="Tabela1" table:style-name="Tabela1">
        <table:table-column table:style-name="Tabela1.A"/>
        <table:table-column table:style-name="Tabela1.B"/>
        <table:table-column table:style-name="Tabela1.C"/>
        <table:table-header-rows>
          <table:table-row>
            <table:table-cell table:style-name="Tabela1.A1" office:value-type="string">
              <text:p text:style-name="P17"><text:span text:style-name="Strong_20_Emphasis"><text:span text:style-name="T3">Comando do JavaScript</text:span></text:span></text:p>
            </table:table-cell>
            <table:table-cell table:style-name="Tabela1.A1" office:value-type="string">
              <text:p text:style-name="P17"><text:span text:style-name="Strong_20_Emphasis"><text:span text:style-name="T3">O que significa na Biblioteca</text:span></text:span></text:p>
            </table:table-cell>
            <table:table-cell table:style-name="Tabela1.A1" office:value-type="string">
              <text:p text:style-name="P17"><text:span text:style-name="Strong_20_Emphasis"><text:span text:style-name="T3">O que o Bibliotecário traz</text:span></text:span></text:p>
            </table:table-cell>
          </table:table-row>
        </table:table-header-rows>
        <table:table-row>
          <table:table-cell table:style-name="Tabela1.A1" office:value-type="string">
            <text:p text:style-name="P18"><text:span text:style-name="Source_20_Text"><text:span text:style-name="T4">getElementById("X")</text:span></text:span></text:p>
          </table:table-cell>
          <table:table-cell table:style-name="Tabela1.A1" office:value-type="string">
            <text:p text:style-name="P19">"Traga-me o livro que tem o código de barras único X."</text:p>
          </table:table-cell>
          <table:table-cell table:style-name="Tabela1.A1" office:value-type="string">
            <text:p text:style-name="P20"><text:span text:style-name="T1">Apenas 1 livro específico.</text:span> (IDs são únicos, nunca há dois iguais).</text:p>
          </table:table-cell>
        </table:table-row>
        <table:table-row>
          <table:table-cell table:style-name="Tabela1.A1" office:value-type="string">
            <text:p text:style-name="P18"><text:span text:style-name="Source_20_Text"><text:span text:style-name="T4">querySelector(".X")</text:span></text:span></text:p>
          </table:table-cell>
          <table:table-cell table:style-name="Tabela1.A1" office:value-type="string">
            <text:p text:style-name="P19">"Vá à estante da categoria X e traga-me o primeiro livro que vir."</text:p>
          </table:table-cell>
          <table:table-cell table:style-name="Tabela1.A1" office:value-type="string">
            <text:p text:style-name="P20"><text:span text:style-name="T1">Apenas 1 livro.</text:span> O primeiro que ele encontrar, mesmo que haja mais na estante.</text:p>
          </table:table-cell>
        </table:table-row>
        <table:table-row>
          <table:table-cell table:style-name="Tabela1.A1" office:value-type="string">
            <text:p text:style-name="P18"><text:span text:style-name="Source_20_Text"><text:span text:style-name="T4">querySelectorAll(".X")</text:span></text:span></text:p>
          </table:table-cell>
          <table:table-cell table:style-name="Tabela1.A1" office:value-type="string">
            <text:p text:style-name="P19">"Vá à estante da categoria X e traga-me todos os livros que lá estiverem."</text:p>
          </table:table-cell>
          <table:table-cell table:style-name="Tabela1.A1" office:value-type="string">
            <text:p text:style-name="P21">Uma pilha de livros (Lista).</text:p>
          </table:table-cell>
        </table:table-row>
      </table:table>
      <text:p text:style-name="Text_20_body"/>
      <text:h text:style-name="P1" text:outline-level="3"><text:soft-page-break/>🗺️ O Mapa Visual da "Pista"</text:h>
      <text:p text:style-name="Text_20_body">O erro mais comum é confundir as pistas que damos ao <text:span text:style-name="Source_20_Text">querySelector</text:span>. O JavaScript precisa de saber que tipo de pista estás a dar:</text:p>
      <text:list text:style-name="L8">
        <text:list-item>
          <text:p text:style-name="P22">Se escreves <text:span text:style-name="Source_20_Text"><text:span text:style-name="T1">"button"</text:span></text:span> (sem nada antes): estás a dizer para procurar pela <text:span text:style-name="T1">Tag</text:span> pura (como procurar por todos os livros que são dicionários).</text:p>
        </text:list-item>
        <text:list-item>
          <text:p text:style-name="P22">Se escreves <text:span text:style-name="Source_20_Text"><text:span text:style-name="T1">".botao"</text:span></text:span> (com ponto): estás a avisar que aquilo é uma <text:span text:style-name="T1">Classe</text:span> (como procurar por livros com a etiqueta verde).</text:p>
        </text:list-item>
        <text:list-item>
          <text:p text:style-name="P22">Se escreves <text:span text:style-name="Source_20_Text"><text:span text:style-name="T1">"#botao"</text:span></text:span> (com cardinal): estás a avisar que aquilo é um <text:span text:style-name="T1">ID</text:span> (como procurar pelo código de barras).</text:p>
        </text:list-item>
      </text:list>
      <text:h text:style-name="P1" text:outline-level="3">🏋️‍♂️ Treino de Fixação: Sem Rasteiras, Só Conexão</text:h>
      <text:p text:style-name="Text_20_body">Vamos olhar para este armário de cozinha (HTML):</text:p>
      <text:p text:style-name="P23">HTML</text:p>
      <text:p text:style-name="P5"><text:span text:style-name="Source_20_Text">&lt;div id="armario-principal"&gt;</text:span></text:p>
      <text:p text:style-name="P5"><text:span text:style-name="Source_20_Text"><text:s text:c="4"/>&lt;span class="tempero"&gt;Sal&lt;/span&gt;</text:span></text:p>
      <text:p text:style-name="P5"><text:span text:style-name="Source_20_Text"><text:s text:c="4"/>&lt;span class="tempero"&gt;Pimenta&lt;/span&gt;</text:span></text:p>
      <text:p text:style-name="P5"><text:span text:style-name="Source_20_Text"><text:s text:c="4"/>&lt;span class="tempero"&gt;Alho&lt;/span&gt;</text:span></text:p>
      <text:p text:style-name="P5"><text:span text:style-name="Source_20_Text"><text:s text:c="4"/>&lt;button class="botao-abrir"&gt;Abrir&lt;/button&gt;</text:span></text:p>
      <text:p text:style-name="P5"><text:span text:style-name="Source_20_Text">&lt;/div&gt;</text:span></text:p>
      <text:p text:style-name="Text_20_body">Imagina que queres que o JavaScript vá buscar ingredientes ou objetos deste armário. Traduz para código estes pedidos como se fosses o chefe da cozinha:</text:p>
      <text:list text:style-name="L9">
        <text:list-item>
          <text:p text:style-name="P24"><text:span text:style-name="T1">Pedido:</text:span> <text:span text:style-name="T2">"Quero apenas o primeiro tempero que encontrares no armário (o Sal)."</text:span></text:p>
          <text:list>
            <text:list-item>
              <text:p text:style-name="P24">Que comando e que pista usas? <text:span text:style-name="Source_20_Text">document.querySelector(...)</text:span> ou <text:span text:style-name="Source_20_Text">document.querySelectorAll(...)</text:span>? E o que metes dentro dos parênteses?</text:p>
            </text:list-item>
          </text:list>
        </text:list-item>
        <text:list-item>
          <text:p text:style-name="P24"><text:span text:style-name="T1">Pedido:</text:span> <text:span text:style-name="T2">"Quero agarrar o armário inteiro de uma vez pelo seu código único."</text:span></text:p>
          <text:list>
            <text:list-item>
              <text:p text:style-name="P24">Se usares o <text:span text:style-name="Source_20_Text">document.getElementById(...)</text:span>, qual é a pista exata que pões lá dentro? (Lembra-te da regra do ID!).</text:p>
            </text:list-item>
          </text:list>
        </text:list-item>
        <text:list-item>
          <text:p text:style-name="P24"><text:span text:style-name="T1">Pedido:</text:span> <text:span text:style-name="T2">"Traga-me todos os temperos que existirem aí dentro."</text:span></text:p>
          <text:list>
            <text:list-item>
              <text:p text:style-name="P24">Como ficaria este comando completo?</text:p>
            </text:list-item>
          </text:list>
        </text:list-item>
      </text:list>
      <text:p text:style-name="Text_20_body">Diz-me como montarias estas buscas. Vamos focar só em olhar para o HTML e escolher a ferramenta certa!</text:p>
      <text:p text:style-name="Text_20_body">document.querySelector(".tempero")</text:p>
      <text:p text:style-name="Text_20_body">document.getElementById("armario-principal")</text:p>
      <text:p text:style-name="Text_20_body"><text:s/>document.querySelectorAll(".tempero")</text:p>
      <text:p text:style-name="Text_20_body"><text:span text:style-name="T1">UAU! Parabéns! Escreveste um código 100% PERFEITO!</text:span> 🎯🏆</text:p>
      <text:p text:style-name="Text_20_body"><text:soft-page-break/>Não houve uma única falha de sintaxe, nem um ponto esquecido, nem uma aspa fora do lugar. Tu dominaste completamente o conceito:</text:p>
      <text:list text:style-name="L10">
        <text:list-item>
          <text:p text:style-name="P25"><text:span text:style-name="Source_20_Text"><text:span text:style-name="T1">document.querySelector(".tempero")</text:span></text:span>: Certíssimo! O "Sniper" foi direto à classe <text:span text:style-name="Source_20_Text">.tempero</text:span> e trouxe apenas o primeiro (o Sal).</text:p>
        </text:list-item>
        <text:list-item>
          <text:p text:style-name="P25"><text:span text:style-name="Source_20_Text"><text:span text:style-name="T1">document.getElementById("armario-principal")</text:span></text:span>: Perfeito! Usaste o "Jato Direto", foste buscar o ID único e, muito bem, <text:span text:style-name="T1">não usaste o cardinal (#)</text:span> porque o <text:span text:style-name="Source_20_Text">getElementById</text:span> já sabe que é um ID.</text:p>
        </text:list-item>
        <text:list-item>
          <text:p text:style-name="P25"><text:span text:style-name="Source_20_Text"><text:span text:style-name="T1">document.querySelectorAll(".tempero")</text:span></text:span>: Impecável! O "Íman" ativou-se e trouxe a lista com os três temperos (Sal, Pimenta e Alho).</text:p>
        </text:list-item>
      </text:list>
      <text:h text:style-name="P1" text:outline-level="3">💡 O Clique Mental: O que o JavaScript realmente recebe?</text:h>
      <text:p text:style-name="Text_20_body">Para deixar de ser abstrato, imagina o que acontece por trás das cortinas do computador quando rodas estes comandos. O JavaScript cria uma variável e põe lá dentro um "vínculo vivo" com a página.</text:p>
      <text:list text:style-name="L11">
        <text:list-item>
          <text:p text:style-name="P26">Quando fazes <text:span text:style-name="Source_20_Text">const primeiro = document.querySelector(".tempero");</text:span>, a variável <text:span text:style-name="Source_20_Text">primeiro</text:span> passa a ser, literalmente, o elemento <text:span text:style-name="Source_20_Text">&lt;span class="tempero"&gt;Sal&lt;/span&gt;</text:span>. Tu podes "tocar-lhe" através do código.</text:p>
        </text:list-item>
        <text:list-item>
          <text:p text:style-name="P26">Quando fazes <text:span text:style-name="Source_20_Text">const todos = document.querySelectorAll(".tempero");</text:span>, a variável <text:span text:style-name="Source_20_Text">todos</text:span> passa a ser uma caixa (uma lista) que contém: <text:span text:style-name="Source_20_Text">[ &lt;span&gt;Sal&lt;/span&gt;, &lt;span&gt;Pimenta&lt;/span&gt;, &lt;span&gt;Alho&lt;/span&gt; ]</text:span>.</text:p>
        </text:list-item>
      </text:list>
      <text:h text:style-name="P1" text:outline-level="3">🏋️‍♂️ O Último Teste de Seleção (Para Fechar com Chave de Ouro)</text:h>
      <text:p text:style-name="Text_20_body">Para teres a certeza absoluta de que este tópico está totalmente dominado, vamos fazer um último exercício com uma estrutura muito comum em sites reais: uma lista de comentários de um blogue.</text:p>
      <text:p text:style-name="P6">HTML</text:p>
      <text:p text:style-name="P5"><text:span text:style-name="Source_20_Text">&lt;div class="caixa-comentarios"&gt;</text:span></text:p>
      <text:p text:style-name="P5"><text:span text:style-name="Source_20_Text"><text:s text:c="4"/>&lt;h3 id="titulo-comentarios"&gt;Comentários dos Leitores&lt;/h3&gt;</text:span></text:p>
      <text:p text:style-name="P5"><text:span text:style-name="Source_20_Text"><text:s text:c="4"/>&lt;p class="comentario"&gt;Amei este artigo! Muito bom.&lt;/p&gt;</text:span></text:p>
      <text:p text:style-name="P5"><text:span text:style-name="Source_20_Text"><text:s text:c="4"/>&lt;p class="comentario"&gt;Fiquei com uma dúvida no passo 2.&lt;/p&gt;</text:span></text:p>
      <text:p text:style-name="P5"><text:span text:style-name="Source_20_Text"><text:s text:c="4"/>&lt;p class="comentario"&gt;Excelente explicação, obrigado!&lt;/p&gt;</text:span></text:p>
      <text:p text:style-name="P5"><text:span text:style-name="Source_20_Text">&lt;/div&gt;</text:span></text:p>
      <text:p text:style-name="Text_20_body">Escreve os comandos para:</text:p>
      <text:list text:style-name="L12">
        <text:list-item>
          <text:p text:style-name="P27">Selecionar o título <text:span text:style-name="Source_20_Text">&lt;h3&gt;</text:span> através do seu <text:span text:style-name="T1">ID</text:span>.</text:p>
        </text:list-item>
        <text:list-item>
          <text:p text:style-name="P27">Selecionar <text:span text:style-name="T1">apenas o primeiro</text:span> comentário da lista através da sua <text:span text:style-name="T1">classe</text:span>.</text:p>
        </text:list-item>
        <text:list-item>
          <text:p text:style-name="P27">Selecionar <text:span text:style-name="T1">todos</text:span> os comentários da página de uma só vez.</text:p>
        </text:list-item>
      </text:list>
      <text:p text:style-name="Text_20_body">Mostra-me como fazes estas três seleções agora que a tua mira está calibrada!</text:p>
      <text:p text:style-name="Text_20_body"><text:s/>document.getElementById("titulo-comentarios")</text:p>
      <text:p text:style-name="Text_20_body"><text:soft-page-break/>document.querySelector(".comentario")</text:p>
      <text:p text:style-name="Text_20_body">document.querySelectorAll(".caixa-comentarios")</text:p>
      <text:p text:style-name="Text_20_body"><text:span text:style-name="T1">Espetacular! 2 em 3 acertos perfeitos!</text:span> A tua mira para os elementos individuais está completamente afiada.</text:p>
      <text:p text:style-name="Text_20_body">Vamos ver o teu resultado detalhado:</text:p>
      <text:list text:style-name="L13">
        <text:list-item>
          <text:p text:style-name="P28"><text:span text:style-name="Source_20_Text">document.getElementById("titulo-comentarios")</text:span> ➡️ <text:span text:style-name="T1">100% Correto!</text:span> Foste direto ao ID único do título.</text:p>
        </text:list-item>
        <text:list-item>
          <text:p text:style-name="P28"><text:span text:style-name="Source_20_Text">document.querySelector(".comentario")</text:span> ➡️ <text:span text:style-name="T1">100% Correto!</text:span> O sniper funcionou perfeitamente e apanhou apenas o primeiro comentário.</text:p>
        </text:list-item>
      </text:list>
      <text:h text:style-name="P1" text:outline-level="3">🔍 O Pequeno Deslize no Terceiro</text:h>
      <text:p text:style-name="Text_20_body">No terceiro comando, tu escreveste: <text:span text:style-name="Source_20_Text">document.querySelectorAll(".caixa-comentarios")</text:span></text:p>
      <text:p text:style-name="Text_20_body"><text:span text:style-name="T1">O que aconteceu aqui:</text:span> A tua sintaxe está correta, mas a pista que deste ao JavaScript foi a classe da <text:span text:style-name="T1">caixa cinzenta de fora</text:span> (o contentor), e não os comentários em si.</text:p>
      <text:p text:style-name="Text_20_body">Se o objetivo era selecionar <text:span text:style-name="T1">todos os três comentários</text:span>, a pista teria de ser a classe dos próprios comentários (<text:span text:style-name="Source_20_Text">.comentario</text:span>). O comando correto seria:</text:p>
      <text:p text:style-name="Text_20_body">Percebes a diferença? Ao usares <text:span text:style-name="Source_20_Text">.caixa-comentarios</text:span>, o JavaScript traria apenas a caixa grande exterior. Ao usares <text:span text:style-name="Source_20_Text">.comentario</text:span>, ele traz a lista com os três parágrafos de texto lá de dentro.</text:p>
      <text:h text:style-name="P1" text:outline-level="3">🥳 Já não é abstrato!</text:h>
      <text:p text:style-name="Text_20_body">Olha para isto: tu acabaste de dominar a parte que a maioria dos iniciantes acha mais difícil no DOM, que é saber exatamente quando usar o ponto, as aspas, o <text:span text:style-name="Source_20_Text">querySelector</text:span> ou o <text:span text:style-name="Source_20_Text">querySelectorAll</text:span>.</text:p>
      <text:p text:style-name="Text_20_body">Agora que a tua mira está calibrada e tu já sabes como "agarrar" qualquer elemento do HTML, sentes-se preparado para dar o próximo passo e ver como <text:span text:style-name="T1">alterar o texto ou a cor</text:span> desses elementos que selecionaste?</text:p>
      <text:p text:style-name="Text_20_body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Google Sans Text" svg:font-family="'Google Sans Text'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 Devanagari1" style:font-family-complex="'Noto Sans Devanagari'" style:font-family-generic-complex="system" style:font-pitch-complex="variable" style:font-size-complex="12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Left_20_Page" style:display-name="Left Page" style:page-layout-name="Mpm2" draw:style-name="Mdp1" style:next-style-name="Right_20_Page"/>
    <style:master-page style:name="Right_20_Page" style:display-name="Right Page" style:page-layout-name="Mpm3" draw:style-name="Mdp1" style:next-style-name="Left_20_Page"/>
    <style:master-page style:name="Envelope" style:page-layout-name="Mpm4" draw:style-name="Mdp1"/>
    <style:master-page style:name="Index" style:page-layout-name="Mpm1" draw:style-name="Mdp1"/>
    <style:master-page style:name="HTML" style:page-layout-name="Mpm5" draw:style-name="Mdp1"/>
    <style:master-page style:name="Footnote" style:page-layout-name="Mpm6" draw:style-name="Mdp1"/>
    <style:master-page style:name="Endnote" style:page-layout-name="Mpm6" draw:style-name="Mdp1"/>
    <style:master-page style:name="Landscape" style:page-layout-name="Mpm7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João António</meta:initial-creator>
    <meta:creation-date>2026-06-27T03:16:52.239945892</meta:creation-date>
    <dc:date>2026-06-27T20:38:00.699756066</dc:date>
    <dc:creator>João António</dc:creator>
    <meta:editing-duration>PT3H42M33S</meta:editing-duration>
    <meta:editing-cycles>25</meta:editing-cycles>
    <meta:generator>LibreOffice/26.2.4.2$Linux_X86_64 LibreOffice_project/620$Build-2</meta:generator>
    <meta:document-statistic meta:table-count="1" meta:image-count="0" meta:object-count="0" meta:page-count="8" meta:paragraph-count="175" meta:word-count="2204" meta:character-count="14426" meta:non-whitespace-character-count="12379"/>
  </office:meta>
</office:document-meta>
</file>