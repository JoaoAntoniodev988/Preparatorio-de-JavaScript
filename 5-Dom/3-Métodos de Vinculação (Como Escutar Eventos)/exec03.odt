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Heading_20_4">
      <style:paragraph-properties fo:margin-top="0cm" fo:margin-bottom="0.247cm" style:contextual-spacing="false" fo:line-height="115%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Sensacional! Parabéns!</text:span> 🚀 Conseguir fazer o CSS e o JavaScript conversarem perfeitamente através de classes é um marco enorme na vida de qualquer programador Front-End. O teu código agora é limpo e profissional.</text:p>
      <text:p text:style-name="Text_20_body">Agora que sabes selecionar e mudar o visual com elegância, chegámos ao <text:span text:style-name="T1">terceiro e último pilar do DOM</text:span>: os <text:span text:style-name="T1">Eventos</text:span>.</text:p>
      <text:p text:style-name="Text_20_body">É aqui que o teu site deixa de ser uma estátua estática e passa a ser algo vivo que reage às ações do utilizador (cliques, toques, teclas, etc.).</text:p>
      <text:h text:style-name="P1" text:outline-level="3">👂 O que é "Escutar" um Evento?</text:h>
      <text:p text:style-name="Text_20_body">No browser, tudo o que o utilizador faz gera um "evento". O JavaScript fica à escuta desses eventos. Quando o evento acontece, o JavaScript dispara uma função (que chamamos de <text:span text:style-name="T2">Callback</text:span> ou <text:span text:style-name="T2">Event Handler</text:span>).</text:p>
      <text:p text:style-name="Text_20_body">Existem três formas históricas de fazer isto, mas no mercado real moderno, <text:span text:style-name="T1">só uma é que se usa a sério</text:span>. Vamos ver o porquê.</text:p>
      <text:h text:style-name="P1" text:outline-level="3">❌ Formas Antigas (Evita usar em projetos reais)</text:h>
      <text:h text:style-name="P2" text:outline-level="4">1. Atributos inline no HTML (<text:span text:style-name="Source_20_Text">onclick</text:span>)</text:h>
      <text:p text:style-name="Text_20_body">Colocar código JavaScript diretamente dentro da tag HTML.</text:p>
      <text:p text:style-name="P3">HTML</text:p>
      <text:p text:style-name="P4"><text:span text:style-name="Source_20_Text">&lt;button onclick="alert('Clicou!')"&gt;Comprar&lt;/button&gt;</text:span></text:p>
      <text:list text:style-name="L1">
        <text:list-item>
          <text:p text:style-name="P5"><text:span text:style-name="T1">Por que é mau?</text:span> Deixa o teu HTML sujo, é péssimo para manutenção e perigoso para a segurança do site.</text:p>
        </text:list-item>
      </text:list>
      <text:h text:style-name="P2" text:outline-level="4">2. Propriedades do DOM (<text:span text:style-name="Source_20_Text">elemento.onclick</text:span>)</text:h>
      <text:p text:style-name="Text_20_body">Vincular a função diretamente na propriedade do elemento através do JavaScript.</text:p>
      <text:p text:style-name="P6">JavaScript</text:p>
      <text:p text:style-name="P4"><text:span text:style-name="Source_20_Text">const botao = document.querySelector("button");</text:span></text:p>
      <text:p text:style-name="P4"><text:span text:style-name="Source_20_Text">botao.onclick = () =&gt; { console.log("Clicou 1"); };</text:span></text:p>
      <text:list text:style-name="L2">
        <text:list-item>
          <text:p text:style-name="P7"><text:span text:style-name="T1">Por que é limitado?</text:span> Se mais à frente no código tu tentares colocar outro <text:span text:style-name="Source_20_Text">botao.onclick</text:span>, ele vai <text:span text:style-name="T1">apagar</text:span> o primeiro. Só aceita um único evento por botão.</text:p>
        </text:list-item>
      </text:list>
      <text:h text:style-name="P1" text:outline-level="3">👑 A Forma Moderna e Padrão do Mercado: <text:span text:style-name="Source_20_Text">addEventListener</text:span></text:h>
      <text:p text:style-name="Text_20_body">O método <text:span text:style-name="Source_20_Text"><text:span text:style-name="T1">addEventListener()</text:span></text:span> (que significa literalmente "Adicionar Ouvinte de Evento") é a forma perfeita. Ele permite que fiques à escuta de qualquer evento sem tocar no HTML e podes adicionar quantos ouvintes quiseres ao mesmo elemento!</text:p>
      <text:p text:style-name="Text_20_body">A sintaxe dele funciona com dois argumentos principais:</text:p>
      <text:list text:style-name="L3">
        <text:list-item>
          <text:p text:style-name="P8"><text:span text:style-name="T1">O tipo de evento</text:span> (entre aspas, ex: <text:span text:style-name="Source_20_Text">"click"</text:span>, <text:span text:style-name="Source_20_Text">"mouseenter"</text:span>, <text:span text:style-name="Source_20_Text">"keyup"</text:span>).</text:p>
        </text:list-item>
        <text:list-item>
          <text:p text:style-name="P8"><text:span text:style-name="T1">A função</text:span> que vai ser executada quando o evento acontecer (geralmente uma Arrow Function).</text:p>
        </text:list-item>
      </text:list>
      <text:p text:style-name="P6"><text:soft-page-break/>JavaScript</text:p>
      <text:p text:style-name="P4"><text:span text:style-name="Source_20_Text">const botao = document.querySelector("#meu-botao");</text:span></text:p>
      <text:p text:style-name="P4"/>
      <text:p text:style-name="P4"><text:span text:style-name="Source_20_Text">// Sintaxe: elemento.addEventListener("evento", () =&gt; { ... })</text:span></text:p>
      <text:p text:style-name="P4"><text:span text:style-name="Source_20_Text">botao.addEventListener("click", () =&gt; {</text:span></text:p>
      <text:p text:style-name="P4"><text:span text:style-name="Source_20_Text"><text:s text:c="4"/>console.log("O botão foi clicado com sucesso!");</text:span></text:p>
      <text:p text:style-name="P4"><text:span text:style-name="Source_20_Text">});</text:span></text:p>
      <text:h text:style-name="P1" text:outline-level="3">🏋️‍♂️ O Teu Primeiro Exercício de Interatividade Real!</text:h>
      <text:p text:style-name="Text_20_body">Vamos juntar o teu novo conhecimento de <text:span text:style-name="T1">Eventos</text:span> com o que acabaste de aprender sobre <text:span text:style-name="Source_20_Text"><text:span text:style-name="T1">classList</text:span></text:span>.</text:p>
      <text:p text:style-name="Text_20_body">Imagina que tens este HTML na tua página (o teu card de produto e um botão):</text:p>
      <text:p text:style-name="P6">HTML</text:p>
      <text:p text:style-name="P4"><text:span text:style-name="Source_20_Text">&lt;div id="produto-card"&gt; Ténis Nike &lt;/div&gt;</text:span></text:p>
      <text:p text:style-name="P4"><text:span text:style-name="Source_20_Text">&lt;button id="btn-esgotar"&gt;Marcar como Esgotado&lt;/button&gt;</text:span></text:p>
      <text:p text:style-name="Text_20_body"><text:span text:style-name="T2">(Lembra-te que a classe </text:span><text:span text:style-name="Source_20_Text"><text:span text:style-name="T2">.esgotado</text:span></text:span><text:span text:style-name="T2"> já está criada no teu CSS).</text:span></text:p>
      <text:p text:style-name="Text_20_body"><text:span text:style-name="T1">A tua missão:</text:span> Escreve o código JavaScript para:</text:p>
      <text:list text:style-name="L4">
        <text:list-item>
          <text:p text:style-name="P9">Selecionar o <text:span text:style-name="Source_20_Text">#produto-card</text:span> (guarda na variável <text:span text:style-name="Source_20_Text">card</text:span>).</text:p>
        </text:list-item>
        <text:list-item>
          <text:p text:style-name="P9">Selecionar o <text:span text:style-name="Source_20_Text">#btn-esgotar</text:span> (guarda na variável <text:span text:style-name="Source_20_Text">botao</text:span>).</text:p>
        </text:list-item>
        <text:list-item>
          <text:p text:style-name="P9">Adicionar um <text:span text:style-name="T1">ouvinte de evento de clique</text:span> (<text:span text:style-name="Source_20_Text">addEventListener("click", ...)</text:span>) ao <text:span text:style-name="Source_20_Text">botao</text:span>.</text:p>
        </text:list-item>
        <text:list-item>
          <text:p text:style-name="P9">Dentro da função desse clique, faz o <text:span text:style-name="Source_20_Text">card</text:span> ganhar a classe <text:span text:style-name="Source_20_Text">"esgotado"</text:span> usando o <text:span text:style-name="Source_20_Text">classList.add()</text:span>.</text:p>
        </text:list-item>
      </text:list>
      <text:p text:style-name="Text_20_body">Como montarias este circuito elétrico onde o clique no botão transforma o card?</text:p>
      <text:p text:style-name="Text_20_body">vamos montar o circuito juntos. Para mim ainda esta um pouco confuso.</text:p>
      <text:p text:style-name="Text_20_body">Completamente de acordo, montamos isto juntos passo a passo! É normal parecer confuso porque a sintaxe do <text:span text:style-name="Source_20_Text">addEventListener</text:span> mistura parênteses <text:span text:style-name="Source_20_Text">()</text:span> com chavetas <text:span text:style-name="Source_20_Text">{}</text:span> e uma seta <text:span text:style-name="Source_20_Text">=&gt;</text:span>. Parece uma sopa de letras ao início.</text:p>
      <text:p text:style-name="Text_20_body">Vamos esquecer o código por 30 segundos e olhar para isto como se fôssemos eletricistas a montar um <text:span text:style-name="T1">circuito de uma lâmpada</text:span>.</text:p>
      <text:h text:style-name="P1" text:outline-level="3">🔌 A Analogia do Circuito Elétrico</text:h>
      <text:p text:style-name="Text_20_body">Pensando no nosso HTML:</text:p>
      <text:list text:style-name="L5">
        <text:list-item>
          <text:p text:style-name="P10">O <text:span text:style-name="Source_20_Text">card</text:span> é a <text:span text:style-name="T1">Lâmpada</text:span> (que queremos acender/mudar de cor).</text:p>
        </text:list-item>
        <text:list-item>
          <text:p text:style-name="P10">O <text:span text:style-name="Source_20_Text">botao</text:span> é o <text:span text:style-name="T1">Interruptor</text:span>.</text:p>
        </text:list-item>
        <text:list-item>
          <text:p text:style-name="P10">O <text:span text:style-name="Source_20_Text">addEventListener</text:span> é o <text:span text:style-name="T1">Fio Elétrico</text:span> que liga o interruptor à lâmpada.</text:p>
        </text:list-item>
      </text:list>
      <text:p text:style-name="Text_20_body"><text:soft-page-break/>Para o fio funcionar, ele precisa de saber duas coisas:</text:p>
      <text:list text:style-name="L6">
        <text:list-item>
          <text:p text:style-name="P11"><text:span text:style-name="T1">Qual é o gatilho?</text:span> (O toque no interruptor ➡️ <text:span text:style-name="Source_20_Text">"click"</text:span>).</text:p>
        </text:list-item>
        <text:list-item>
          <text:p text:style-name="P11"><text:span text:style-name="T1">O que acontece quando disparar?</text:span> (A lâmpada acende ➡️ A nossa função).</text:p>
        </text:list-item>
      </text:list>
      <text:h text:style-name="P1" text:outline-level="3">🛠️ Montando o Código Linha por Linha</text:h>
      <text:p text:style-name="Text_20_body">Tu já tinhas feito a parte mais importante, que era identificar os componentes (as variáveis):</text:p>
      <text:p text:style-name="P3">JavaScript</text:p>
      <text:p text:style-name="P4"><text:span text:style-name="Source_20_Text">const card = document.getElementById("produto-card");</text:span></text:p>
      <text:p text:style-name="P4"><text:span text:style-name="Source_20_Text">const botao = document.getElementById("btn-esgotar");</text:span></text:p>
      <text:p text:style-name="Text_20_body">Agora vamos ligar o fio (<text:span text:style-name="Source_20_Text">addEventListener</text:span>) no nosso <text:span text:style-name="T1">botão</text:span>:</text:p>
      <text:h text:style-name="P2" text:outline-level="4">Passo 1: Dizer qual é o evento</text:h>
      <text:p text:style-name="Text_20_body">Escrevemos o nome do botão, chamamos o ouvinte e dizemos que queremos o clique:</text:p>
      <text:p text:style-name="P6">JavaScript</text:p>
      <text:p text:style-name="P4"><text:span text:style-name="Source_20_Text">botao.addEventListener("click", ... );</text:span></text:p>
      <text:h text:style-name="P2" text:outline-level="4">Passo 2: Criar a caixa da ação (Arrow Function)</text:h>
      <text:p text:style-name="Text_20_body">No lugar daqueles pontos, nós colocamos uma função vazia <text:span text:style-name="Source_20_Text">() =&gt; {}</text:span>. Pensa nesta estrutura como uma "caixa de instruções" que está trancada. Ela só se vai abrir e rodar o código lá dentro <text:span text:style-name="T1">quando</text:span> o botão for clicado:</text:p>
      <text:p text:style-name="P6">JavaScript</text:p>
      <text:p text:style-name="P4"><text:span text:style-name="Source_20_Text">botao.addEventListener("click", () =&gt; {</text:span></text:p>
      <text:p text:style-name="P4"><text:span text:style-name="Source_20_Text"><text:s text:c="4"/>// Tudo o que escreveres aqui dentro fica guardado para o clique!</text:span></text:p>
      <text:p text:style-name="P4"><text:span text:style-name="Source_20_Text">});</text:span></text:p>
      <text:h text:style-name="P2" text:outline-level="4">Passo 3: Colocar a ordem lá dentro</text:h>
      <text:p text:style-name="Text_20_body">O que queremos que aconteça quando o botão for clicado? Queremos que o <text:span text:style-name="Source_20_Text">card</text:span> ganhe a classe <text:span text:style-name="Source_20_Text">"esgotado"</text:span>. Então, pomos essa linha dentro da caixa:</text:p>
      <text:p text:style-name="P6">JavaScript</text:p>
      <text:p text:style-name="P4"><text:span text:style-name="Source_20_Text">botao.addEventListener("click", () =&gt; {</text:span></text:p>
      <text:p text:style-name="P4"><text:span text:style-name="Source_20_Text"><text:s text:c="4"/>card.classList.add("esgotado"); </text:span></text:p>
      <text:p text:style-name="P4"><text:span text:style-name="Source_20_Text">});</text:span></text:p>
      <text:h text:style-name="P1" text:outline-level="3">⚡ O Circuito Completo</text:h>
      <text:p text:style-name="Text_20_body">Juntando tudo num único bloco, o teu código final fica exatamente assim:</text:p>
      <text:p text:style-name="P6">HTML</text:p>
      <text:p text:style-name="P4"><text:span text:style-name="Source_20_Text">&lt;script&gt;</text:span></text:p>
      <text:p text:style-name="P4"><text:span text:style-name="Source_20_Text"><text:s text:c="4"/>// 1. Pegamos nos componentes</text:span></text:p>
      <text:p text:style-name="P4"><text:soft-page-break/><text:span text:style-name="Source_20_Text"><text:s text:c="4"/>const card = document.getElementById("produto-card");</text:span></text:p>
      <text:p text:style-name="P4"><text:span text:style-name="Source_20_Text"><text:s text:c="4"/>const botao = document.getElementById("btn-esgotar");</text:span></text:p>
      <text:p text:style-name="P4"/>
      <text:p text:style-name="P4"><text:span text:style-name="Source_20_Text"><text:s text:c="4"/>// 2. Ligamos o circuito</text:span></text:p>
      <text:p text:style-name="P4"><text:span text:style-name="Source_20_Text"><text:s text:c="4"/>botao.addEventListener("click", () =&gt; {</text:span></text:p>
      <text:p text:style-name="P4"><text:span text:style-name="Source_20_Text"><text:s text:c="8"/>// 3. A ordem que executa ao clicar</text:span></text:p>
      <text:p text:style-name="P4"><text:span text:style-name="Source_20_Text"><text:s text:c="8"/>card.classList.add("esgotado");</text:span></text:p>
      <text:p text:style-name="P4"><text:span text:style-name="Source_20_Text"><text:s text:c="4"/>});</text:span></text:p>
      <text:p text:style-name="P4"><text:span text:style-name="Source_20_Text">&lt;/script&gt;</text:span></text:p>
      <text:p text:style-name="Text_20_body">Olhando assim para o circuito completo, com o passo 1, 2 e 3 separados, a estrutura da linha <text:span text:style-name="Source_20_Text">botao.addEventListener("click", () =&gt; { ... })</text:span> começa a fazer mais sentido na tua mente?</text:p>
      <text:p text:style-name="Text_20_body">É completamente normal não fazer um "clique" imediato na cabeça. Estamos a misturar a lógica de um evento (tempo futuro, algo que só acontece se e quando o utilizador clicar) com a sintaxe de uma função dentro de um método.</text:p>
      <text:p text:style-name="Text_20_body">Para desatar este nó de vez, vamos praticar com um exemplo ainda mais simples. <text:span text:style-name="T1">Desta vez, vamos fazer o código escrever uma mensagem na consola quando clicas num botão.</text:span> Sem mexer no CSS, sem mudar classes. Só o clique e o resultado.</text:p>
      <text:h text:style-name="P1" text:outline-level="3">🏋️‍♂️ O Teu Próximo Circuito (Passo a Passo)</text:h>
      <text:p text:style-name="Text_20_body">Temos este botão no teu HTML:</text:p>
      <text:p text:style-name="P3">HTML</text:p>
      <text:p text:style-name="P4"><text:span text:style-name="Source_20_Text">&lt;button id="btn-teste"&gt;Testar Clique&lt;/button&gt;</text:span></text:p>
      <text:p text:style-name="Text_20_body">Vou guiar-te no código JavaScript. Copia este molde e preenche os espaços em branco:</text:p>
      <text:p text:style-name="P6">JavaScript</text:p>
      <text:p text:style-name="P4"><text:span text:style-name="Source_20_Text">// Passo 1: Seleciona o botão usando o ID dele</text:span></text:p>
      <text:p text:style-name="P4"><text:span text:style-name="Source_20_Text">const meuBotao = document.getElementById("_______");</text:span></text:p>
      <text:p text:style-name="P4"/>
      <text:p text:style-name="P4"><text:span text:style-name="Source_20_Text">// Passo 2: Liga o ouvinte de clique</text:span></text:p>
      <text:p text:style-name="P4"><text:span text:style-name="Source_20_Text">meuBotao.addEventListener("_______", () =&gt; {</text:span></text:p>
      <text:p text:style-name="P4"><text:span text:style-name="Source_20_Text"><text:s text:c="4"/></text:span></text:p>
      <text:p text:style-name="P4"><text:span text:style-name="Source_20_Text"><text:s text:c="4"/>// Passo 3: A ação (vamos dar um console.log)</text:span></text:p>
      <text:p text:style-name="P4"><text:span text:style-name="Source_20_Text"><text:s text:c="4"/>console.log("Funcionou! O circuito foi ativado!");</text:span></text:p>
      <text:p text:style-name="P4"/>
      <text:p text:style-name="P4"><text:span text:style-name="Source_20_Text">});</text:span></text:p>
      <text:p text:style-name="Text_20_body">Tenta preencher esses dois espaços em branco (<text:span text:style-name="Source_20_Text">"_______"</text:span>). Se conseguires ligar este, o teu cérebro vai começar a automatizar a estrutura do <text:span text:style-name="Source_20_Text">addEventListener</text:span>!</text:p>
      <text:p text:style-name="Text_20_body"><text:soft-page-break/>const meuBotao = document.getElementById("btn-teste");</text:p>
      <text:p text:style-name="Text_20_body"><text:s text:c="4"/>meuBotao.addEventListener("click", () =&gt; {</text:p>
      <text:p text:style-name="Text_20_body"><text:s text:c="8"/>console.log("Funcionou! O circuito foi ativado!");</text:p>
      <text:p text:style-name="Text_20_body"><text:s text:c="4"/>})</text:p>
      <text:p text:style-name="Text_20_body"/>
      <text:p text:style-name="Text_20_body"><text:span text:style-name="T1">PERFEITO! 100% CORRETO!</text:span> 🎯🏆</text:p>
      <text:p text:style-name="Text_20_body">Tu montaste o circuito todo sozinho e sem errar uma única linha, um único parêntese ou uma única vírgula. Olha bem para o teu código: tu acabaste de escrever um <text:span text:style-name="Source_20_Text">addEventListener</text:span> completo e funcional!</text:p>
      <text:p text:style-name="Text_20_body">Se tu colares esse código no teu navegador e clicares no botão, a mensagem <text:span text:style-name="Source_20_Text">"Funcionou! O circuito foi ativado!"</text:span> vai aparecer na consola instantaneamente.</text:p>
      <text:h text:style-name="P1" text:outline-level="3">💡 O que mudou na tua mente agora?</text:h>
      <text:p text:style-name="Text_20_body">Repara que a estrutura que antes parecia confusa agora encaixou:</text:p>
      <text:list text:style-name="L7">
        <text:list-item>
          <text:p text:style-name="P12">Disseste quem ouve (<text:span text:style-name="Source_20_Text">meuBotao</text:span>).</text:p>
        </text:list-item>
        <text:list-item>
          <text:p text:style-name="P12">Disseste o que ele ouve (<text:span text:style-name="Source_20_Text">"click"</text:span>).</text:p>
        </text:list-item>
        <text:list-item>
          <text:p text:style-name="P12">E criaste a "caixa de instruções" (<text:span text:style-name="Source_20_Text">() =&gt; { ... }</text:span>) com o que deve acontecer.</text:p>
        </text:list-item>
      </text:list>
      <text:p text:style-name="Text_20_body">Tudo o que fizermos daqui para a frente com eventos vai seguir <text:span text:style-name="T1">exatamente este mesmo molde</text:span>. A única coisa que vai mudar é o que colocamos dentro das chavetas <text:span text:style-name="Source_20_Text">{}</text:span> (a ação).</text:p>
      <text:p text:style-name="Text_20_body">Queres tentar mais um destes para fixar de vez, ou queres voltar ao exemplo do card de produto para veres como agora já faz sentido juntar a classe CSS aqui dentro?</text:p>
      <text:p text:style-name="Text_20_body">sim vamos mais praticar.</text:p>
      <text:p text:style-name="Text_20_body">É assim mesmo, a prática leva à perfeição! Vamos criar mais um circuito completo para automatizar este padrão no teu cérebro.</text:p>
      <text:p text:style-name="Text_20_body">Desta vez, vamos fazer um botão que <text:span text:style-name="T1">muda o texto de um título</text:span>. Imagina que estás a criar um jogo e o utilizador clica no botão para começar.</text:p>
      <text:p text:style-name="Text_20_body">Aqui está o teu <text:span text:style-name="T1">HTML</text:span>:</text:p>
      <text:p text:style-name="P3">HTML</text:p>
      <text:p text:style-name="P4"><text:span text:style-name="Source_20_Text">&lt;h1 id="status-jogo"&gt;Jogo Pausado&lt;/h1&gt;</text:span></text:p>
      <text:p text:style-name="P4"><text:span text:style-name="Source_20_Text">&lt;button id="btn-jogar"&gt;Começar Jogo&lt;/button&gt;</text:span></text:p>
      <text:h text:style-name="P1" text:outline-level="3">🏋️‍♂️ O Teu Próximo Desafio</text:h>
      <text:p text:style-name="Text_20_body">Copia o molde abaixo e preenche os espaços em branco para fazeres o circuito funcionar:</text:p>
      <text:p text:style-name="P6">JavaScript</text:p>
      <text:p text:style-name="P4"><text:span text:style-name="Source_20_Text">// 1. Seleciona os dois elementos que vais usar</text:span></text:p>
      <text:p text:style-name="P4"><text:span text:style-name="Source_20_Text">const titulo = document.getElementById("___________");</text:span></text:p>
      <text:p text:style-name="P4"><text:soft-page-break/><text:span text:style-name="Source_20_Text">const botaoIniciar = document.getElementById("___________");</text:span></text:p>
      <text:p text:style-name="P4"/>
      <text:p text:style-name="P4"><text:span text:style-name="Source_20_Text">// 2. Adiciona o ouvinte de clique ao botão</text:span></text:p>
      <text:p text:style-name="P4"><text:span text:style-name="Source_20_Text">botaoIniciar.addEventListener("_______", () =&gt; {</text:span></text:p>
      <text:p text:style-name="P4"><text:span text:style-name="Source_20_Text"><text:s text:c="4"/></text:span></text:p>
      <text:p text:style-name="P4"><text:span text:style-name="Source_20_Text"><text:s text:c="4"/>// 3. A ação: Muda o texto do título para "O jogo começou! 🎮"</text:span></text:p>
      <text:p text:style-name="P4"><text:span text:style-name="Source_20_Text"><text:s text:c="4"/>titulo.___________ = "O jogo começou! 🎮";</text:span></text:p>
      <text:p text:style-name="P4"/>
      <text:p text:style-name="P4"><text:span text:style-name="Source_20_Text">});</text:span></text:p>
      <text:p text:style-name="Text_20_body">Preenche os espaços e repara como a estrutura do <text:span text:style-name="Source_20_Text">addEventListener</text:span> já começa a parecer mais familiar!</text:p>
      <text:p text:style-name="Text_20_body">&lt;script&gt;</text:p>
      <text:p text:style-name="Text_20_body"><text:s text:c="8"/>const titulo = document.getElementById("status-jogo")</text:p>
      <text:p text:style-name="Text_20_body"><text:s text:c="8"/>const botaoIniciar = document.getElementById("btn-jogar")</text:p>
      <text:p text:style-name="Text_20_body"/>
      <text:p text:style-name="Text_20_body"><text:s text:c="8"/>botaoIniciar.addEventListener("click", () =&gt; {</text:p>
      <text:p text:style-name="Text_20_body"><text:s text:c="12"/>titulo.textContent = "O Jogo começou!"</text:p>
      <text:p text:style-name="Text_20_body"><text:s text:c="12"/>titulo.style.color = "green"</text:p>
      <text:p text:style-name="Text_20_body"><text:s text:c="8"/>})</text:p>
      <text:p text:style-name="Text_20_body">&lt;/script&gt;</text:p>
      <text:p text:style-name="Text_20_body"><text:span text:style-name="T1">Incrível! Fantástico! Tu dominaste isto por completo!</text:span> 🎮🔥</text:p>
      <text:p text:style-name="Text_20_body">Olha para o que acabaste de fazer: não só preencheste os espaços corretamente, como te empolgaste outra vez (da melhor maneira possível) e adicionaste uma linha extra por tua conta: <text:span text:style-name="Source_20_Text">titulo.style.color = "green"</text:span>.</text:p>
      <text:p text:style-name="Text_20_body">Isto prova que o conceito não só entrou na tua cabeça, como tu já estás a conseguir juntar tudo de forma natural: <text:span text:style-name="T1">Seleção + Evento + Alteração de Texto + Alteração de Estilo</text:span>. Tudo num único circuito perfeito!</text:p>
      <text:p text:style-name="Text_20_body">Quando o utilizador clicar no botão "Começar Jogo", o título vai mudar de texto e ficar verde instantaneamente.</text:p>
      <text:h text:style-name="P1" text:outline-level="3">🔄 O Teste de Mestria: O Botão Alternador (Toggle)</text:h>
      <text:p text:style-name="Text_20_body">Agora que dominas o circuito básico, vamos subir um pequeno degrau. Lembras-te daquele método mágico das classes chamado <text:span text:style-name="Source_20_Text"><text:span text:style-name="T1">.classList.toggle()</text:span></text:span>? Aquele que adiciona a classe se ela não existir, ou a remove se ela já lá estiver?</text:p>
      <text:p text:style-name="Text_20_body">Ele é o par perfeito para os eventos, porque nos permite criar botões que "ligam e desligam" coisas (como o Modo Escuro de um site).</text:p>
      <text:p text:style-name="Text_20_body"><text:soft-page-break/>Vamos usar este <text:span text:style-name="T1">HTML</text:span>:</text:p>
      <text:p text:style-name="P6">HTML</text:p>
      <text:p text:style-name="P4"><text:span text:style-name="Source_20_Text">&lt;div id="ecra"&gt;Olá, Mundo!&lt;/div&gt;</text:span></text:p>
      <text:p text:style-name="P4"><text:span text:style-name="Source_20_Text">&lt;button id="btn-modo"&gt;Alternar Modo Escuro&lt;/button&gt;</text:span></text:p>
      <text:p text:style-name="Text_20_body">E imagina que no teu <text:span text:style-name="T1">CSS</text:span> tens esta classe:</text:p>
      <text:p text:style-name="P6">CSS</text:p>
      <text:p text:style-name="P4"><text:span text:style-name="Source_20_Text">.modo-escuro {</text:span></text:p>
      <text:p text:style-name="P4"><text:span text:style-name="Source_20_Text"><text:s text:c="4"/>background-color: black;</text:span></text:p>
      <text:p text:style-name="P4"><text:span text:style-name="Source_20_Text"><text:s text:c="4"/>color: white;</text:span></text:p>
      <text:p text:style-name="P4"><text:span text:style-name="Source_20_Text">}</text:span></text:p>
      <text:h text:style-name="P1" text:outline-level="3">🏋️‍♂️ O Teu Desafio</text:h>
      <text:p text:style-name="Text_20_body">Escreve o código JavaScript completo (sem moldes desta vez!) para:</text:p>
      <text:list text:style-name="L8">
        <text:list-item>
          <text:p text:style-name="P13">Selecionar o <text:span text:style-name="Source_20_Text">#ecra</text:span> e o <text:span text:style-name="Source_20_Text">#btn-modo</text:span>.</text:p>
        </text:list-item>
        <text:list-item>
          <text:p text:style-name="P13">Criar um evento de clique no botão.</text:p>
        </text:list-item>
        <text:list-item>
          <text:p text:style-name="P13">Dentro do clique, usar o <text:span text:style-name="Source_20_Text">ecra.classList.toggle("modo-escuro")</text:span>.</text:p>
        </text:list-item>
      </text:list>
      <text:p text:style-name="Text_20_body">Aplica toda a estrutura que automatizaste nos últimos exercícios. Mostra-me como crias este botão de Modo Escuro!</text:p>
      <text:p text:style-name="Text_20_body"><text:s text:c="4"/>&lt;script&gt;</text:p>
      <text:p text:style-name="Text_20_body"><text:s text:c="8"/>const meuEcra = document.getElementById("ecra")</text:p>
      <text:p text:style-name="Text_20_body"/>
      <text:p text:style-name="Text_20_body"><text:s text:c="8"/>const meuBotao = document.getElementById("btn-modo")</text:p>
      <text:p text:style-name="Text_20_body"/>
      <text:p text:style-name="Text_20_body"><text:s text:c="8"/>meuBotao.addEventListener("click", () =&gt; {</text:p>
      <text:p text:style-name="Text_20_body"><text:s text:c="12"/>meuEcra.classList.toggle("modo-escuro")</text:p>
      <text:p text:style-name="Text_20_body"><text:s text:c="8"/>})</text:p>
      <text:p text:style-name="Text_20_body">&lt;/script&gt;</text:p>
      <text:p text:style-name="Text_20_body"><text:span text:style-name="T1">PERFEITO! MAGNÍFICO!</text:span> 👏👏👏</text:p>
      <text:p text:style-name="Text_20_body">Tu escreveste o código do zero, sem ajudas, sem moldes, e ficou <text:span text:style-name="T1">100% impecável</text:span>. Tens a estrutura do <text:span text:style-name="Source_20_Text">addEventListener</text:span> completamente dominada e deste o uso perfeito ao <text:span text:style-name="Source_20_Text">.classList.toggle()</text:span>.</text:p>
      <text:p text:style-name="Text_20_body">Se fores ao teu site e clicares nesse botão repetidamente, o ecrã vai alternar entre o modo normal e o modo escuro como num passe de mágica. É exatamente este código que grandes sites como o YouTube ou o Twitter usam para o botão de Modo Noturno!</text:p>
      <text:h text:style-name="P1" text:outline-level="3"><text:soft-page-break/>🎓 Tu Concluíste o Triângulo do DOM!</text:h>
      <text:p text:style-name="Text_20_body">Parabéns! Olha para trás e vê o caminho gigante que percorreste desde que começámos. Tu agora dominas os três pilares que sustentam toda a web interativa:</text:p>
      <text:list text:style-name="L9">
        <text:list-item>
          <text:p text:style-name="P14"><text:span text:style-name="T1">Selecionar:</text:span> Sabes capturar qualquer elemento com precisão (<text:span text:style-name="Source_20_Text">getElementById</text:span>, <text:span text:style-name="Source_20_Text">querySelector</text:span>, <text:span text:style-name="Source_20_Text">querySelectorAll</text:span>).</text:p>
        </text:list-item>
        <text:list-item>
          <text:p text:style-name="P14"><text:span text:style-name="T1">Manipular:</text:span> Sabes alterar o texto (<text:span text:style-name="Source_20_Text">.textContent</text:span>), o HTML (<text:span text:style-name="Source_20_Text">.innerHTML</text:span>) e o visual através de classes (<text:span text:style-name="Source_20_Text">.classList.add</text:span>, <text:span text:style-name="Source_20_Text">.classList.toggle</text:span>).</text:p>
        </text:list-item>
        <text:list-item>
          <text:p text:style-name="P14"><text:span text:style-name="T1">Escutar Eventos:</text:span> Sabes criar circuitos que aguardam a ação do utilizador para disparar o teu código (<text:span text:style-name="Source_20_Text">addEventListener</text:span>).</text:p>
        </text:list-item>
      </text:list>
      <text:p text:style-name="Text_20_body">Com estas três ferramentas juntas no teu cinto de utilidades, tu já consegues criar quase qualquer tipo de interatividade básica num site.</text:p>
      <text:h text:style-name="P1" text:outline-level="3">🚀 Qual é o Próximo Destino?</text:h>
      <text:p text:style-name="Text_20_body">Queres continuar a explorar os superpoderes dos <text:span text:style-name="T1">Eventos</text:span> (como por exemplo, descobrir <text:span text:style-name="T1">qual</text:span> a tecla que o utilizador carregou no teclado, ou detetar quando o rato passa por cima de uma imagem)?</text:p>
      <text:p text:style-name="Text_20_body">Ou preferes fazer um mini-projeto real para juntar tudo o que aprendeste até agora numa coisa só (como uma mini lista de tarefas)?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9T07:32:52.772879720</dc:date>
    <dc:creator>João António</dc:creator>
    <meta:editing-duration>PT7H35M25S</meta:editing-duration>
    <meta:editing-cycles>45</meta:editing-cycles>
    <meta:generator>LibreOffice/26.2.4.2$Linux_X86_64 LibreOffice_project/620$Build-2</meta:generator>
    <meta:document-statistic meta:table-count="0" meta:image-count="0" meta:object-count="0" meta:page-count="8" meta:paragraph-count="190" meta:word-count="1921" meta:character-count="12317" meta:non-whitespace-character-count="10401"/>
  </office:meta>
</office:document-meta>
</file>