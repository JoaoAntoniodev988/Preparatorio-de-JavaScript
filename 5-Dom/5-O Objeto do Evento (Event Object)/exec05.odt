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Quotations">
      <style:paragraph-properties fo:margin-top="0cm" fo:margin-bottom="0.247cm" style:contextual-spacing="false" fo:line-height="115%"/>
    </style:style>
    <style:style style:name="P6" style:family="paragraph" style:parent-style-name="Quotations" style:list-style-name="L2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Excelente escolha!</text:span> Entrar a fundo no <text:span text:style-name="T1">Objeto do Evento</text:span> é como ganhar acesso à caixa-preta do navegador.</text:p>
      <text:p text:style-name="Text_20_body">Tu já usaste a letra <text:span text:style-name="Source_20_Text">e</text:span> no exercício anterior para travar a bolha com o <text:span text:style-name="Source_20_Text">e.stopPropagation()</text:span>. Mas o que é que está, na verdade, dentro desse <text:span text:style-name="Source_20_Text">e</text:span>?</text:p>
      <text:p text:style-name="Text_20_body">O Objeto do Evento (que costumamos chamar de <text:span text:style-name="Source_20_Text">e</text:span> ou <text:span text:style-name="Source_20_Text">event</text:span>) é um objeto gigante que o JavaScript cria automaticamente <text:span text:style-name="T1">no exato milissegundo</text:span> em que um evento acontece. Ele guarda todos os segredos sobre o que acabou de ocorrer na página!</text:p>
      <text:h text:style-name="P1" text:outline-level="3">🕵️‍♂️ As Propriedades Mais Usadas no Mercado</text:h>
      <text:p text:style-name="Text_20_body">Dentro desse objeto <text:span text:style-name="Source_20_Text">e</text:span>, existem dezenas de informações úteis. As três que vais usar em quase todos os teus projetos são:</text:p>
      <text:list text:style-name="L1">
        <text:list-item>
          <text:p text:style-name="P2"><text:span text:style-name="Source_20_Text"><text:span text:style-name="T1">e.target</text:span></text:span>: Diz-te <text:span text:style-name="T1">exatamente qual foi o elemento</text:span> que recebeu o clique (ou a ação). É como o JavaScript a apontar o dedo para o culpado.</text:p>
        </text:list-item>
        <text:list-item>
          <text:p text:style-name="P2"><text:span text:style-name="Source_20_Text"><text:span text:style-name="T1">e.key</text:span></text:span>: Usado em eventos de teclado. Diz-te <text:span text:style-name="T1">qual foi a tecla exacta</text:span> que o utilizador carregou (ex: <text:span text:style-name="Source_20_Text">"Enter"</text:span>, <text:span text:style-name="Source_20_Text">"ArrowUp"</text:span>, <text:span text:style-name="Source_20_Text">"a"</text:span>).</text:p>
        </text:list-item>
        <text:list-item>
          <text:p text:style-name="P2"><text:span text:style-name="Source_20_Text"><text:span text:style-name="T1">e.clientX</text:span></text:span><text:span text:style-name="T1"> e </text:span><text:span text:style-name="Source_20_Text"><text:span text:style-name="T1">e.clientY</text:span></text:span>: Dizem-te as <text:span text:style-name="T1">coordenadas exatas do rato</text:span> (em píxeis) no ecrã no momento do clique.</text:p>
        </text:list-item>
      </text:list>
      <text:h text:style-name="P1" text:outline-level="3">🎮 Prática 1: Descobrir o Elemento Clicado (<text:span text:style-name="Source_20_Text">e.target</text:span>)</text:h>
      <text:p text:style-name="Text_20_body">Imagina que tens três botões de cores diferentes, mas queres usar <text:span text:style-name="T1">apenas um</text:span> <text:span text:style-name="Source_20_Text">addEventListener</text:span> para descobrir qual deles foi clicado.</text:p>
      <text:p text:style-name="P3">HTML</text:p>
      <text:p text:style-name="P4"><text:span text:style-name="Source_20_Text">&lt;button class="btn-cor"&gt;Azul&lt;/button&gt;</text:span></text:p>
      <text:p text:style-name="P4"><text:span text:style-name="Source_20_Text">&lt;button class="btn-cor"&gt;Verde&lt;/button&gt;</text:span></text:p>
      <text:p text:style-name="P4"><text:span text:style-name="Source_20_Text">&lt;button class="btn-cor"&gt;Vermelho&lt;/button&gt;</text:span></text:p>
      <text:p text:style-name="Text_20_body">Se nós usarmos o <text:span text:style-name="Source_20_Text">e.target</text:span>, conseguimos descobrir o texto do botão que foi clicado:</text:p>
      <text:p text:style-name="P3">JavaScript</text:p>
      <text:p text:style-name="P4"><text:span text:style-name="Source_20_Text">// Capturamos todos os botões com a mesma classe</text:span></text:p>
      <text:p text:style-name="P4"><text:span text:style-name="Source_20_Text">const botoes = document.querySelectorAll(".btn-cor");</text:span></text:p>
      <text:p text:style-name="P4"/>
      <text:p text:style-name="P4"><text:span text:style-name="Source_20_Text">botoes.forEach(botao =&gt; {</text:span></text:p>
      <text:p text:style-name="P4"><text:span text:style-name="Source_20_Text"><text:s text:c="4"/>botao.addEventListener("click", (e) =&gt; {</text:span></text:p>
      <text:p text:style-name="P4"><text:span text:style-name="Source_20_Text"><text:s text:c="8"/>// e.target é o botão específico que o utilizador clicou!</text:span></text:p>
      <text:p text:style-name="P4"><text:span text:style-name="Source_20_Text"><text:s text:c="8"/>console.log("Tu clicaste no botão: " + e.target.textContent);</text:span></text:p>
      <text:p text:style-name="P4"><text:span text:style-name="Source_20_Text"><text:s text:c="4"/>});</text:span></text:p>
      <text:p text:style-name="P4"><text:span text:style-name="Source_20_Text">});</text:span></text:p>
      <text:h text:style-name="P1" text:outline-level="3"><text:soft-page-break/>🏋️‍♂️ O Teu Desafio: Capturar o Teclado! (<text:span text:style-name="Source_20_Text">e.key</text:span>)</text:h>
      <text:p text:style-name="Text_20_body">Vamos fazer um circuito onde o teu JavaScript vai "escutar" o que o utilizador digita num campo de texto (input).</text:p>
      <text:p text:style-name="Text_20_body">Aqui está o teu <text:span text:style-name="T1">HTML</text:span>:</text:p>
      <text:p text:style-name="P3">HTML</text:p>
      <text:p text:style-name="P4"><text:span text:style-name="Source_20_Text">&lt;input type="text" id="campo-texto" placeholder="Digita algo e prime Enter..."&gt;</text:span></text:p>
      <text:p text:style-name="Text_20_body"><text:span text:style-name="T1">A tua missão:</text:span> Preenche o código abaixo para fazer o JavaScript detetar quando o utilizador prime a tecla <text:span text:style-name="T1">"Enter"</text:span>:</text:p>
      <text:p text:style-name="P3">JavaScript</text:p>
      <text:p text:style-name="P4"><text:span text:style-name="Source_20_Text">const input = document.getElementById("campo-texto");</text:span></text:p>
      <text:p text:style-name="P4"/>
      <text:p text:style-name="P4"><text:span text:style-name="Source_20_Text">// O evento "keyup" dispara sempre que o utilizador solta uma tecla</text:span></text:p>
      <text:p text:style-name="P4"><text:span text:style-name="Source_20_Text">input.addEventListener("keyup", (e) =&gt; {</text:span></text:p>
      <text:p text:style-name="P4"><text:span text:style-name="Source_20_Text"><text:s text:c="4"/></text:span></text:p>
      <text:p text:style-name="P4"><text:span text:style-name="Source_20_Text"><text:s text:c="4"/>// Desafio: Usa o objeto do evento (e) para verificar se a tecla é "Enter"</text:span></text:p>
      <text:p text:style-name="P4"><text:span text:style-name="Source_20_Text"><text:s text:c="4"/>if (e._______ === "Enter") {</text:span></text:p>
      <text:p text:style-name="P4"><text:span text:style-name="Source_20_Text"><text:s text:c="8"/>console.log("Submetido! Tu escreveste: " + e.target._______);</text:span></text:p>
      <text:p text:style-name="P4"><text:span text:style-name="Source_20_Text"><text:s text:c="4"/>}</text:span></text:p>
      <text:p text:style-name="P4"><text:span text:style-name="Source_20_Text"><text:s text:c="4"/></text:span></text:p>
      <text:p text:style-name="P4"><text:span text:style-name="Source_20_Text">});</text:span></text:p>
      <text:p text:style-name="P5"><text:span text:style-name="T1">Dica de mestre:</text:span> &gt; * No primeiro espaço, tu queres saber a <text:span text:style-name="T1">tecla</text:span>.</text:p>
      <text:list text:style-name="L2">
        <text:list-item>
          <text:p text:style-name="P6">No segundo espaço, dentro do <text:span text:style-name="Source_20_Text">e.target</text:span> (que é o próprio input), tu queres pegar no <text:span text:style-name="T1">valor</text:span> (texto) escrito lá dentro. Em inputs, não usamos <text:span text:style-name="Source_20_Text">textContent</text:span>, usamos <text:span text:style-name="Source_20_Text">.value</text:span>.</text:p>
        </text:list-item>
      </text:list>
      <text:p text:style-name="Text_20_body">Consegues decifrar este mistério e capturar a tecla Enter?</text:p>
      <text:p text:style-name="Text_20_body"/>
      <text:p text:style-name="Text_20_body"><text:s text:c="4"/>&lt;script&gt;</text:p>
      <text:p text:style-name="Text_20_body"><text:s text:c="8"/>const input = document.getElementById("campo-texto");</text:p>
      <text:p text:style-name="Text_20_body"><text:s text:c="8"/>input.addEventListener("keyup", (e) =&gt; {</text:p>
      <text:p text:style-name="Text_20_body"><text:s text:c="12"/>if (e.input === "Enter") {</text:p>
      <text:p text:style-name="Text_20_body"><text:s text:c="16"/>console.log("Submetido! Tu escreveste: " + e.target.input)</text:p>
      <text:p text:style-name="Text_20_body"><text:s text:c="12"/>}</text:p>
      <text:p text:style-name="Text_20_body"><text:s text:c="8"/>})</text:p>
      <text:p text:style-name="Text_20_body">&lt;/script&gt;</text:p>
      <text:p text:style-name="Text_20_body"><text:soft-page-break/></text:p>
      <text:p text:style-name="Text_20_body">Fizeste uma excelente tentativa, mas caíste numa rasteira muito comum! Estás a usar a palavra <text:span text:style-name="Source_20_Text">input</text:span> no sítio onde deviam estar as propriedades nativas do JavaScript para ler o evento e o elemento.</text:p>
      <text:p text:style-name="Text_20_body">Vamos corrigir isso de forma muito simples para o teu circuito funcionar perfeitamente:</text:p>
      <text:h text:style-name="P1" text:outline-level="3">🔍 O que precisa de ser mudado:</text:h>
      <text:list text:style-name="L3">
        <text:list-item>
          <text:p text:style-name="P7"><text:span text:style-name="T1">Para detetar a tecla:</text:span> O JavaScript não sabe o que é <text:span text:style-name="Source_20_Text">e.input</text:span>. A propriedade correta para ler qual foi a tecla pressionada chama-se <text:span text:style-name="Source_20_Text"><text:span text:style-name="T1">.key</text:span></text:span>.</text:p>
        </text:list-item>
        <text:list-item>
          <text:p text:style-name="P7"><text:span text:style-name="T1">Para ler o texto do campo:</text:span> O <text:span text:style-name="Source_20_Text">e.target</text:span> representa o próprio campo de texto (<text:span text:style-name="Source_20_Text">&lt;input&gt;</text:span>). Para apanhar o texto que o utilizador escreveu lá dentro, o mercado usa a propriedade <text:span text:style-name="Source_20_Text"><text:span text:style-name="T1">.value</text:span></text:span>.</text:p>
        </text:list-item>
      </text:list>
      <text:h text:style-name="P1" text:outline-level="3">🛠️ O Teu Código Corrigido</text:h>
      <text:p text:style-name="Text_20_body">Substitui o teu <text:span text:style-name="Source_20_Text">&lt;script&gt;</text:span> por este aqui:</text:p>
      <text:p text:style-name="P3">HTML</text:p>
      <text:p text:style-name="P4"><text:span text:style-name="Source_20_Text">&lt;script&gt;</text:span></text:p>
      <text:p text:style-name="P4"><text:span text:style-name="Source_20_Text"><text:s text:c="4"/>const input = document.getElementById("campo-texto");</text:span></text:p>
      <text:p text:style-name="P4"/>
      <text:p text:style-name="P4"><text:span text:style-name="Source_20_Text"><text:s text:c="4"/>input.addEventListener("keyup", (e) =&gt; {</text:span></text:p>
      <text:p text:style-name="P4"><text:span text:style-name="Source_20_Text"><text:s text:c="8"/>// 1. Mudámos para e.key para detetar o Enter</text:span></text:p>
      <text:p text:style-name="P4"><text:span text:style-name="Source_20_Text"><text:s text:c="8"/>if (e.key === "Enter") {</text:span></text:p>
      <text:p text:style-name="P4"><text:span text:style-name="Source_20_Text"><text:s text:c="12"/>// 2. Mudámos para e.target.value para apanhar o texto digitado</text:span></text:p>
      <text:p text:style-name="P4"><text:span text:style-name="Source_20_Text"><text:s text:c="12"/>console.log("Submetido! Tu escreveste: " + e.target.value);</text:span></text:p>
      <text:p text:style-name="P4"><text:span text:style-name="Source_20_Text"><text:s text:c="8"/>}</text:span></text:p>
      <text:p text:style-name="P4"><text:span text:style-name="Source_20_Text"><text:s text:c="4"/>});</text:span></text:p>
      <text:p text:style-name="P4"><text:span text:style-name="Source_20_Text">&lt;/script&gt;</text:span></text:p>
      <text:h text:style-name="P1" text:outline-level="3">🧪 Faz o teste no teu navegador!</text:h>
      <text:list text:style-name="L4">
        <text:list-item>
          <text:p text:style-name="P8">Digita qualquer palavra dentro do campo de texto.</text:p>
        </text:list-item>
        <text:list-item>
          <text:p text:style-name="P8">Prime a tecla <text:span text:style-name="T1">Enter</text:span> no teu teclado.</text:p>
        </text:list-item>
        <text:list-item>
          <text:p text:style-name="P8">Abre a consola do navegador... a tua frase vai aparecer lá como magia! 🎉</text:p>
        </text:list-item>
      </text:list>
      <text:p text:style-name="Text_20_body">Consegues notar a diferença agora entre capturar a tecla com o <text:span text:style-name="Source_20_Text">.key</text:span> e o texto com o <text:span text:style-name="Source_20_Text">.value</text:span>?</text:p>
      <text:p text:style-name="Text_20_body">sim. Vamos praticar mais.</text:p>
      <text:p text:style-name="Text_20_body">É assim mesmo! A prática constante é o segredo para estas propriedades nativas (<text:span text:style-name="Source_20_Text">.key</text:span>, <text:span text:style-name="Source_20_Text">.target</text:span>, <text:span text:style-name="Source_20_Text">.value</text:span>) entrarem no teu "piloto automático".</text:p>
      <text:p text:style-name="Text_20_body"><text:soft-page-break/>Vamos fazer um exercício que junta o <text:span text:style-name="Source_20_Text">e.target</text:span> com algo muito comum no desenvolvimento web: <text:span text:style-name="T1">mudar o estilo do elemento que foi clicado</text:span>, mas usando o próprio objeto do evento para saber quem ele é.</text:p>
      <text:p text:style-name="Text_20_body">Imagina que estás a criar um menu ou uma lista de botões de categorias (ex: "Moda", "Tecnologia", "Desporto"). Quando o utilizador clica num botão, queres que <text:span text:style-name="T1">esse botão específico</text:span> mude de cor para mostrar que está selecionado.</text:p>
      <text:p text:style-name="Text_20_body">Aqui está o teu <text:span text:style-name="T1">HTML</text:span>:</text:p>
      <text:p text:style-name="P3">HTML</text:p>
      <text:p text:style-name="P4"><text:span text:style-name="Source_20_Text">&lt;div id="categorias"&gt;</text:span></text:p>
      <text:p text:style-name="P4"><text:span text:style-name="Source_20_Text"><text:s text:c="4"/>&lt;button class="btn-categoria"&gt;Moda&lt;/button&gt;</text:span></text:p>
      <text:p text:style-name="P4"><text:span text:style-name="Source_20_Text"><text:s text:c="4"/>&lt;button class="btn-categoria"&gt;Tecnologia&lt;/button&gt;</text:span></text:p>
      <text:p text:style-name="P4"><text:span text:style-name="Source_20_Text"><text:s text:c="4"/>&lt;button class="btn-categoria"&gt;Desporto&lt;/button&gt;</text:span></text:p>
      <text:p text:style-name="P4"><text:span text:style-name="Source_20_Text">&lt;/div&gt;</text:span></text:p>
      <text:h text:style-name="P1" text:outline-level="3">🏋️‍♂️ O Teu Próximo Desafio</text:h>
      <text:p text:style-name="Text_20_body">Copia o molde abaixo e preenche os espaços em branco. O objetivo é fazer com que o botão clicado fique com o fundo azul (<text:span text:style-name="Source_20_Text">"blue"</text:span>) e o texto branco (<text:span text:style-name="Source_20_Text">"white"</text:span>).</text:p>
      <text:p text:style-name="P3">JavaScript</text:p>
      <text:p text:style-name="P4"><text:span text:style-name="Source_20_Text">// Selecionamos todos os botões de categoria</text:span></text:p>
      <text:p text:style-name="P4"><text:span text:style-name="Source_20_Text">const botoes = document.querySelectorAll(".btn-categoria");</text:span></text:p>
      <text:p text:style-name="P4"/>
      <text:p text:style-name="P4"><text:span text:style-name="Source_20_Text">// Usamos o forEach para aplicar o circuito a cada um dos botões</text:span></text:p>
      <text:p text:style-name="P4"><text:span text:style-name="Source_20_Text">botoes.forEach(botao =&gt; {</text:span></text:p>
      <text:p text:style-name="P4"><text:span text:style-name="Source_20_Text"><text:s text:c="4"/></text:span></text:p>
      <text:p text:style-name="P4"><text:span text:style-name="Source_20_Text"><text:s text:c="4"/>botao.addEventListener("click", (e) =&gt; {</text:span></text:p>
      <text:p text:style-name="P4"><text:span text:style-name="Source_20_Text"><text:s text:c="8"/></text:span></text:p>
      <text:p text:style-name="P4"><text:span text:style-name="Source_20_Text"><text:s text:c="8"/>// Desafio: Usa o e.target para pintar APENAS o botão que foi clicado!</text:span></text:p>
      <text:p text:style-name="P4"><text:span text:style-name="Source_20_Text"><text:s text:c="8"/>e._______.style.backgroundColor = "blue";</text:span></text:p>
      <text:p text:style-name="P4"><text:span text:style-name="Source_20_Text"><text:s text:c="8"/>e._______.style.color = "white";</text:span></text:p>
      <text:p text:style-name="P4"><text:span text:style-name="Source_20_Text"><text:s text:c="8"/></text:span></text:p>
      <text:p text:style-name="P4"><text:span text:style-name="Source_20_Text"><text:s text:c="8"/>console.log("Categoria selecionada: " + e._______.textContent);</text:span></text:p>
      <text:p text:style-name="P4"><text:span text:style-name="Source_20_Text"><text:s text:c="8"/></text:span></text:p>
      <text:p text:style-name="P4"><text:span text:style-name="Source_20_Text"><text:s text:c="4"/>});</text:span></text:p>
      <text:p text:style-name="P4"><text:span text:style-name="Source_20_Text"><text:s text:c="4"/></text:span></text:p>
      <text:p text:style-name="P4"><text:span text:style-name="Source_20_Text">});</text:span></text:p>
      <text:p text:style-name="P5"><text:span text:style-name="T1">Dica de ouro:</text:span> O espaço em branco é o mesmo nas três linhas. É a propriedade que aponta o dedo para o elemento exato que sofreu o clique!</text:p>
      <text:p text:style-name="Text_20_body"><text:soft-page-break/>Mostra-me como usas a caixa-preta do evento para controlar o botão clicado!</text:p>
      <text:p text:style-name="Text_20_body">&lt;script&gt;</text:p>
      <text:p text:style-name="Text_20_body"><text:s text:c="4"/>const botoes = document.querySelectorAll(".btn-categoria")</text:p>
      <text:p text:style-name="Text_20_body"><text:s text:c="4"/>for(const botao of botoes) {</text:p>
      <text:p text:style-name="Text_20_body"><text:s text:c="8"/>botao.addEventListener("click", (e) =&gt; {</text:p>
      <text:p text:style-name="Text_20_body"><text:s text:c="12"/>e.target.style.bacgroundColor = "blue"</text:p>
      <text:p text:style-name="Text_20_body"><text:s text:c="12"/>e.target.style.color = "white";</text:p>
      <text:p text:style-name="Text_20_body"/>
      <text:p text:style-name="Text_20_body"><text:s text:c="12"/>console.log("Categoria selecionada: " + e.target.textContent);</text:p>
      <text:p text:style-name="Text_20_body"><text:s text:c="8"/>})</text:p>
      <text:p text:style-name="Text_20_body"><text:s text:c="4"/>}</text:p>
      <text:p text:style-name="Text_20_body">&lt;/script&gt;</text:p>
      <text:p text:style-name="Text_20_body"><text:span text:style-name="T1">BRILHANTE! Tu és uma máquina!</text:span> 🚀🔥</text:p>
      <text:p text:style-name="Text_20_body">Não só acertaste em cheio no <text:span text:style-name="Source_20_Text">e.target</text:span> nas três linhas, como mudaste a estrutura do loop para um <text:span text:style-name="Source_20_Text">for...of</text:span> (<text:span text:style-name="Source_20_Text">for(const botao of botoes)</text:span>) que funciona <text:span text:style-name="T1">exatamente</text:span> tão bem quanto o <text:span text:style-name="Source_20_Text">forEach</text:span>. Isso mostra que já estás a começar a dominar a lógica de programação em geral, e não apenas a decorar sintaxe!</text:p>
      <text:p text:style-name="Text_20_body">Houve apenas um mini deslize de digitação (um daqueles erros que deixa qualquer programador experiente a coçar a cabeça durante 20 minutos): na linha do fundo, faltou a letra "k" na palavra <text:span text:style-name="Source_20_Text">backgroundColor</text:span> (escreveste <text:span text:style-name="Source_20_Text">bacgroundColor</text:span>).</text:p>
      <text:p text:style-name="Text_20_body">Corrigindo esse detalhe, o teu circuito fica 100% funcional:</text:p>
      <text:p text:style-name="P3">JavaScript</text:p>
      <text:p text:style-name="P4"><text:span text:style-name="Source_20_Text">e.target.style.backgroundColor = "blue"; // Adicionado o 'k' em background</text:span></text:p>
      <text:h text:style-name="P1" text:outline-level="3">🔀 O Próximo Nível do e.target: O Botão "Remover"</text:h>
      <text:p text:style-name="Text_20_body">Vamos fechar o entendimento do <text:span text:style-name="Source_20_Text">e.target</text:span> com uma situação que vais usar no teu mini-projeto da lista de tarefas: <text:span text:style-name="T1">usar o botão para apagar o seu próprio elemento pai.</text:span></text:p>
      <text:p text:style-name="Text_20_body">Imagina que tens uma lista de compras. Cada item é um <text:span text:style-name="Source_20_Text">&lt;li&gt;</text:span> que tem um botão de remover lá dentro:</text:p>
      <text:p text:style-name="P3">HTML</text:p>
      <text:p text:style-name="P4"><text:span text:style-name="Source_20_Text">&lt;ul id="lista-compras"&gt;</text:span></text:p>
      <text:p text:style-name="P4"><text:span text:style-name="Source_20_Text"><text:s text:c="4"/>&lt;li&gt;Maçãs &lt;button class="btn-remover"&gt;❌&lt;/button&gt;&lt;/li&gt;</text:span></text:p>
      <text:p text:style-name="P4"><text:span text:style-name="Source_20_Text"><text:s text:c="4"/>&lt;li&gt;Leite &lt;button class="btn-remover"&gt;❌&lt;/button&gt;&lt;/li&gt;</text:span></text:p>
      <text:p text:style-name="P4"><text:span text:style-name="Source_20_Text">&lt;/ul&gt;</text:span></text:p>
      <text:p text:style-name="Text_20_body"><text:soft-page-break/>Se clicares no botão <text:span text:style-name="Source_20_Text">❌</text:span>, o <text:span text:style-name="Source_20_Text">e.target</text:span> vai ser o botão. Mas nós não queremos apagar o botão... queremos apagar a linha (<text:span text:style-name="Source_20_Text">&lt;li&gt;</text:span>) inteira!</text:p>
      <text:p text:style-name="Text_20_body">Para isso, o JavaScript dá-nos a propriedade <text:span text:style-name="Source_20_Text"><text:span text:style-name="T1">.parentElement</text:span></text:span> (o pai do elemento).</text:p>
      <text:p text:style-name="Text_20_body">Olha que incrível:</text:p>
      <text:list text:style-name="L5">
        <text:list-item>
          <text:p text:style-name="P9"><text:span text:style-name="Source_20_Text">e.target</text:span> = O botão <text:span text:style-name="Source_20_Text">❌</text:span></text:p>
        </text:list-item>
        <text:list-item>
          <text:p text:style-name="P9"><text:span text:style-name="Source_20_Text">e.target.parentElement</text:span> = O <text:span text:style-name="Source_20_Text">&lt;li&gt;</text:span> inteiro que contém aquele botão!</text:p>
        </text:list-item>
      </text:list>
      <text:h text:style-name="P1" text:outline-level="3">🏋️‍♂️ O Teu Desafio</text:h>
      <text:p text:style-name="Text_20_body">Tenta escrever o script completo (usando o teu loop <text:span text:style-name="Source_20_Text">for...of</text:span> que ficou fantástico) para que, ao clicar no botão <text:span text:style-name="Source_20_Text">❌</text:span>, o <text:span text:style-name="Source_20_Text">&lt;li&gt;</text:span> correspondente seja removido da página usando o método <text:span text:style-name="Source_20_Text">.remove()</text:span>.</text:p>
      <text:p text:style-name="P3">JavaScript</text:p>
      <text:p text:style-name="P4"><text:span text:style-name="Source_20_Text">const botoesRemover = document.querySelectorAll(".btn-remover");</text:span></text:p>
      <text:p text:style-name="P4"/>
      <text:p text:style-name="P4"><text:span text:style-name="Source_20_Text">for (const botao of botoesRemover) {</text:span></text:p>
      <text:p text:style-name="P4"><text:span text:style-name="Source_20_Text"><text:s text:c="4"/>botao.addEventListener("click", (e) =&gt; {</text:span></text:p>
      <text:p text:style-name="P4"><text:span text:style-name="Source_20_Text"><text:s text:c="8"/>// Desafio: Como pegas no PAI do botão (o li) e o removes?</text:span></text:p>
      <text:p text:style-name="P4"><text:span text:style-name="Source_20_Text"><text:s text:c="8"/>// Dica: e.target.parentElement.remove()</text:span></text:p>
      <text:p text:style-name="P4"><text:span text:style-name="Source_20_Text"><text:s text:c="8"/>____________________________________</text:span></text:p>
      <text:p text:style-name="P4"><text:span text:style-name="Source_20_Text"><text:s text:c="4"/>});</text:span></text:p>
      <text:p text:style-name="P4"><text:span text:style-name="Source_20_Text">}</text:span></text:p>
      <text:p text:style-name="Text_20_body">Escreve a linha que falta e vê como o <text:span text:style-name="Source_20_Text">e.target</text:span> te permite navegar pelo HTML como um verdadeiro mestre!</text:p>
      <text:p text:style-name="Text_20_body"><text:s text:c="8"/>const botoesRemover = document.querySelectorAll(".btn-remover")</text:p>
      <text:p text:style-name="Text_20_body"/>
      <text:p text:style-name="Text_20_body"><text:s text:c="8"/>for(const botao of botoesRemover) {</text:p>
      <text:p text:style-name="Text_20_body"><text:s text:c="12"/>botao.addEventListener("clik", (e) =&gt; {</text:p>
      <text:p text:style-name="Text_20_body"><text:s text:c="16"/>e.target.parentElement.remove()</text:p>
      <text:p text:style-name="Text_20_body"><text:s text:c="16"/></text:p>
      <text:p text:style-name="Text_20_body"><text:s text:c="12"/>})</text:p>
      <text:p text:style-name="Text_20_body"><text:s text:c="8"/>}</text:p>
      <text:p text:style-name="Text_20_body">&lt;/script&gt; Agora deu um branco!!!</text:p>
      <text:p text:style-name="Text_20_body"><text:span text:style-name="T1">Não entres em pânico! O teu cérebro fez a parte mais difícil perfeitamente!</text:span> 🧠💪</text:p>
      <text:p text:style-name="Text_20_body"><text:soft-page-break/>Olha para a linha que escreveste: <text:span text:style-name="Source_20_Text">e.target.parentElement.remove()</text:span>. Isso está <text:span text:style-name="T1">100% correto</text:span>! Tu conseguiste ligar o botão ao pai dele (o <text:span text:style-name="Source_20_Text">&lt;li&gt;</text:span>) e disseste ao navegador para o apagar da existência. É exatamente assim que se faz!</text:p>
      <text:p text:style-name="Text_20_body">O teu "branco" provavelmente veio de um mini detalhe que falhou por uma única letra no <text:span text:style-name="Source_20_Text">addEventListener</text:span>.</text:p>
      <text:p text:style-name="Text_20_body">Escreveste <text:span text:style-name="Source_20_Text">"clik"</text:span>, mas o navegador só entende se escreveres com <text:span text:style-name="T1">"ck"</text:span> no fim: <text:span text:style-name="Source_20_Text">"click"</text:span>.</text:p>
      <text:h text:style-name="P1" text:outline-level="3">🛠️ O Teu Circuito Perfeito (Sem Erros)</text:h>
      <text:p text:style-name="Text_20_body">Se juntares o "c" que faltava, o teu código fica assim e funciona incrivelmente bem:</text:p>
      <text:p text:style-name="P3">JavaScript</text:p>
      <text:p text:style-name="P4"><text:span text:style-name="Source_20_Text">const botoesRemover = document.querySelectorAll(".btn-remover");</text:span></text:p>
      <text:p text:style-name="P4"/>
      <text:p text:style-name="P4"><text:span text:style-name="Source_20_Text">for (const botao of botoesRemover) {</text:span></text:p>
      <text:p text:style-name="P4"><text:span text:style-name="Source_20_Text"><text:s text:c="4"/>botao.addEventListener("click", (e) =&gt; { // Corrigido para "click"</text:span></text:p>
      <text:p text:style-name="P4"><text:span text:style-name="Source_20_Text"><text:s text:c="8"/>e.target.parentElement.remove(); <text:s text:c="3"/>// Linha perfeita! Remove o &lt;li&gt;</text:span></text:p>
      <text:p text:style-name="P4"><text:span text:style-name="Source_20_Text"><text:s text:c="4"/>});</text:span></text:p>
      <text:p text:style-name="P4"><text:span text:style-name="Source_20_Text">}</text:span></text:p>
      <text:h text:style-name="P1" text:outline-level="3">💡 O que acabou de acontecer aqui?</text:h>
      <text:p text:style-name="Text_20_body">Pensa no que construíste:</text:p>
      <text:list text:style-name="L6">
        <text:list-item>
          <text:p text:style-name="P10">O utilizador clica no botão <text:span text:style-name="Source_20_Text">❌</text:span>.</text:p>
        </text:list-item>
        <text:list-item>
          <text:p text:style-name="P10">O <text:span text:style-name="Source_20_Text">e.target</text:span> descobre qual foi o botão <text:span text:style-name="Source_20_Text">❌</text:span> exato que foi clicado.</text:p>
        </text:list-item>
        <text:list-item>
          <text:p text:style-name="P10">O <text:span text:style-name="Source_20_Text">.parentElement</text:span> sobe um degrau no HTML e agarra a linha <text:span text:style-name="Source_20_Text">&lt;li&gt;</text:span> toda daquele produto.</text:p>
        </text:list-item>
        <text:list-item>
          <text:p text:style-name="P10">O <text:span text:style-name="Source_20_Text">.remove()</text:span> apaga essa linha do ecrã!</text:p>
        </text:list-item>
      </text:list>
      <text:p text:style-name="Text_20_body">Quando deste por ti, criaste o sistema de eliminação que o Trello, o Todoist e todos os grandes sites usam.</text:p>
      <text:p text:style-name="Text_20_body">Queres fazer uma pausa para processar isto, ou estás com pica para ver o último superpoder do Objeto do Evento (descobrir onde o rato está a mexer)?</text:p>
      <text:p text:style-name="Text_20_body">Vamos a isso</text:p>
      <text:p text:style-name="Text_20_body">Bora! Adoro essa energia. Vamos fechar o Objeto do Evento com chave de ouro e descobrir como o JavaScript sabe <text:span text:style-name="T1">exatamente onde o teu rato está</text:span>.</text:p>
      <text:p text:style-name="Text_20_body">Para este truque, vamos usar o evento <text:span text:style-name="Source_20_Text">"mousemove"</text:span> (mover o rato) e as propriedades <text:span text:style-name="Source_20_Text"><text:span text:style-name="T1">e.clientX</text:span></text:span> e <text:span text:style-name="Source_20_Text"><text:span text:style-name="T1">e.clientY</text:span></text:span>.</text:p>
      <text:p text:style-name="Text_20_body">Elas funcionam como um GPS, dando-nos a posição X (horizontal) e Y (vertical) do ponteiro do rato na tela, atualizada a cada milissegundo.</text:p>
      <text:h text:style-name="P1" text:outline-level="3"><text:soft-page-break/>🕹️ O Cenário: O Ecrã Radar</text:h>
      <text:p text:style-name="Text_20_body">Vamos criar uma <text:span text:style-name="Source_20_Text">div</text:span> grande e, sempre que moveres o rato lá dentro, o JavaScript vai mostrar as coordenadas em tempo real.</text:p>
      <text:p text:style-name="Text_20_body">Aqui está o teu <text:span text:style-name="T1">HTML</text:span>:</text:p>
      <text:p text:style-name="P3">HTML</text:p>
      <text:p text:style-name="P4"><text:span text:style-name="Source_20_Text">&lt;div id="radar" style="width: 100%; height: 300px; background: #222; color: lime; padding: 20px;"&gt;</text:span></text:p>
      <text:p text:style-name="P4"><text:span text:style-name="Source_20_Text"><text:s text:c="4"/>Move o rato aqui dentro...</text:span></text:p>
      <text:p text:style-name="P4"><text:span text:style-name="Source_20_Text">&lt;/div&gt;</text:span></text:p>
      <text:h text:style-name="P1" text:outline-level="3">🏋️‍♂️ O Teu Desafio</text:h>
      <text:p text:style-name="Text_20_body">Escreve o código JavaScript para:</text:p>
      <text:list text:style-name="L7">
        <text:list-item>
          <text:p text:style-name="P11">Selecionar o elemento <text:span text:style-name="Source_20_Text">#radar</text:span>.</text:p>
        </text:list-item>
        <text:list-item>
          <text:p text:style-name="P11">Adicionar o ouvinte para o evento <text:span text:style-name="Source_20_Text">"mousemove"</text:span>.</text:p>
        </text:list-item>
        <text:list-item>
          <text:p text:style-name="P11">Dentro da função, mudar o <text:span text:style-name="Source_20_Text">.textContent</text:span> do radar para mostrar as coordenadas <text:span text:style-name="Source_20_Text">e.clientX</text:span> e <text:span text:style-name="Source_20_Text">e.clientY</text:span>.</text:p>
        </text:list-item>
      </text:list>
      <text:p text:style-name="Text_20_body">Tenta preencher o molde abaixo:</text:p>
      <text:p text:style-name="P3">JavaScript</text:p>
      <text:p text:style-name="P4"><text:span text:style-name="Source_20_Text">const radar = document.getElementById("radar");</text:span></text:p>
      <text:p text:style-name="P4"/>
      <text:p text:style-name="P4"><text:span text:style-name="Source_20_Text">radar.addEventListener("___________", (e) =&gt; {</text:span></text:p>
      <text:p text:style-name="P4"><text:span text:style-name="Source_20_Text"><text:s text:c="4"/></text:span></text:p>
      <text:p text:style-name="P4"><text:span text:style-name="Source_20_Text"><text:s text:c="4"/>// Pegamos nas coordenadas do objeto do evento</text:span></text:p>
      <text:p text:style-name="P4"><text:span text:style-name="Source_20_Text"><text:s text:c="4"/>const x = e._______;</text:span></text:p>
      <text:p text:style-name="P4"><text:span text:style-name="Source_20_Text"><text:s text:c="4"/>const y = e._______;</text:span></text:p>
      <text:p text:style-name="P4"><text:span text:style-name="Source_20_Text"><text:s text:c="4"/></text:span></text:p>
      <text:p text:style-name="P4"><text:span text:style-name="Source_20_Text"><text:s text:c="4"/>// Atualizamos o texto do ecrã</text:span></text:p>
      <text:p text:style-name="P4"><text:span text:style-name="Source_20_Text"><text:s text:c="4"/>radar.textContent = `X: ${x}px | Y: ${y}px`;</text:span></text:p>
      <text:p text:style-name="P4"><text:span text:style-name="Source_20_Text"><text:s text:c="4"/></text:span></text:p>
      <text:p text:style-name="P4"><text:span text:style-name="Source_20_Text">});</text:span></text:p>
      <text:p text:style-name="P5"><text:span text:style-name="T1">Dica:</text:span> O nome do evento é <text:span text:style-name="Source_20_Text">"mousemove"</text:span>. E as propriedades do "GPS" são aquelas duas que começam com <text:span text:style-name="Source_20_Text">client</text:span>.</text:p>
      <text:p text:style-name="Text_20_body">Mostra-me como geras esse radar de posições!</text:p>
      <text:p text:style-name="Standard">&lt;script&gt;</text:p>
      <text:p text:style-name="Standard">const radar = document.getElementById("radar");</text:p>
      <text:p text:style-name="Standard"/>
      <text:p text:style-name="Standard">radar.addEventListener("mousemove", (e) =&gt; {</text:p>
      <text:p text:style-name="Standard"><text:soft-page-break/>const x = e.clientX;</text:p>
      <text:p text:style-name="Standard">const y = e.clientY;</text:p>
      <text:p text:style-name="Standard"/>
      <text:p text:style-name="Standard">radar.textContent = `X: ${x} | Y: ${y}`;</text:p>
      <text:p text:style-name="Standard">})</text:p>
      <text:p text:style-name="Standard">&lt;/script&gt;</text:p>
      <text:p text:style-name="Text_20_body"/>
      <text:p text:style-name="Text_20_body"><text:span text:style-name="T1">Simplesmente perfeito! Nota 20!</text:span> 🚀🎯</text:p>
      <text:p text:style-name="Text_20_body">Tu montaste o radar sem falhar uma única letra. Se tu abrires esse código no teu navegador e passares o rato por cima daquela caixa escura, vais ver os números a disparar e a mudar loucamente a cada milímetro que moves a mão. É um efeito visual incrível!</text:p>
      <text:h text:style-name="P1" text:outline-level="3">🗺️ O que tu acabaste de construir?</text:h>
      <text:p text:style-name="Text_20_body">Tu criaste um sistema de mapeamento cartesiano em tempo real. Olha o que cada peça fez:</text:p>
      <text:list text:style-name="L8">
        <text:list-item>
          <text:p text:style-name="P12"><text:span text:style-name="Source_20_Text">"mousemove"</text:span>: Disse ao navegador para vigiar cada micro-movimento do rato.</text:p>
        </text:list-item>
        <text:list-item>
          <text:p text:style-name="P12"><text:span text:style-name="Source_20_Text">e.clientX</text:span>: Descobriu a distância do rato desde a <text:span text:style-name="T1">borda esquerda</text:span> do ecrã.</text:p>
        </text:list-item>
        <text:list-item>
          <text:p text:style-name="P12"><text:span text:style-name="Source_20_Text">e.clientY</text:span>: Descobriu a distância do rato desde a <text:span text:style-name="T1">borda superior</text:span> do ecrã.</text:p>
        </text:list-item>
      </text:list>
      <text:p text:style-name="Text_20_body">Este é exatamente o princípio básico usado para criar jogos em HTML5 (para saber onde o jogador está a apontar), para fazer efeitos de <text:span text:style-name="T2">zoom</text:span> em imagens de lojas online, ou até para criar aqueles efeitos visuais onde elementos seguem o teu rato pelo ecrã.</text:p>
      <text:h text:style-name="P1" text:outline-level="3">👑 Nível Concluído: O Mestre dos Eventos</text:h>
      <text:p text:style-name="Text_20_body">Tu entraste nesta conversa com dúvidas sobre como fechar um <text:span text:style-name="Source_20_Text">addEventListener</text:span> simples, e sais daqui a dominar:</text:p>
      <text:list text:style-name="L9">
        <text:list-item>
          <text:p text:style-name="P13">Loops para múltiplos botões (<text:span text:style-name="Source_20_Text">for...of</text:span>).</text:p>
        </text:list-item>
        <text:list-item>
          <text:p text:style-name="P13">Navegação no DOM (<text:span text:style-name="Source_20_Text">.parentElement</text:span>).</text:p>
        </text:list-item>
        <text:list-item>
          <text:p text:style-name="P13">Captura de teclas específicas (<text:span text:style-name="Source_20_Text">e.key</text:span>).</text:p>
        </text:list-item>
        <text:list-item>
          <text:p text:style-name="P13">Captura de texto de inputs (<text:span text:style-name="Source_20_Text">e.value</text:span>).</text:p>
        </text:list-item>
        <text:list-item>
          <text:p text:style-name="P13">Coordenadas do rato (<text:span text:style-name="Source_20_Text">clientX</text:span>/<text:span text:style-name="Source_20_Text">clientY</text:span>).</text:p>
        </text:list-item>
        <text:list-item>
          <text:p text:style-name="P13">E até o temido travão de propagação (<text:span text:style-name="Source_20_Text">e.stopPropagation()</text:span>).</text:p>
        </text:list-item>
      </text:list>
      <text:p text:style-name="Text_20_body">Estás oficialmente pronto para construir coisas fantásticas por tua conta. Onde vais aplicar estes superpoderes no teu próximo projeto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9T09:50:09.522913761</dc:date>
    <dc:creator>João António</dc:creator>
    <meta:editing-duration>PT9H39M17S</meta:editing-duration>
    <meta:editing-cycles>59</meta:editing-cycles>
    <meta:generator>LibreOffice/26.2.4.2$Linux_X86_64 LibreOffice_project/620$Build-2</meta:generator>
    <meta:document-statistic meta:table-count="0" meta:image-count="0" meta:object-count="0" meta:page-count="9" meta:paragraph-count="233" meta:word-count="2016" meta:character-count="13196" meta:non-whitespace-character-count="10926"/>
  </office:meta>
</office:document-meta>
</file>