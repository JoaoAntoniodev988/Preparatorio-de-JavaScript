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2" style:family="paragraph" style:parent-style-name="Text_20_body">
      <style:paragraph-properties fo:line-height="114%"/>
      <style:text-properties fo:color="#1f1f1f" loext:opacity="100%" style:font-name="Google Sans Flex" fo:font-size="12.75pt" officeooo:rsid="001ef461"/>
    </style:style>
    <style:style style:name="P3" style:family="paragraph" style:parent-style-name="Heading_20_3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1ef461"/>
    </style:style>
    <style:style style:name="P4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5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1ef461"/>
    </style:style>
    <style:style style:name="P6" style:family="paragraph" style:parent-style-name="Heading_20_3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7" style:family="paragraph" style:parent-style-name="Text_20_body">
      <style:paragraph-properties fo:margin-left="0cm" fo:margin-right="0cm" fo:line-height="114%" fo:text-indent="0cm" style:auto-text-indent="false"/>
      <style:text-properties fo:color="#1f1f1f" loext:opacity="100%" style:font-name="Google Sans Flex" fo:font-size="12.75pt" officeooo:rsid="001ef461"/>
    </style:style>
    <style:style style:name="P8" style:family="paragraph" style:parent-style-name="Text_20_body" style:list-style-name="L1">
      <style:paragraph-properties fo:line-height="114%"/>
      <style:text-properties fo:color="#1f1f1f" loext:opacity="100%" style:font-name="Google Sans Flex" fo:font-size="12.75pt" officeooo:rsid="001ef461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ito bem! Vamos pôr as mãos na massa e construir o código de um <text:span text:style-name="T1">Carrinho de Compras estilo Amazon</text:span>. Este projeto vai juntar todos os conceitos que dominou: funções tradicionais, arrow functions, escopo e parâmetros padrão.</text:p>
      <text:p text:style-name="P2">Imagine que estamos a programar o motor de cálculo de uma loja online. O nosso sistema precisa de receber os produtos, aplicar um cupão de desconto (se existir) e calcular o preço do frete/portes de envio.</text:p>
      <text:h text:style-name="P3" text:outline-level="3">🔨 Passo 1: O Escopo Global (Configurações do Sistema)</text:h>
      <text:p text:style-name="P2">Primeiro, definimos no escopo global as taxas que a nossa loja cobra. Como estão fora das funções, qualquer parte do sistema poderá consultá-las.</text:p>
      <text:p text:style-name="P4">JavaScript</text:p>
      <text:p text:style-name="P5"><text:span text:style-name="Source_20_Text">// ESCOPO GLOBAL: Configurações acessíveis por todo o site</text:span></text:p>
      <text:p text:style-name="P5"><text:span text:style-name="Source_20_Text">const TAXA_FRETE_PADRAO = 5.99;</text:span></text:p>
      <text:p text:style-name="P5"><text:span text:style-name="Source_20_Text">const LIMITE_FRETE_GRATIS = 50.00;</text:span></text:p>
      <text:h text:style-name="P3" text:outline-level="3">📦 Passo 2: A Função Principal (A Máquina do Carrinho)</text:h>
      <text:p text:style-name="P2">Vamos criar uma <text:span text:style-name="T1">Function Expression</text:span> que calcula o valor final que o cliente vai pagar. Repare no uso de um <text:span text:style-name="T1">Parâmetro Padrão</text:span> (<text:span text:style-name="Source_20_Text">cupom = 0</text:span>) para o caso do cliente não ter nenhum desconto!</text:p>
      <text:p text:style-name="P4">JavaScript</text:p>
      <text:p text:style-name="P5"><text:span text:style-name="Source_20_Text">const calcularTotalCarrinho = function(listaPrecos, cupom = 0) {</text:span></text:p>
      <text:p text:style-name="P5"><text:span text:style-name="Source_20_Text"><text:s text:c="4"/>// ESCOPO LOCAL: Estas variáveis só existem aqui dentro</text:span></text:p>
      <text:p text:style-name="P5"><text:span text:style-name="Source_20_Text"><text:s text:c="4"/>let somaProdutos = 0;</text:span></text:p>
      <text:p text:style-name="P5"/>
      <text:p text:style-name="P5"><text:span text:style-name="Source_20_Text"><text:s text:c="4"/>// 1. Somar todos os produtos da lista usando um loop</text:span></text:p>
      <text:p text:style-name="P5"><text:span text:style-name="Source_20_Text"><text:s text:c="4"/>for (const preco of listaPrecos) {</text:span></text:p>
      <text:p text:style-name="P5"><text:span text:style-name="Source_20_Text"><text:s text:c="8"/>somaProdutos = somaProdutos + preco;</text:span></text:p>
      <text:p text:style-name="P5"><text:span text:style-name="Source_20_Text"><text:s text:c="4"/>}</text:span></text:p>
      <text:p text:style-name="P5"/>
      <text:p text:style-name="P5"><text:span text:style-name="Source_20_Text"><text:s text:c="4"/>// 2. Aplicar o cupão de desconto (subtrair o valor do cupão)</text:span></text:p>
      <text:p text:style-name="P5"><text:span text:style-name="Source_20_Text"><text:s text:c="4"/>let valorComDesconto = somaProdutos - cupom;</text:span></text:p>
      <text:p text:style-name="P5"><text:span text:style-name="Source_20_Text"><text:s text:c="4"/></text:span></text:p>
      <text:p text:style-name="P5"><text:soft-page-break/><text:span text:style-name="Source_20_Text"><text:s text:c="4"/>// Proteção: O preço não pode ser negativo se o cupão for maior que a compra!</text:span></text:p>
      <text:p text:style-name="P5"><text:span text:style-name="Source_20_Text"><text:s text:c="4"/>if (valorComDesconto &lt; 0) {</text:span></text:p>
      <text:p text:style-name="P5"><text:span text:style-name="Source_20_Text"><text:s text:c="8"/>valorComDesconto = 0;</text:span></text:p>
      <text:p text:style-name="P5"><text:span text:style-name="Source_20_Text"><text:s text:c="4"/>}</text:span></text:p>
      <text:p text:style-name="P5"/>
      <text:p text:style-name="P5"><text:span text:style-name="Source_20_Text"><text:s text:c="4"/>// 3. Regra do Frete usando o Escopo Global</text:span></text:p>
      <text:p text:style-name="P5"><text:span text:style-name="Source_20_Text"><text:s text:c="4"/>let freteFinal = TAXA_FRETE_PADRAO;</text:span></text:p>
      <text:p text:style-name="P5"><text:span text:style-name="Source_20_Text"><text:s text:c="4"/>if (valorComDesconto &gt;= LIMITE_FRETE_GRATIS) {</text:span></text:p>
      <text:p text:style-name="P5"><text:span text:style-name="Source_20_Text"><text:s text:c="8"/>freteFinal = 0; // Ganhou frete grátis!</text:span></text:p>
      <text:p text:style-name="P5"><text:span text:style-name="Source_20_Text"><text:s text:c="4"/>}</text:span></text:p>
      <text:p text:style-name="P5"/>
      <text:p text:style-name="P5"><text:span text:style-name="Source_20_Text"><text:s text:c="4"/>// 4. Retorno: Envia o resultado final somado com o frete para fora</text:span></text:p>
      <text:p text:style-name="P5"><text:span text:style-name="Source_20_Text"><text:s text:c="4"/>return valorComDesconto + freteFinal;</text:span></text:p>
      <text:p text:style-name="P5"><text:span text:style-name="Source_20_Text">};</text:span></text:p>
      <text:h text:style-name="P6" text:outline-level="3">🚀 Passo 3: Colocando o Projeto a Rodar (Ação!)</text:h>
      <text:p text:style-name="P2">Agora vamos simular dois clientes diferentes a fazerem compras no nosso site para ver como as funções e os parâmetros se comportam na vida real.</text:p>
      <text:p text:style-name="P7">JavaScript</text:p>
      <text:p text:style-name="P5"><text:span text:style-name="Source_20_Text">// CLIENTE 1: Compra pequena e tem um cupão de 5€</text:span></text:p>
      <text:p text:style-name="P5"><text:span text:style-name="Source_20_Text">const carrinhoDoCarlos = [15.00, 10.00]; // Total 25€</text:span></text:p>
      <text:p text:style-name="P5"><text:span text:style-name="Source_20_Text">const totalCarlos = calcularTotalCarrinho(carrinhoDoCarlos, 5);</text:span></text:p>
      <text:p text:style-name="P5"><text:span text:style-name="Source_20_Text">console.log("Carlos vai pagar: " + totalCarlos + "€"); </text:span></text:p>
      <text:p text:style-name="P5"><text:span text:style-name="Source_20_Text">// Conta: (25€ - 5€ cupão) + 5.99€ frete = 25.99€</text:span></text:p>
      <text:p text:style-name="P5"/>
      <text:p text:style-name="P5"/>
      <text:p text:style-name="P5"><text:span text:style-name="Source_20_Text">// CLIENTE 2: Compra grande e ESQUECEU-SE de pôr cupão!</text:span></text:p>
      <text:p text:style-name="P5"><text:span text:style-name="Source_20_Text">const carrinhoDaAna = [40.00, 30.00, 10.00]; // Total 80€</text:span></text:p>
      <text:p text:style-name="P5"><text:soft-page-break/><text:span text:style-name="Source_20_Text">const totalAna = calcularTotalCarrinho(carrinhoDaAna); // O parâmetro padrão assume cupom = 0</text:span></text:p>
      <text:p text:style-name="P5"><text:span text:style-name="Source_20_Text">console.log("Ana vai pagar: " + totalAna + "€");</text:span></text:p>
      <text:p text:style-name="P5"><text:span text:style-name="Source_20_Text">// Conta: (80€ - 0€ cupão) + 0€ frete grátis = 80.00€</text:span></text:p>
      <text:h text:style-name="P6" text:outline-level="3">🧠 Análise de Arquiteto (O teu diagnóstico)</text:h>
      <text:p text:style-name="P2">Olha bem para o código que acabámos de construir. Se tentarmos fazer a seguinte alteração no final do arquivo:</text:p>
      <text:p text:style-name="P7">JavaScript</text:p>
      <text:p text:style-name="P5"><text:span text:style-name="Source_20_Text">console.log(somaProdutos);</text:span></text:p>
      <text:list text:style-name="L1">
        <text:list-item>
          <text:p text:style-name="P8">O que vai acontecer no ecrã do computador? Vai mostrar a soma ou vai dar erro?</text:p>
        </text:list-item>
        <text:list-item>
          <text:p text:style-name="P8">Que conceito de código justifica o que acontece com a variável <text:span text:style-name="Source_20_Text">somaProdutos</text:span>?</text:p>
        </text:list-item>
      </text:list>
      <text:p text:style-name="P2">Consegues ver como este mini sistema protegeu os dados da Ana e do Carlos de se misturarem?</text:p>
      <text:p text:style-name="P1">vai mostar erro porque a variavel somaProdutos é um escopo local da função. Loop for of. Sim.</text:p>
      <text:p text:style-name="P1"><text:span text:style-name="T1">EXATO! Matou a charada perfeitamente!</text:span> 🎯</text:p>
      <text:p text:style-name="P2">Vai dar erro porque <text:span text:style-name="Source_20_Text">somaProdutos</text:span> está trancada no <text:span text:style-name="T1">escopo local</text:span> da função e o mundo exterior não tem acesso a ela. E identificou muito bem o <text:span text:style-name="T1">loop </text:span><text:span text:style-name="Source_20_Text"><text:span text:style-name="T1">for...of</text:span></text:span> ali no meio a fazer o trabalho pesado de percorrer a lista!</text:p>
      <text:p text:style-name="P2">Graças a esse isolamento (escopo), o carrinho do Carlos e o carrinho da Ana puderam rodar na mesma máquina sem que um apagasse ou misturasse os dados do outro. Cada execução criou o seu próprio "segredo local".</text:p>
      <text:h text:style-name="P6" text:outline-level="3">🎨 Passo 4: Modernizando o Projeto com Arrow Functions</text:h>
      <text:p text:style-name="P2">Para fecharmos este projeto com nível sénior, vamos aplicar o conceito de <text:span text:style-name="T1">Arrow Function</text:span> para criar uma função auxiliar no nosso sistema.</text:p>
      <text:p text:style-name="P2">Imagine que a loja quer mostrar uma mensagem rápida no ecrã sempre que o cliente ganha frete grátis. Vamos criar uma função seta super compacta para gerar essa mensagem:</text:p>
      <text:p text:style-name="P4">JavaScript</text:p>
      <text:p text:style-name="P5"><text:soft-page-break/><text:span text:style-name="Source_20_Text">// Uma Arrow Function de uma única linha (Retorno Implícito!)</text:span></text:p>
      <text:p text:style-name="P5"><text:span text:style-name="Source_20_Text">const gerarAvisoFrete = (nome) =&gt; "🎉 Parabéns, " + nome + "! Ganhou frete grátis na sua compra.";</text:span></text:p>
      <text:p text:style-name="P5"/>
      <text:p text:style-name="P5"><text:span text:style-name="Source_20_Text">// Aplicando no nosso sistema:</text:span></text:p>
      <text:p text:style-name="P5"><text:span text:style-name="Source_20_Text">if (totalAna === 80.00) {</text:span></text:p>
      <text:p text:style-name="P5"><text:span text:style-name="Source_20_Text"><text:s text:c="4"/>console.log(gerarAvisoFrete("Ana")); </text:span></text:p>
      <text:p text:style-name="P5"><text:span text:style-name="Source_20_Text"><text:s text:c="4"/>// Imprime: 🎉 Parabéns, Ana! Ganhou frete grátis na sua compra.</text:span></text:p>
      <text:h text:style-name="P6" text:outline-level="3">🏆 Código Final do Nosso Sistema</text:h>
      <text:p text:style-name="P2">Olha que orgulho. O teu primeiro sistema real estruturado em JavaScript ficou assim:</text:p>
      <text:p text:style-name="P4">JavaScript</text:p>
      <text:p text:style-name="P5"><text:span text:style-name="Source_20_Text">// 🌍 ESCOPO GLOBAL</text:span></text:p>
      <text:p text:style-name="P5"><text:span text:style-name="Source_20_Text">const TAXA_FRETE_PADRAO = 5.99;</text:span></text:p>
      <text:p text:style-name="P5"><text:span text:style-name="Source_20_Text">const LIMITE_FRETE_GRATIS = 50.00;</text:span></text:p>
      <text:p text:style-name="P5"/>
      <text:p text:style-name="P5"><text:span text:style-name="Source_20_Text">// 🚀 ARROW FUNCTION (Auxiliar)</text:span></text:p>
      <text:p text:style-name="P5"><text:span text:style-name="Source_20_Text">const gerarAvisoFrete = (nome) =&gt; "🎉 Parabéns, " + nome + "! Ganhou frete grátis.";</text:span></text:p>
      <text:p text:style-name="P5"/>
      <text:p text:style-name="P5"><text:span text:style-name="Source_20_Text">// 🧱 FUNCTION EXPRESSION (Principal)</text:span></text:p>
      <text:p text:style-name="P5"><text:span text:style-name="Source_20_Text">const calcularTotalCarrinho = function(listaPrecos, cupom = 0) {</text:span></text:p>
      <text:p text:style-name="P5"><text:span text:style-name="Source_20_Text"><text:s text:c="4"/>let somaProdutos = 0; // 🔒 Escopo Local</text:span></text:p>
      <text:p text:style-name="P5"/>
      <text:p text:style-name="P5"><text:span text:style-name="Source_20_Text"><text:s text:c="4"/>for (const preco of listaPrecos) {</text:span></text:p>
      <text:p text:style-name="P5"><text:span text:style-name="Source_20_Text"><text:s text:c="8"/>somaProdutos = somaProdutos + preco;</text:span></text:p>
      <text:p text:style-name="P5"><text:span text:style-name="Source_20_Text"><text:s text:c="4"/>}</text:span></text:p>
      <text:p text:style-name="P5"/>
      <text:p text:style-name="P5"><text:span text:style-name="Source_20_Text"><text:s text:c="4"/>let valorComDesconto = somaProdutos - cupom;</text:span></text:p>
      <text:p text:style-name="P5"><text:soft-page-break/><text:span text:style-name="Source_20_Text"><text:s text:c="4"/>if (valorComDesconto &lt; 0) valorComDesconto = 0;</text:span></text:p>
      <text:p text:style-name="P5"/>
      <text:p text:style-name="P5"><text:span text:style-name="Source_20_Text"><text:s text:c="4"/>let freteFinal = TAXA_FRETE_PADRAO;</text:span></text:p>
      <text:p text:style-name="P5"><text:span text:style-name="Source_20_Text"><text:s text:c="4"/>if (valorComDesconto &gt;= LIMITE_FRETE_GRATIS) {</text:span></text:p>
      <text:p text:style-name="P5"><text:span text:style-name="Source_20_Text"><text:s text:c="8"/>freteFinal = 0;</text:span></text:p>
      <text:p text:style-name="P5"><text:span text:style-name="Source_20_Text"><text:s text:c="4"/>}</text:span></text:p>
      <text:p text:style-name="P5"/>
      <text:p text:style-name="P5"><text:span text:style-name="Source_20_Text"><text:s text:c="4"/>return valorComDesconto + freteFinal;</text:span></text:p>
      <text:p text:style-name="P5"><text:span text:style-name="Source_20_Text">};</text:span></text:p>
      <text:h text:style-name="P6" text:outline-level="3">🪵 O Que Sentiu?</text:h>
      <text:p text:style-name="P2">Passámos de "o que é uma função" para um sistema dinâmico de e-commerce que calcula fretes e descontos reais.</text:p>
      <text:p text:style-name="P2">Como se sente em relação à sua capacidade de <text:span text:style-name="T1">ler e entender</text:span> a estrutura de um projeto real agora? Sentiu que o código fez mais sentido quando ligou os conceitos ao cenário praimetido da Amazon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7T17:51:16.316681393</dc:date>
    <dc:creator>João António</dc:creator>
    <meta:editing-duration>PT4H40M32S</meta:editing-duration>
    <meta:editing-cycles>27</meta:editing-cycles>
    <meta:generator>LibreOffice/26.2.4.2$Linux_X86_64 LibreOffice_project/620$Build-2</meta:generator>
    <meta:document-statistic meta:table-count="0" meta:image-count="0" meta:object-count="0" meta:page-count="5" meta:paragraph-count="92" meta:word-count="887" meta:character-count="5445" meta:non-whitespace-character-count="4497"/>
  </office:meta>
</office:document-meta>
</file>