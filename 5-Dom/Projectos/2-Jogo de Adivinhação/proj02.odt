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5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6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7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8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🎲 Projeto 2: O Jogo de Adivinhação (Com <text:span text:style-name="Source_20_Text">while</text:span>)</text:h>
      <text:p text:style-name="P2">Agora vamos programar juntos um mini-jogo clássico: o computador escolhe um número secreto e o jogador tem de adivinhar. Como não sabemos quantas tentativas o jogador vai precisar, usamos o <text:span text:style-name="Source_20_Text"><text:span text:style-name="T1">while</text:span></text:span>.</text:p>
      <text:p text:style-name="P2">A tua missão é completar os <text:span text:style-name="T1">três espaços em branco (???)</text:span> no código abaixo para o jogo funcionar corretamente.</text:p>
      <text:p text:style-name="P3">JavaScript</text:p>
      <text:p text:style-name="P4"><text:span text:style-name="Source_20_Text">const numeroSecreto = 7;</text:span></text:p>
      <text:p text:style-name="P4"><text:span text:style-name="Source_20_Text">let tentativaDoJogador = 0; </text:span></text:p>
      <text:p text:style-name="P4"><text:span text:style-name="Source_20_Text">let acertou = false;</text:span></text:p>
      <text:p text:style-name="P4"/>
      <text:p text:style-name="P4"><text:span text:style-name="Source_20_Text">// DESAFIO 1: Qual deve ser a condição para o jogo continuar rodando?</text:span></text:p>
      <text:p text:style-name="P4"><text:span text:style-name="Source_20_Text">// Dica: O jogo continua ENQUANTO a variável 'acertou' for igual a false.</text:span></text:p>
      <text:p text:style-name="P4"><text:span text:style-name="Source_20_Text">while (acertou === ???) {</text:span></text:p>
      <text:p text:style-name="P4"><text:span text:style-name="Source_20_Text"><text:s text:c="4"/></text:span></text:p>
      <text:p text:style-name="P4"><text:span text:style-name="Source_20_Text"><text:s text:c="4"/>// Simula o jogador a tentar um número (vamos subir de 1 em 1 para testar)</text:span></text:p>
      <text:p text:style-name="P4"><text:span text:style-name="Source_20_Text"><text:s text:c="4"/>tentativaDoJogador = tentativaDoJogador + 1;</text:span></text:p>
      <text:p text:style-name="P4"><text:span text:style-name="Source_20_Text"><text:s text:c="4"/>console.log("O jogador tentou o número: " + tentativaDoJogador);</text:span></text:p>
      <text:p text:style-name="P4"><text:span text:style-name="Source_20_Text"><text:s text:c="4"/></text:span></text:p>
      <text:p text:style-name="P4"><text:span text:style-name="Source_20_Text"><text:s text:c="4"/>// DESAFIO 2: Se a tentativa do jogador for IGUAL ao número secreto...</text:span></text:p>
      <text:p text:style-name="P4"><text:span text:style-name="Source_20_Text"><text:s text:c="4"/>if (tentativaDoJogador === ???) {</text:span></text:p>
      <text:p text:style-name="P4"><text:span text:style-name="Source_20_Text"><text:s text:c="8"/>console.log("Parabéns! Descobriu o número secreto!");</text:span></text:p>
      <text:p text:style-name="P4"><text:span text:style-name="Source_20_Text"><text:s text:c="8"/></text:span></text:p>
      <text:p text:style-name="P4"><text:span text:style-name="Source_20_Text"><text:s text:c="8"/>// DESAFIO 3: O que fazemos com a variável 'acertou' para o loop parar na próxima volta?</text:span></text:p>
      <text:p text:style-name="P4"><text:span text:style-name="Source_20_Text"><text:s text:c="8"/>acertou = ???; 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><text:soft-page-break/></text:p>
      <text:p text:style-name="P4"><text:span text:style-name="Source_20_Text">console.log("Fim do Jogo!");</text:span></text:p>
      <text:p text:style-name="P5"><text:span text:style-name="T1">Como preencherias os três </text:span><text:span text:style-name="Source_20_Text"><text:span text:style-name="T1">???</text:span></text:span><text:span text:style-name="T1">?</text:span></text:p>
      <text:list text:style-name="L1">
        <text:list-item>
          <text:p text:style-name="P6"><text:span text:style-name="T1">Espaço 1:</text:span> <text:span text:style-name="Source_20_Text">while (acertou === ???)</text:span></text:p>
        </text:list-item>
        <text:list-item>
          <text:p text:style-name="P6"><text:span text:style-name="T1">Espaço 2:</text:span> <text:span text:style-name="Source_20_Text">if (tentativaDoJogador === ???)</text:span></text:p>
        </text:list-item>
        <text:list-item>
          <text:p text:style-name="P6"><text:span text:style-name="T1">Espaço 3:</text:span> <text:span text:style-name="Source_20_Text">acertou = ???;</text:span></text:p>
        </text:list-item>
      </text:list>
      <text:p text:style-name="P5">false. 7. true</text:p>
      <text:p text:style-name="P5"><text:span text:style-name="T1">Incrível! Código completamente decifrado!</text:span> 🎯</text:p>
      <text:p text:style-name="P2">Preencheu os três espaços com precisão cirúrgica. Vamos ver como ficou o seu código completo e funcional:</text:p>
      <text:p text:style-name="P5"><text:span text:style-name="T1">Incrível! Código completamente decifrado!</text:span> 🎯</text:p>
      <text:p text:style-name="P2">Preencheu os três espaços com precisão cirúrgica. Vamos ver como ficou o seu código completo e funcional:</text:p>
      <text:p text:style-name="P5">Quando a variável <text:span text:style-name="Source_20_Text">acertou</text:span> mudou para <text:span text:style-name="Source_20_Text">true</text:span>, na volta seguinte o <text:span text:style-name="Source_20_Text">while</text:span> perguntou: <text:span text:style-name="Source_20_Text">while (true === false)</text:span>. Como isso é uma mentira (<text:span text:style-name="T1">False</text:span>), o jogo encerrou com sucesso!</text:p>
      <text:h text:style-name="P7" text:outline-level="3">🏆 Missão Cumprida: Você Criou Seus Primeiros Programas!</text:h>
      <text:p text:style-name="P2">Olhe para trás e veja o caminho que percorreu. Passou de ler o <text:span text:style-name="Source_20_Text">for</text:span> tradicional com dificuldade para <text:span text:style-name="T1">analisar regras de negócios em faturas</text:span> e <text:span text:style-name="T1">estruturar a lógica de um motor de jogo</text:span>.</text:p>
      <text:p text:style-name="P2">Para manter este ritmo e continuar a crescer, qual é o próximo passo ideal para si?</text:p>
      <text:list text:style-name="L2">
        <text:list-item>
          <text:p text:style-name="P8"><text:span text:style-name="T1">1. Praticar o Projeto 2 com uma rasteira:</text:span> Mudar o jogo para que o jogador tenha um <text:span text:style-name="T1">limite máximo de 3 tentativas</text:span> (usando o <text:span text:style-name="Source_20_Text">break</text:span> se ele falhar 3 vezes).</text:p>
        </text:list-item>
        <text:list-item>
          <text:p text:style-name="P8"><text:span text:style-name="T1">2. Entrar no mundo das Funções (</text:span><text:span text:style-name="Source_20_Text"><text:span text:style-name="T1">functions</text:span></text:span><text:span text:style-name="T1">):</text:span> Aprender a envelopar estes projetos para que eles possam ser executados bastando chamar um comando (ex: <text:span text:style-name="Source_20_Text">iniciarJogo()</text:span>)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9:40:30.042304408</dc:date>
    <dc:creator>João António</dc:creator>
    <meta:editing-duration>PT3H57M4S</meta:editing-duration>
    <meta:editing-cycles>27</meta:editing-cycles>
    <meta:generator>LibreOffice/26.2.4.2$Linux_X86_64 LibreOffice_project/620$Build-2</meta:generator>
    <meta:document-statistic meta:table-count="0" meta:image-count="0" meta:object-count="0" meta:page-count="2" meta:paragraph-count="39" meta:word-count="393" meta:character-count="2377" meta:non-whitespace-character-count="1959"/>
  </office:meta>
</office:document-meta>
</file>