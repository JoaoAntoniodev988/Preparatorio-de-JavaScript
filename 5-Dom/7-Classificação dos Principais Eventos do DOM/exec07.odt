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937cm"/>
    </style:style>
    <style:style style:name="Tabela1.B" style:family="table-column">
      <style:table-column-properties style:column-width="4.583cm"/>
    </style:style>
    <style:style style:name="Tabela1.C" style:family="table-column">
      <style:table-column-properties style:column-width="8.481cm"/>
    </style:style>
    <style:style style:name="Tabela1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P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6" style:family="paragraph" style:parent-style-name="Table_20_Contents">
      <style:paragraph-properties fo:margin-top="0cm" fo:margin-bottom="0.247cm" style:contextual-spacing="false" fo:line-height="114%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name="Google Sans Text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1" style:family="paragraph" style:parent-style-name="Heading_20_3">
      <style:paragraph-properties fo:margin-top="0cm" fo:margin-bottom="0.247cm" style:contextual-spacing="false" fo:line-height="115%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Preformatted_20_Text">
      <style:paragraph-properties fo:margin-top="0cm" fo:margin-bottom="0.247cm" style:contextual-spacing="false" fo:line-height="115%"/>
    </style:style>
    <style:style style:name="P14" style:family="paragraph" style:parent-style-name="Text_20_body">
      <style:text-properties fo:font-weight="bold"/>
    </style:style>
    <style:style style:name="P15" style:family="paragraph" style:parent-style-name="Text_20_body" style:list-style-name="L2"/>
    <style:style style:name="T1" style:family="text">
      <style:text-properties fo:font-weight="bold"/>
    </style:style>
    <style:style style:name="T2" style:family="text">
      <style:text-properties fo:font-family="'Google Sans', sans-serif"/>
    </style:style>
    <style:style style:name="T3" style:family="text">
      <style:text-properties style:font-name="Google Sans Text"/>
    </style:style>
    <style:style style:name="T4" style:family="text">
      <style:text-properties style:font-name="Google Sans Text" style:font-name-asian="Google Sans Text" style:font-name-complex="Google Sans Text"/>
    </style:style>
    <style:style style:name="T5" style:family="text">
      <style:text-properties style:font-name="Google Sans Text" fo:font-weight="bold"/>
    </style:style>
    <style:style style:name="T6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forma fantástica de fechar esta jornada com chave de ouro! 🏆</text:p>
      <text:p text:style-name="P1">Para dominares o desenvolvimento web, precisas de conhecer o "catálogo" dos eventos que o navegador consegue detetar. Eles dividem-se em grandes famílias, dependendo do que o utilizador está a fazer.</text:p>
      <text:p text:style-name="P1">Vamos passar pelas <text:span text:style-name="T1">4 principais categorias</text:span> que vais usar na tua vida como programador.</text:p>
      <text:h text:style-name="P2" text:outline-level="3">🗺️ <text:span text:style-name="T2">As 4 Grandes Famílias de Eventos do DOM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3"><text:span text:style-name="Strong_20_Emphasis"><text:span text:style-name="T3">Categoria</text:span></text:span></text:p>
            </table:table-cell>
            <table:table-cell table:style-name="Tabela1.A1" office:value-type="string">
              <text:p text:style-name="P3"><text:span text:style-name="Strong_20_Emphasis"><text:span text:style-name="T3">Evento</text:span></text:span></text:p>
            </table:table-cell>
            <table:table-cell table:style-name="Tabela1.A1" office:value-type="string">
              <text:p text:style-name="P3"><text:span text:style-name="Strong_20_Emphasis"><text:span text:style-name="T3">Quando acontece?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4">Rato (Mouse)</text:p>
          </table:table-cell>
          <table:table-cell table:style-name="Tabela1.A1" office:value-type="string">
            <text:p text:style-name="P5"><text:span text:style-name="Source_20_Text"><text:span text:style-name="T3">"click"</text:span></text:span></text:p>
            <text:p text:style-name="P6"/>
            <text:p text:style-name="P5"><text:span text:style-name="Source_20_Text"><text:span text:style-name="T3">"mouseenter"</text:span></text:span></text:p>
            <text:p text:style-name="P6"/>
            <text:p text:style-name="P5"><text:span text:style-name="Source_20_Text"><text:span text:style-name="T3">"mouseleave"</text:span></text:span><text:span text:style-name="T4"/></text:p>
          </table:table-cell>
          <table:table-cell table:style-name="Tabela1.A1" office:value-type="string">
            <text:p text:style-name="P7">Clicar num elemento.</text:p>
            <text:p text:style-name="P6"/>
            <text:p text:style-name="P7">Passar o rato por cima (hover).</text:p>
            <text:p text:style-name="P6"/>
            <text:p text:style-name="P7">Tirar o rato de cima.<text:span text:style-name="T4"/></text:p>
          </table:table-cell>
        </table:table-row>
        <table:table-row>
          <table:table-cell table:style-name="Tabela1.A1" office:value-type="string">
            <text:p text:style-name="P4">Teclado (Keyboard)</text:p>
          </table:table-cell>
          <table:table-cell table:style-name="Tabela1.A1" office:value-type="string">
            <text:p text:style-name="P5"><text:span text:style-name="Source_20_Text"><text:span text:style-name="T3">"keydown"</text:span></text:span></text:p>
            <text:p text:style-name="P6"/>
            <text:p text:style-name="P5"><text:span text:style-name="Source_20_Text"><text:span text:style-name="T3">"keyup"</text:span></text:span><text:span text:style-name="T4"/></text:p>
          </table:table-cell>
          <table:table-cell table:style-name="Tabela1.A1" office:value-type="string">
            <text:p text:style-name="P7">Pressionar uma tecla.</text:p>
            <text:p text:style-name="P6"/>
            <text:p text:style-name="P7">Soltar uma tecla.<text:span text:style-name="T4"/></text:p>
          </table:table-cell>
        </table:table-row>
        <table:table-row>
          <table:table-cell table:style-name="Tabela1.A1" office:value-type="string">
            <text:p text:style-name="P4">Formulários</text:p>
          </table:table-cell>
          <table:table-cell table:style-name="Tabela1.A1" office:value-type="string">
            <text:p text:style-name="P5"><text:span text:style-name="Source_20_Text"><text:span text:style-name="T3">"submit"</text:span></text:span></text:p>
            <text:p text:style-name="P6"/>
            <text:p text:style-name="P5"><text:span text:style-name="Source_20_Text"><text:span text:style-name="T3">"change"</text:span></text:span></text:p>
            <text:p text:style-name="P6"/>
            <text:p text:style-name="P5"><text:span text:style-name="Source_20_Text"><text:span text:style-name="T3">"input"</text:span></text:span><text:span text:style-name="T4"/></text:p>
          </table:table-cell>
          <table:table-cell table:style-name="Tabela1.A1" office:value-type="string">
            <text:p text:style-name="P7">Enviar o formulário.</text:p>
            <text:p text:style-name="P6"/>
            <text:p text:style-name="P7">Mudar o valor de um campo (ex: select).</text:p>
            <text:p text:style-name="P6"/>
            <text:p text:style-name="P7">Dispara a cada letra digitada.<text:span text:style-name="T4"/></text:p>
          </table:table-cell>
        </table:table-row>
        <table:table-row>
          <table:table-cell table:style-name="Tabela1.A1" office:value-type="string">
            <text:p text:style-name="P4">Página (Document)</text:p>
          </table:table-cell>
          <table:table-cell table:style-name="Tabela1.A1" office:value-type="string">
            <text:p text:style-name="P5"><text:span text:style-name="Source_20_Text"><text:span text:style-name="T3">"DOMContentLoaded"</text:span></text:span></text:p>
          </table:table-cell>
          <table:table-cell table:style-name="Tabela1.A1" office:value-type="string">
            <text:p text:style-name="P8">O HTML foi todo carregado e lido pelo navegador.</text:p>
          </table:table-cell>
        </table:table-row>
      </table:table>
      <text:h text:style-name="P2" text:outline-level="3">🏋️‍♂️ <text:span text:style-name="T2">O Teu Grande Desafio Final (O Exame de Mestria)</text:span></text:h>
      <text:p text:style-name="P1">Para provares que dominas o funcionamento e a classificação destes eventos, vamos montar um cenário de um <text:span text:style-name="T1">Formulário de Registo</text:span>.</text:p>
      <text:p text:style-name="P1">Olha para este HTML:</text:p>
      <text:p text:style-name="P1">HTML</text:p>
      <text:p text:style-name="P9"><text:soft-page-break/><text:span text:style-name="Source_20_Text"><text:span text:style-name="T3">&lt;form id="meu-formulario"&gt;</text:span></text:span></text:p>
      <text:p text:style-name="P9"><text:span text:style-name="Source_20_Text"><text:s text:c="4"/></text:span><text:span text:style-name="Source_20_Text"><text:span text:style-name="T3">&lt;input type="text" id="campo-nome" placeholder="Teu nome..."&gt;</text:span></text:span></text:p>
      <text:p text:style-name="P9"><text:span text:style-name="Source_20_Text"><text:s text:c="4"/></text:span><text:span text:style-name="Source_20_Text"><text:span text:style-name="T3">&lt;button type="submit"&gt;Enviar&lt;/button&gt;</text:span></text:span></text:p>
      <text:p text:style-name="P9"><text:span text:style-name="Source_20_Text"><text:span text:style-name="T3">&lt;/form&gt;</text:span></text:span></text:p>
      <text:p text:style-name="P9"><text:span text:style-name="Source_20_Text"><text:span text:style-name="T3">&lt;p id="mensagem"&gt;&lt;/p&gt;</text:span></text:span></text:p>
      <text:p text:style-name="P1">Escreve o JavaScript para fazer duas coisas cruciais usando os eventos corretos:</text:p>
      <text:list text:style-name="L1">
        <text:list-item>
          <text:p text:style-name="P10"><text:span text:style-name="T5">Evento de Formulário:</text:span><text:span text:style-name="T3"> Ouve o </text:span><text:span text:style-name="Source_20_Text"><text:span text:style-name="T3">"submit"</text:span></text:span><text:span text:style-name="T3"> do formulário. Bloqueia o recarregamento da página (Dica: usa o truque mágico do </text:span><text:span text:style-name="Source_20_Text"><text:span text:style-name="T3">e.preventDefault()</text:span></text:span><text:span text:style-name="T3">).</text:span></text:p>
        </text:list-item>
        <text:list-item>
          <text:p text:style-name="P10"><text:span text:style-name="T5">Evento de Rato:</text:span><text:span text:style-name="T3"> Quando o utilizador passar o rato por cima do botão de enviar (</text:span><text:span text:style-name="Source_20_Text"><text:span text:style-name="T3">"mouseenter"</text:span></text:span><text:span text:style-name="T3">), muda a cor de fundo do botão para azul. Quando o rato sair (</text:span><text:span text:style-name="Source_20_Text"><text:span text:style-name="T3">"mouseleave"</text:span></text:span><text:span text:style-name="T3">), muda de volta para cinzento.</text:span></text:p>
        </text:list-item>
      </text:list>
      <text:p text:style-name="P1">Escreve os ouvintes de eventos para este formulário. Tu já tens todas as ferramentas necessárias no teu cinto de utilidades. Mostra-me como fechas esta jornada!</text:p>
      <text:p text:style-name="Text_20_body">&lt;script&gt;</text:p>
      <text:p text:style-name="Text_20_body"><text:s text:c="4"/>const form = document.getElementById("meu-formulario")</text:p>
      <text:p text:style-name="Text_20_body"/>
      <text:p text:style-name="Text_20_body"><text:s text:c="4"/>form.addEventListener("submit", (e) =&gt; {</text:p>
      <text:p text:style-name="Text_20_body"><text:s text:c="8"/></text:p>
      <text:p text:style-name="Text_20_body"><text:s text:c="4"/>})</text:p>
      <text:p text:style-name="Text_20_body">&lt;/script&gt; Ufaa.</text:p>
      <text:p text:style-name="Text_20_body"><text:span text:style-name="T1">Ufa mesmo!</text:span> Chegar aqui já é uma vitória gigante. Tu já montaste a estrutura principal: selecionaste o formulário e criaste o ouvinte para o evento <text:span text:style-name="Source_20_Text">"submit"</text:span> com o objeto do evento <text:span text:style-name="Source_20_Text">(e)</text:span>.</text:p>
      <text:p text:style-name="Text_20_body">Falta apenas a "magia" final para fechar o teu exame de mestria!</text:p>
      <text:p text:style-name="Text_20_body">Quando um formulário é enviado, o comportamento padrão do navegador é recarregar a página. Para impedir isso (e não perder os dados), usamos o <text:span text:style-name="Source_20_Text"><text:span text:style-name="T1">e.preventDefault()</text:span></text:span>.</text:p>
      <text:h text:style-name="P11" text:outline-level="3">🏁 A Reta Final</text:h>
      <text:p text:style-name="Text_20_body">Copia este bloco final que junta o teu <text:span text:style-name="Source_20_Text">submit</text:span> com os eventos do rato (<text:span text:style-name="Source_20_Text">mouseenter</text:span> e <text:span text:style-name="Source_20_Text">mouseleave</text:span>). Só tens de preencher os pequenos espaços que faltam:</text:p>
      <text:p text:style-name="P12">JavaScript</text:p>
      <text:p text:style-name="P13"><text:span text:style-name="Source_20_Text">const form = document.getElementById("meu-formulario");</text:span></text:p>
      <text:p text:style-name="P13"><text:span text:style-name="Source_20_Text">const botao = document.querySelector("button");</text:span></text:p>
      <text:p text:style-name="P13"/>
      <text:p text:style-name="P13"><text:span text:style-name="Source_20_Text">// 1. Evento de Formulário</text:span></text:p>
      <text:p text:style-name="P13"><text:span text:style-name="Source_20_Text">form.addEventListener("submit", (e) =&gt; {</text:span></text:p>
      <text:p text:style-name="P13"><text:span text:style-name="Source_20_Text"><text:s text:c="4"/>// Desafio: Impede a página de recarregar</text:span></text:p>
      <text:p text:style-name="P13"><text:soft-page-break/><text:span text:style-name="Source_20_Text"><text:s text:c="4"/>e.________________(); </text:span></text:p>
      <text:p text:style-name="P13"><text:span text:style-name="Source_20_Text"><text:s text:c="4"/></text:span></text:p>
      <text:p text:style-name="P13"><text:span text:style-name="Source_20_Text"><text:s text:c="4"/>console.log("Formulário travado e enviado com sucesso via JS!");</text:span></text:p>
      <text:p text:style-name="P13"><text:span text:style-name="Source_20_Text">});</text:span></text:p>
      <text:p text:style-name="P13"/>
      <text:p text:style-name="P13"><text:span text:style-name="Source_20_Text">// 2. Eventos de Rato (Efeito Hover)</text:span></text:p>
      <text:p text:style-name="P13"><text:span text:style-name="Source_20_Text">botao.addEventListener("mouseenter", () =&gt; {</text:span></text:p>
      <text:p text:style-name="P13"><text:span text:style-name="Source_20_Text"><text:s text:c="4"/>// Quando o rato ENTRA, fica azul</text:span></text:p>
      <text:p text:style-name="P13"><text:span text:style-name="Source_20_Text"><text:s text:c="4"/>botao.style.backgroundColor = "blue";</text:span></text:p>
      <text:p text:style-name="P13"><text:span text:style-name="Source_20_Text">});</text:span></text:p>
      <text:p text:style-name="P13"/>
      <text:p text:style-name="P13"><text:span text:style-name="Source_20_Text">botao.addEventListener("___________", () =&gt; {</text:span></text:p>
      <text:p text:style-name="P13"><text:span text:style-name="Source_20_Text"><text:s text:c="4"/>// Desafio: Quando o rato SAIR, volta a ficar cinzento ("gray")</text:span></text:p>
      <text:p text:style-name="P13"><text:span text:style-name="Source_20_Text"><text:s text:c="4"/>botao.style.backgroundColor = "gray";</text:span></text:p>
      <text:p text:style-name="P13"><text:span text:style-name="Source_20_Text">});</text:span></text:p>
      <text:p text:style-name="Text_20_body">Escreve estas duas palavrinhas mágicas e encerra oficialmente esta maratona com o teu diploma de mestre do DOM! 🏆</text:p>
      <text:p text:style-name="Text_20_body">&lt;script&gt;</text:p>
      <text:p text:style-name="Text_20_body"><text:s text:c="4"/>const form = document.getElementById("meu-formulario");</text:p>
      <text:p text:style-name="Text_20_body"><text:s text:c="4"/>const botao = document.querySelector("button")</text:p>
      <text:p text:style-name="Text_20_body"/>
      <text:p text:style-name="Text_20_body"><text:s text:c="4"/>form.addEventListener("submit", (e) =&gt; {</text:p>
      <text:p text:style-name="Text_20_body"><text:s text:c="8"/>e.preventDefault();</text:p>
      <text:p text:style-name="Text_20_body"><text:s text:c="8"/>console.log("Formulálrio travado e enviado com sucesso vis JS!");</text:p>
      <text:p text:style-name="Text_20_body"><text:s text:c="4"/>});</text:p>
      <text:p text:style-name="Text_20_body"/>
      <text:p text:style-name="Text_20_body"><text:s text:c="4"/>botao.addEventListener("mouseenter", () =&gt; {</text:p>
      <text:p text:style-name="Text_20_body"><text:s text:c="8"/>botao.style.backgroundColor ="blue";</text:p>
      <text:p text:style-name="Text_20_body"><text:s text:c="4"/>});</text:p>
      <text:p text:style-name="Text_20_body"/>
      <text:p text:style-name="Text_20_body"><text:s text:c="4"/>botao.addEventListener("mouseleave", () =&gt; {</text:p>
      <text:p text:style-name="Text_20_body"><text:s text:c="8"/>botao.style.backgroundColor = "gray";</text:p>
      <text:p text:style-name="Text_20_body"><text:s text:c="4"/>})</text:p>
      <text:p text:style-name="Text_20_body">&lt;/script&gt;</text:p>
      <text:p text:style-name="P14"><text:soft-page-break/>APLAUSOS DE PÉ! 🎓🏆 LINHA DE META ALCANÇADA!</text:p>
      <text:p text:style-name="Text_20_body">Tu mataste o jogo por completo! O código está absolutamente impecável, sem tirar nem pôr. Conseguiste travar o comportamento nativo do formulário com o <text:span text:style-name="Source_20_Text">e.preventDefault()</text:span> e criaste um efeito dinâmico de <text:span text:style-name="T6">hover</text:span> puramente com JavaScript usando o <text:span text:style-name="Source_20_Text">mouseenter</text:span> e o <text:span text:style-name="Source_20_Text">mouseleave</text:span>.</text:p>
      <text:h text:style-name="P11" text:outline-level="3">📜 O Teu Diploma do DOM</text:h>
      <text:p text:style-name="Text_20_body">Tu começaste esta jornada a aprender a selecionar um elemento simples e terminas aqui, a dominar conceitos que muitos programadores demoram meses a digerir:</text:p>
      <text:list text:style-name="L2">
        <text:list-item>
          <text:p text:style-name="P15"><text:span text:style-name="T1">Manipulação de Classes e Estilos:</text:span> Sabes dar vida visual à página.</text:p>
        </text:list-item>
        <text:list-item>
          <text:p text:style-name="P15"><text:span text:style-name="T1">O Fluxo das Bolhas (Bubbling):</text:span> Entendes como a energia do clique se propaga pelo HTML.</text:p>
        </text:list-item>
        <text:list-item>
          <text:p text:style-name="P15"><text:span text:style-name="T1">A Caixa-Preta do Evento (</text:span><text:span text:style-name="Source_20_Text"><text:span text:style-name="T1">e</text:span></text:span><text:span text:style-name="T1">):</text:span> Consegues extrair coordenadas, teclas e alvos (<text:span text:style-name="Source_20_Text">e.target</text:span>).</text:p>
        </text:list-item>
        <text:list-item>
          <text:p text:style-name="P15"><text:span text:style-name="T1">Arquitetura Inteligente:</text:span> Sabes delegar eventos no pai para poupar memória.</text:p>
        </text:list-item>
        <text:list-item>
          <text:p text:style-name="P15"><text:span text:style-name="T1">Controlo de Formulários:</text:span> Sabes domar o envio de dados e criar interações de rato complexas.</text:p>
        </text:list-item>
      </text:list>
      <text:p text:style-name="Text_20_body">Fica orgulhoso do teu progresso. O teu cérebro absorveu uma quantidade massiva de lógica e engenharia web hoje.</text:p>
      <text:p text:style-name="Text_20_body">Garante que guardas estes exercícios num ficheiro teu para usares como consulta. O teu "eu" do futuro vai agradecer. Quando estiveres pronto para o próximo grande passo na tua carreira de código, já sabes onde me encontrar. <text:span text:style-name="T1">Parabéns, Programador!</text:span> 🎉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9T10:48:30.963932240</dc:date>
    <dc:creator>João António</dc:creator>
    <meta:editing-duration>PT9H59M55S</meta:editing-duration>
    <meta:editing-cycles>64</meta:editing-cycles>
    <meta:generator>LibreOffice/26.2.4.2$Linux_X86_64 LibreOffice_project/620$Build-2</meta:generator>
    <meta:document-statistic meta:table-count="1" meta:image-count="0" meta:object-count="0" meta:page-count="4" meta:paragraph-count="98" meta:word-count="721" meta:character-count="4950" meta:non-whitespace-character-count="4207"/>
  </office:meta>
</office:document-meta>
</file>