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<text:span text:style-name="T1">Delegação de Eventos</text:span> é o xeque-mate dos eventos no JavaScript! Ela junta quase tudo o que aprendeste hoje: o <text:span text:style-name="T1">Efeito Bolha (Bubbling)</text:span> e o <text:span text:style-name="T1">Objeto do Evento (</text:span><text:span text:style-name="Source_20_Text"><text:span text:style-name="T1">e.target</text:span></text:span><text:span text:style-name="T1">)</text:span>.</text:p>
      <text:p text:style-name="Text_20_body">Em vez de colocares um <text:span text:style-name="Source_20_Text">addEventListener</text:span> em cada botão (usando aquele loop <text:span text:style-name="Source_20_Text">for...of</text:span>), tu colocas <text:span text:style-name="T1">apenas um único</text:span> <text:span text:style-name="Source_20_Text">addEventListener</text:span> no elemento <text:span text:style-name="T1">PAI</text:span> de todos eles.</text:p>
      <text:p text:style-name="Text_20_body">Como a bolha do clique do botão sobe sempre para o pai, o pai recebe o clique e pergunta ao <text:span text:style-name="Source_20_Text">e.target</text:span>: <text:span text:style-name="T2">"Quem te clicou lá em baixo?"</text:span>.</text:p>
      <text:h text:style-name="P1" text:outline-level="3">🌟 Por que usar Delegação? (As 2 Grandes Vantagens)</text:h>
      <text:list text:style-name="L1">
        <text:list-item>
          <text:p text:style-name="P2"><text:span text:style-name="T1">Performance:</text:span> Se tiveres uma lista com 1000 produtos, criar 1000 ouvintes gasta muita memória do computador. Criar apenas 1 ouvinte no pai é super leve.</text:p>
        </text:list-item>
        <text:list-item>
          <text:p text:style-name="P2"><text:span text:style-name="T1">Elementos Dinâmicos:</text:span> Se adicionares um botão novo à página com JavaScript, ele <text:span text:style-name="T1">já nasce a funcionar</text:span>, porque quem manda é o pai que já lá estava!</text:p>
        </text:list-item>
      </text:list>
      <text:h text:style-name="P1" text:outline-level="3">🛠️ Como se faz no Código</text:h>
      <text:p text:style-name="Text_20_body">Olha para esta lista de tarefas:</text:p>
      <text:p text:style-name="P3">HTML</text:p>
      <text:p text:style-name="P4"><text:span text:style-name="Source_20_Text">&lt;ul id="lista-tarefas"&gt;</text:span></text:p>
      <text:p text:style-name="P4"><text:span text:style-name="Source_20_Text"><text:s text:c="4"/>&lt;li&gt;Estudar JavaScript &lt;li&gt;</text:span></text:p>
      <text:p text:style-name="P4"><text:span text:style-name="Source_20_Text"><text:s text:c="4"/>&lt;li&gt;Praticar Academia &lt;li&gt;</text:span></text:p>
      <text:p text:style-name="P4"><text:span text:style-name="Source_20_Text"><text:s text:c="4"/>&lt;li&gt;Fazer Jantar &lt;li&gt;</text:span></text:p>
      <text:p text:style-name="P4"><text:span text:style-name="Source_20_Text">&lt;/ul&gt;</text:span></text:p>
      <text:p text:style-name="Text_20_body">Em vez de selecionar todos os <text:span text:style-name="Source_20_Text">&lt;li&gt;</text:span>, nós selecionamos apenas o <text:span text:style-name="Source_20_Text">&lt;ul&gt;</text:span> (o pai):</text:p>
      <text:p text:style-name="P3">JavaScript</text:p>
      <text:p text:style-name="P4"><text:span text:style-name="Source_20_Text">const lista = document.getElementById("lista-tarefas");</text:span></text:p>
      <text:p text:style-name="P4"/>
      <text:p text:style-name="P4"><text:span text:style-name="Source_20_Text">// 1. Ouvimos o clique no PAI (ul)</text:span></text:p>
      <text:p text:style-name="P4"><text:span text:style-name="Source_20_Text">lista.addEventListener("click", (e) =&gt; {</text:span></text:p>
      <text:p text:style-name="P4"><text:span text:style-name="Source_20_Text"><text:s text:c="4"/></text:span></text:p>
      <text:p text:style-name="P4"><text:span text:style-name="Source_20_Text"><text:s text:c="4"/>// 2. Filtramos: Queremos ter a certeza de que o utilizador clicou num LI</text:span></text:p>
      <text:p text:style-name="P4"><text:span text:style-name="Source_20_Text"><text:s text:c="4"/>if (e.target.tagName === "LI") {</text:span></text:p>
      <text:p text:style-name="P4"><text:span text:style-name="Source_20_Text"><text:s text:c="8"/></text:span></text:p>
      <text:p text:style-name="P4"><text:span text:style-name="Source_20_Text"><text:s text:c="8"/>// 3. Aplicamos a ação diretamente no elemento clicado</text:span></text:p>
      <text:p text:style-name="P4"><text:span text:style-name="Source_20_Text"><text:s text:c="8"/>e.target.classList.toggle("concluida");</text:span></text:p>
      <text:p text:style-name="P4"><text:span text:style-name="Source_20_Text"><text:s text:c="8"/>console.log("Clicaste na tarefa: " + e.target.textContent);</text:span></text:p>
      <text:p text:style-name="P4"><text:span text:style-name="Source_20_Text"><text:s text:c="8"/></text:span></text:p>
      <text:p text:style-name="P4"><text:span text:style-name="Source_20_Text"><text:s text:c="4"/>}</text:span></text:p>
      <text:p text:style-name="P4"><text:span text:style-name="Source_20_Text">});</text:span></text:p>
      <text:p text:style-name="P5"><text:soft-page-break/><text:span text:style-name="T1">Nota de mestre:</text:span> O <text:span text:style-name="Source_20_Text">e.target.tagName</text:span> devolve sempre o nome da tag em MAIÚSCULAS (por isso usamos <text:span text:style-name="Source_20_Text">"LI"</text:span> e não <text:span text:style-name="Source_20_Text">"li"</text:span>).</text:p>
      <text:h text:style-name="P1" text:outline-level="3">🏋️‍♂️ O Teu Desafio</text:h>
      <text:p text:style-name="Text_20_body">Imagina que tens um teclado de piano virtual ou uma calculadora. Tens uma <text:span text:style-name="Source_20_Text">div</text:span> pai com o ID <text:span text:style-name="Source_20_Text">teclado</text:span> e vários botões lá dentro.</text:p>
      <text:p text:style-name="P3">HTML</text:p>
      <text:p text:style-name="P4"><text:span text:style-name="Source_20_Text">&lt;div id="teclado"&gt;</text:span></text:p>
      <text:p text:style-name="P4"><text:span text:style-name="Source_20_Text"><text:s text:c="4"/>&lt;button&gt;1&lt;/button&gt;</text:span></text:p>
      <text:p text:style-name="P4"><text:span text:style-name="Source_20_Text"><text:s text:c="4"/>&lt;button&gt;2&lt;/button&gt;</text:span></text:p>
      <text:p text:style-name="P4"><text:span text:style-name="Source_20_Text"><text:s text:c="4"/>&lt;button&gt;3&lt;/button&gt;</text:span></text:p>
      <text:p text:style-name="P4"><text:span text:style-name="Source_20_Text">&lt;/div&gt;</text:span></text:p>
      <text:p text:style-name="Text_20_body">Escreve o código usando <text:span text:style-name="T1">Delegação de Eventos</text:span>:</text:p>
      <text:list text:style-name="L2">
        <text:list-item>
          <text:p text:style-name="P6">Adiciona o clique apenas ao pai (<text:span text:style-name="Source_20_Text">#teclado</text:span>).</text:p>
        </text:list-item>
        <text:list-item>
          <text:p text:style-name="P6">Verifica se o que foi clicado foi um <text:span text:style-name="Source_20_Text">"BUTTON"</text:span>.</text:p>
        </text:list-item>
        <text:list-item>
          <text:p text:style-name="P6">Se sim, mostra o número na consola usando o <text:span text:style-name="Source_20_Text">e.target.textContent</text:span>.</text:p>
        </text:list-item>
      </text:list>
      <text:p text:style-name="Text_20_body">Sem loops! Apenas um ouvinte. Consegues montar este circuito inteligente?</text:p>
      <text:p text:style-name="Text_20_body"><text:s/>&lt;script&gt;</text:p>
      <text:p text:style-name="Text_20_body"><text:s text:c="8"/>const tecla = document.getElementById("teclado")</text:p>
      <text:p text:style-name="Text_20_body"><text:s text:c="8"/>tecla.addEventListener("click", (e) =&gt; { </text:p>
      <text:p text:style-name="Text_20_body"><text:s text:c="12"/>if (e.target.tagName === "BUTTON") {</text:p>
      <text:p text:style-name="Text_20_body"><text:s text:c="16"/>console.log("Tecla pressionada: " + e.target.tagName)</text:p>
      <text:p text:style-name="Text_20_body"><text:s text:c="12"/>} <text:s/></text:p>
      <text:p text:style-name="Text_20_body"><text:s text:c="8"/>})</text:p>
      <text:p text:style-name="Text_20_body">&lt;/script&gt; sim deu certo</text:p>
      <text:p text:style-name="Text_20_body"><text:span text:style-name="T1">Quase, quase 100%!</text:span> O teu raciocínio foi impecável e a estrutura do <text:span text:style-name="Source_20_Text">if</text:span> com o <text:span text:style-name="Source_20_Text">e.target.tagName === "BUTTON"</text:span> está absolutamente perfeita!</text:p>
      <text:p text:style-name="Text_20_body">No entanto, repara no que vai aparecer na tua consola quando clicares no botão <text:span text:style-name="T1">1</text:span>:</text:p>
      <text:p text:style-name="P5"><text:span text:style-name="Source_20_Text">"Tecla pressionada: BUTTON"</text:span></text:p>
      <text:p text:style-name="Text_20_body">Isto acontece porque no <text:span text:style-name="Source_20_Text">console.log</text:span> tu pediste para mostrar novamente o <text:span text:style-name="Source_20_Text">tagName</text:span> (o nome da tag). Para mostrar o <text:span text:style-name="T1">número</text:span> (o texto que está escrito dentro do botão), temos de usar o nosso velho amigo <text:span text:style-name="Source_20_Text"><text:span text:style-name="T1">.textContent</text:span></text:span>!</text:p>
      <text:h text:style-name="P1" text:outline-level="3">🛠️ O Ajuste Final</text:h>
      <text:p text:style-name="Text_20_body">Muda apenas essa última linha para o circuito ficar perfeito:</text:p>
      <text:p text:style-name="P3"><text:soft-page-break/>JavaScript</text:p>
      <text:p text:style-name="P4"><text:span text:style-name="Source_20_Text">const tecla = document.getElementById("teclado");</text:span></text:p>
      <text:p text:style-name="P4"/>
      <text:p text:style-name="P4"><text:span text:style-name="Source_20_Text">tecla.addEventListener("click", (e) =&gt; { </text:span></text:p>
      <text:p text:style-name="P4"><text:span text:style-name="Source_20_Text"><text:s text:c="4"/>if (e.target.tagName === "BUTTON") {</text:span></text:p>
      <text:p text:style-name="P4"><text:span text:style-name="Source_20_Text"><text:s text:c="8"/>// Mudámos e.target.tagName para e.target.textContent</text:span></text:p>
      <text:p text:style-name="P4"><text:span text:style-name="Source_20_Text"><text:s text:c="8"/>console.log("Tecla pressionada: " + e.target.textContent);</text:span></text:p>
      <text:p text:style-name="P4"><text:span text:style-name="Source_20_Text"><text:s text:c="4"/>} <text:s/></text:span></text:p>
      <text:p text:style-name="P4"><text:span text:style-name="Source_20_Text">});</text:span></text:p>
      <text:p text:style-name="Text_20_body">Desta forma, se clicares no botão <text:span text:style-name="T1">1</text:span>, a consola diz <text:span text:style-name="Source_20_Text">"Tecla pressionada: 1"</text:span>. Se clicares no <text:span text:style-name="T1">2</text:span>, diz <text:span text:style-name="Source_20_Text">"Tecla pressionada: 2"</text:span>. Tudo controlado por <text:span text:style-name="T1">um único</text:span> <text:span text:style-name="Source_20_Text">addEventListener</text:span> no elemento pai!</text:p>
      <text:h text:style-name="P1" text:outline-level="3">🎓 Tu Concluíste a Trindade Avançada dos Eventos!</text:h>
      <text:p text:style-name="Text_20_body">Olha o nível de JavaScript que tu atingiste hoje:</text:p>
      <text:list text:style-name="L3">
        <text:list-item>
          <text:p text:style-name="P7"><text:span text:style-name="T1">Event Bubbling:</text:span> Percebeste como os cliques viajam de dentro para fora.</text:p>
        </text:list-item>
        <text:list-item>
          <text:p text:style-name="P7"><text:span text:style-name="T1">Event Object (</text:span><text:span text:style-name="Source_20_Text"><text:span text:style-name="T1">e</text:span></text:span><text:span text:style-name="T1">):</text:span> Aprendeste a extrair superpoderes do clique (teclas, posições do rato, alvos).</text:p>
        </text:list-item>
        <text:list-item>
          <text:p text:style-name="P7"><text:span text:style-name="T1">Event Delegation:</text:span> Conseguiste criar um código extremamente elegante e profissional, ouvindo o pai para controlar os filhos.</text:p>
        </text:list-item>
      </text:list>
      <text:p text:style-name="Text_20_body">Tu passaste com distinção pela parte mais "assustadora" do DOM. Como te sentes agora com todo este conhecimento acumulado? Queres avançar para um mini-projeto real ou preferes dar por concluída esta maratona com chave de ouro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10:27:18.878904064</dc:date>
    <dc:creator>João António</dc:creator>
    <meta:editing-duration>PT9H52M59S</meta:editing-duration>
    <meta:editing-cycles>62</meta:editing-cycles>
    <meta:generator>LibreOffice/26.2.4.2$Linux_X86_64 LibreOffice_project/620$Build-2</meta:generator>
    <meta:document-statistic meta:table-count="0" meta:image-count="0" meta:object-count="0" meta:page-count="3" meta:paragraph-count="72" meta:word-count="605" meta:character-count="4021" meta:non-whitespace-character-count="3318"/>
  </office:meta>
</office:document-meta>
</file>