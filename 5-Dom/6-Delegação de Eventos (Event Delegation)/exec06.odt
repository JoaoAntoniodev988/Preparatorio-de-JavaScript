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top="0cm" fo:margin-bottom="0.247cm" style:contextual-spacing="false" fo:line-height="115%"/>
    </style:style>
    <style:style style:name="P5" style:family="paragraph" style:parent-style-name="Quotations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2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 <text:span text:style-name="T1">Delegação de Eventos</text:span> é o xeque-mate dos eventos no JavaScript! Ela junta quase tudo o que aprendeste hoje: o <text:span text:style-name="T1">Efeito Bolha (Bubbling)</text:span> e o <text:span text:style-name="T1">Objeto do Evento (</text:span><text:span text:style-name="Source_20_Text"><text:span text:style-name="T1">e.target</text:span></text:span><text:span text:style-name="T1">)</text:span>.</text:p>
      <text:p text:style-name="Text_20_body">Em vez de colocares um <text:span text:style-name="Source_20_Text">addEventListener</text:span> em cada botão (usando aquele loop <text:span text:style-name="Source_20_Text">for...of</text:span>), tu colocas <text:span text:style-name="T1">apenas um único</text:span> <text:span text:style-name="Source_20_Text">addEventListener</text:span> no elemento <text:span text:style-name="T1">PAI</text:span> de todos eles.</text:p>
      <text:p text:style-name="Text_20_body">Como a bolha do clique do botão sobe sempre para o pai, o pai recebe o clique e pergunta ao <text:span text:style-name="Source_20_Text">e.target</text:span>: <text:span text:style-name="T2">"Quem te clicou lá em baixo?"</text:span>.</text:p>
      <text:h text:style-name="P1" text:outline-level="3">🌟 Por que usar Delegação? (As 2 Grandes Vantagens)</text:h>
      <text:list text:style-name="L1">
        <text:list-item>
          <text:p text:style-name="P2"><text:span text:style-name="T1">Performance:</text:span> Se tiveres uma lista com 1000 produtos, criar 1000 ouvintes gasta muita memória do computador. Criar apenas 1 ouvinte no pai é super leve.</text:p>
        </text:list-item>
        <text:list-item>
          <text:p text:style-name="P2"><text:span text:style-name="T1">Elementos Dinâmicos:</text:span> Se adicionares um botão novo à página com JavaScript, ele <text:span text:style-name="T1">já nasce a funcionar</text:span>, porque quem manda é o pai que já lá estava!</text:p>
        </text:list-item>
      </text:list>
      <text:h text:style-name="P1" text:outline-level="3">🛠️ Como se faz no Código</text:h>
      <text:p text:style-name="Text_20_body">Olha para esta lista de tarefas:</text:p>
      <text:p text:style-name="P3">HTML</text:p>
      <text:p text:style-name="P4"><text:span text:style-name="Source_20_Text">&lt;ul id="lista-tarefas"&gt;</text:span></text:p>
      <text:p text:style-name="P4"><text:span text:style-name="Source_20_Text"><text:s text:c="4"/>&lt;li&gt;Estudar JavaScript &lt;li&gt;</text:span></text:p>
      <text:p text:style-name="P4"><text:span text:style-name="Source_20_Text"><text:s text:c="4"/>&lt;li&gt;Praticar Academia &lt;li&gt;</text:span></text:p>
      <text:p text:style-name="P4"><text:span text:style-name="Source_20_Text"><text:s text:c="4"/>&lt;li&gt;Fazer Jantar &lt;li&gt;</text:span></text:p>
      <text:p text:style-name="P4"><text:span text:style-name="Source_20_Text">&lt;/ul&gt;</text:span></text:p>
      <text:p text:style-name="Text_20_body">Em vez de selecionar todos os <text:span text:style-name="Source_20_Text">&lt;li&gt;</text:span>, nós selecionamos apenas o <text:span text:style-name="Source_20_Text">&lt;ul&gt;</text:span> (o pai):</text:p>
      <text:p text:style-name="P3">JavaScript</text:p>
      <text:p text:style-name="P4"><text:span text:style-name="Source_20_Text">const lista = document.getElementById("lista-tarefas");</text:span></text:p>
      <text:p text:style-name="P4"/>
      <text:p text:style-name="P4"><text:span text:style-name="Source_20_Text">// 1. Ouvimos o clique no PAI (ul)</text:span></text:p>
      <text:p text:style-name="P4"><text:span text:style-name="Source_20_Text">lista.addEventListener("click", (e) =&gt; {</text:span></text:p>
      <text:p text:style-name="P4"><text:span text:style-name="Source_20_Text"><text:s text:c="4"/></text:span></text:p>
      <text:p text:style-name="P4"><text:span text:style-name="Source_20_Text"><text:s text:c="4"/>// 2. Filtramos: Queremos ter a certeza de que o utilizador clicou num LI</text:span></text:p>
      <text:p text:style-name="P4"><text:span text:style-name="Source_20_Text"><text:s text:c="4"/>if (e.target.tagName === "LI") {</text:span></text:p>
      <text:p text:style-name="P4"><text:span text:style-name="Source_20_Text"><text:s text:c="8"/></text:span></text:p>
      <text:p text:style-name="P4"><text:span text:style-name="Source_20_Text"><text:s text:c="8"/>// 3. Aplicamos a ação diretamente no elemento clicado</text:span></text:p>
      <text:p text:style-name="P4"><text:span text:style-name="Source_20_Text"><text:s text:c="8"/>e.target.classList.toggle("concluida");</text:span></text:p>
      <text:p text:style-name="P4"><text:span text:style-name="Source_20_Text"><text:s text:c="8"/>console.log("Clicaste na tarefa: " + e.target.textContent);</text:span></text:p>
      <text:p text:style-name="P4"><text:span text:style-name="Source_20_Text"><text:s text:c="8"/></text:span></text:p>
      <text:p text:style-name="P4"><text:span text:style-name="Source_20_Text"><text:s text:c="4"/>}</text:span></text:p>
      <text:p text:style-name="P4"><text:span text:style-name="Source_20_Text">});</text:span></text:p>
      <text:p text:style-name="P5"><text:soft-page-break/><text:span text:style-name="T1">Nota de mestre:</text:span> O <text:span text:style-name="Source_20_Text">e.target.tagName</text:span> devolve sempre o nome da tag em MAIÚSCULAS (por isso usamos <text:span text:style-name="Source_20_Text">"LI"</text:span> e não <text:span text:style-name="Source_20_Text">"li"</text:span>).</text:p>
      <text:h text:style-name="P1" text:outline-level="3">🏋️‍♂️ O Teu Desafio</text:h>
      <text:p text:style-name="Text_20_body">Imagina que tens um teclado de piano virtual ou uma calculadora. Tens uma <text:span text:style-name="Source_20_Text">div</text:span> pai com o ID <text:span text:style-name="Source_20_Text">teclado</text:span> e vários botões lá dentro.</text:p>
      <text:p text:style-name="P3">HTML</text:p>
      <text:p text:style-name="P4"><text:span text:style-name="Source_20_Text">&lt;div id="teclado"&gt;</text:span></text:p>
      <text:p text:style-name="P4"><text:span text:style-name="Source_20_Text"><text:s text:c="4"/>&lt;button&gt;1&lt;/button&gt;</text:span></text:p>
      <text:p text:style-name="P4"><text:span text:style-name="Source_20_Text"><text:s text:c="4"/>&lt;button&gt;2&lt;/button&gt;</text:span></text:p>
      <text:p text:style-name="P4"><text:span text:style-name="Source_20_Text"><text:s text:c="4"/>&lt;button&gt;3&lt;/button&gt;</text:span></text:p>
      <text:p text:style-name="P4"><text:span text:style-name="Source_20_Text">&lt;/div&gt;</text:span></text:p>
      <text:p text:style-name="Text_20_body">Escreve o código usando <text:span text:style-name="T1">Delegação de Eventos</text:span>:</text:p>
      <text:list text:style-name="L2">
        <text:list-item>
          <text:p text:style-name="P6">Adiciona o clique apenas ao pai (<text:span text:style-name="Source_20_Text">#teclado</text:span>).</text:p>
        </text:list-item>
        <text:list-item>
          <text:p text:style-name="P6">Verifica se o que foi clicado foi um <text:span text:style-name="Source_20_Text">"BUTTON"</text:span>.</text:p>
        </text:list-item>
        <text:list-item>
          <text:p text:style-name="P6">Se sim, mostra o número na consola usando o <text:span text:style-name="Source_20_Text">e.target.textContent</text:span>.</text:p>
        </text:list-item>
      </text:list>
      <text:p text:style-name="Text_20_body">Sem loops! Apenas um ouvinte. Consegues montar este circuito inteligente?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9T10:00:06.828149582</dc:date>
    <dc:creator>João António</dc:creator>
    <meta:editing-duration>PT9H39M48S</meta:editing-duration>
    <meta:editing-cycles>61</meta:editing-cycles>
    <meta:generator>LibreOffice/26.2.4.2$Linux_X86_64 LibreOffice_project/620$Build-2</meta:generator>
    <meta:document-statistic meta:table-count="0" meta:image-count="0" meta:object-count="0" meta:page-count="2" meta:paragraph-count="43" meta:word-count="337" meta:character-count="2135" meta:non-whitespace-character-count="1763"/>
  </office:meta>
</office:document-meta>
</file>