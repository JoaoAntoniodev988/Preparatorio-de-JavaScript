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247cm" style:contextual-spacing="false" fo:line-height="115%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Heading_20_4">
      <style:paragraph-properties fo:margin-top="0cm" fo:margin-bottom="0.247cm" style:contextual-spacing="false" fo:line-height="115%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traste num dos tópicos mais fascinantes e "escondidos" do JavaScript! Entender o <text:span text:style-name="T1">Event Bubbling (Propagação)</text:span> e o <text:span text:style-name="T1">Capturing (Captura)</text:span> é o que separa os iniciantes dos verdadeiros programadores seniores.</text:p>
      <text:p text:style-name="Text_20_body">Quando clicas num elemento, tu não estás a clicar apenas nele. Estás a clicar também em todos os elementos que estão por trás dele.</text:p>
      <text:p text:style-name="Text_20_body">Imagina que tens um botão dentro de uma <text:span text:style-name="Source_20_Text">div</text:span>, que por sua vez está dentro do <text:span text:style-name="Source_20_Text">body</text:span>. Se clicares no botão, o clique aconteceu no botão, na div e no body ao mesmo tempo!</text:p>
      <text:p text:style-name="Text_20_body">A forma como o JavaScript lida com isto divide-se em duas fases:</text:p>
      <text:h text:style-name="P1" text:outline-level="3">🌊 1. Event Bubbling (O Efeito Bolha)</text:h>
      <text:p text:style-name="Text_20_body">Esta é a fase <text:span text:style-name="T1">padrão</text:span> do JavaScript. O evento começa no elemento mais profundo que foi clicado (o botão) e <text:span text:style-name="T1">sobe</text:span> como uma bolha de água na piscina, ativando os eventos dos pais até chegar ao topo (<text:span text:style-name="Source_20_Text">window</text:span>).</text:p>
      <text:p text:style-name="Text_20_body">Olha para este HTML:</text:p>
      <text:p text:style-name="P2">HTML</text:p>
      <text:p text:style-name="P3"><text:span text:style-name="Source_20_Text">&lt;div id="pai" style="padding: 20px; background: gray;"&gt;</text:span></text:p>
      <text:p text:style-name="P3"><text:span text:style-name="Source_20_Text"><text:s text:c="4"/>&lt;button id="filho"&gt;Clica em mim!&lt;/button&gt;</text:span></text:p>
      <text:p text:style-name="P3"><text:span text:style-name="Source_20_Text">&lt;/div&gt;</text:span></text:p>
      <text:p text:style-name="Text_20_body">Se tivermos ouvintes de clique nos dois:</text:p>
      <text:p text:style-name="P2">JavaScript</text:p>
      <text:p text:style-name="P3"><text:span text:style-name="Source_20_Text">document.getElementById("pai").addEventListener("click", () =&gt; {</text:span></text:p>
      <text:p text:style-name="P3"><text:span text:style-name="Source_20_Text"><text:s text:c="4"/>console.log("Clique no PAI 👨‍👦");</text:span></text:p>
      <text:p text:style-name="P3"><text:span text:style-name="Source_20_Text">});</text:span></text:p>
      <text:p text:style-name="P3"/>
      <text:p text:style-name="P3"><text:span text:style-name="Source_20_Text">document.getElementById("filho").addEventListener("click", () =&gt; {</text:span></text:p>
      <text:p text:style-name="P3"><text:span text:style-name="Source_20_Text"><text:s text:c="4"/>console.log("Clique no FILHO 👶");</text:span></text:p>
      <text:p text:style-name="P3"><text:span text:style-name="Source_20_Text">});</text:span></text:p>
      <text:p text:style-name="P4">Se clicares no botão (Filho), o que aparece na consola?</text:p>
      <text:list text:style-name="L1">
        <text:list-item>
          <text:p text:style-name="P5"><text:span text:style-name="Source_20_Text">"Clique no FILHO 👶"</text:span> (Primeiro o alvo)</text:p>
        </text:list-item>
        <text:list-item>
          <text:p text:style-name="P5"><text:span text:style-name="Source_20_Text">"Clique no PAI 👨‍👦"</text:span> (A bolha subiu para o pai!)</text:p>
        </text:list-item>
      </text:list>
      <text:h text:style-name="P1" text:outline-level="3">🪂 2. Event Capturing (A Fase de Captura)</text:h>
      <text:p text:style-name="Text_20_body">A captura é o oposto. O evento vem do topo (<text:span text:style-name="Source_20_Text">window</text:span>) e <text:span text:style-name="T1">desce</text:span> até ao elemento que foi clicado.</text:p>
      <text:p text:style-name="Text_20_body">Por padrão, o <text:span text:style-name="Source_20_Text">addEventListener</text:span> ignora esta fase. Para ativá-la, precisamos de passar um <text:span text:style-name="T1">terceiro argumento</text:span> mágico: <text:span text:style-name="Source_20_Text">true</text:span>.</text:p>
      <text:p text:style-name="P6">JavaScript</text:p>
      <text:p text:style-name="P3"><text:soft-page-break/><text:span text:style-name="Source_20_Text">// Com o 'true' no fim, este evento ativa na DESCIDA (Captura)</text:span></text:p>
      <text:p text:style-name="P3"><text:span text:style-name="Source_20_Text">document.getElementById("pai").addEventListener("click", () =&gt; {</text:span></text:p>
      <text:p text:style-name="P3"><text:span text:style-name="Source_20_Text"><text:s text:c="4"/>console.log("Clique no PAI 👨‍👦");</text:span></text:p>
      <text:p text:style-name="P3"><text:span text:style-name="Source_20_Text">}, true); </text:span></text:p>
      <text:p text:style-name="P3"/>
      <text:p text:style-name="P3"><text:span text:style-name="Source_20_Text">document.getElementById("filho").addEventListener("click", () =&gt; {</text:span></text:p>
      <text:p text:style-name="P3"><text:span text:style-name="Source_20_Text"><text:s text:c="4"/>console.log("Clique no FILHO 👶");</text:span></text:p>
      <text:p text:style-name="P3"><text:span text:style-name="Source_20_Text">});</text:span></text:p>
      <text:p text:style-name="P4">Agora, se clicares no botão, a ordem inverte-se:</text:p>
      <text:list text:style-name="L2">
        <text:list-item>
          <text:p text:style-name="P7"><text:span text:style-name="Source_20_Text">"Clique no PAI 👨‍👦"</text:span> (Detetado primeiro na descida)</text:p>
        </text:list-item>
        <text:list-item>
          <text:p text:style-name="P7"><text:span text:style-name="Source_20_Text">"Clique no FILHO 👶"</text:span> (Chegou ao alvo)</text:p>
        </text:list-item>
      </text:list>
      <text:h text:style-name="P1" text:outline-level="3">🛑 Como parar a Bolha? (<text:span text:style-name="Source_20_Text">event.stopPropagation()</text:span>)</text:h>
      <text:p text:style-name="Text_20_body">Às vezes, este efeito de bolha causa problemas. Imagina que tens um botão de "Eliminar" dentro de um cartão clicável. Se clicares em "Eliminar", a bolha sobe e acaba por abrir o cartão também!</text:p>
      <text:p text:style-name="Text_20_body">Para impedir que a bolha suba, usamos o objeto do evento (<text:span text:style-name="Source_20_Text">e</text:span> ou <text:span text:style-name="Source_20_Text">event</text:span>) e o método <text:span text:style-name="Source_20_Text"><text:span text:style-name="T1">e.stopPropagation()</text:span></text:span>:</text:p>
      <text:p text:style-name="P2">JavaScript</text:p>
      <text:p text:style-name="P3"><text:span text:style-name="Source_20_Text">document.getElementById("filho").addEventListener("click", (e) =&gt; {</text:span></text:p>
      <text:p text:style-name="P3"><text:span text:style-name="Source_20_Text"><text:s text:c="4"/>e.stopPropagation(); // ✋ PARA AQUI! A bolha não sobe!</text:span></text:p>
      <text:p text:style-name="P3"><text:span text:style-name="Source_20_Text"><text:s text:c="4"/>console.log("Clique no FILHO 👶");</text:span></text:p>
      <text:p text:style-name="P3"><text:span text:style-name="Source_20_Text">});</text:span></text:p>
      <text:p text:style-name="Text_20_body">Se clicares no filho agora, o pai nunca vai saber!</text:p>
      <text:h text:style-name="P1" text:outline-level="3">🏋️‍♂️ O Desafio do Fluxo</text:h>
      <text:p text:style-name="Text_20_body">Vamos praticar para ver se o conceito encaixou. Olha para este cenário:</text:p>
      <text:p text:style-name="P2">HTML</text:p>
      <text:p text:style-name="P3"><text:span text:style-name="Source_20_Text">&lt;div id="zona-exterior"&gt;</text:span></text:p>
      <text:p text:style-name="P3"><text:span text:style-name="Source_20_Text"><text:s text:c="4"/>&lt;button id="zona-interior"&gt;Botão&lt;/button&gt;</text:span></text:p>
      <text:p text:style-name="P3"><text:span text:style-name="Source_20_Text">&lt;/div&gt;</text:span></text:p>
      <text:p text:style-name="P2">JavaScript</text:p>
      <text:p text:style-name="P3"><text:span text:style-name="Source_20_Text">const exterior = document.getElementById("zona-exterior");</text:span></text:p>
      <text:p text:style-name="P3"><text:span text:style-name="Source_20_Text">const interior = document.getElementById("zona-interior");</text:span></text:p>
      <text:p text:style-name="P3"/>
      <text:p text:style-name="P3"><text:span text:style-name="Source_20_Text">exterior.addEventListener("click", () =&gt; {</text:span></text:p>
      <text:p text:style-name="P3"><text:span text:style-name="Source_20_Text"><text:s text:c="4"/>console.log("Entrou na zona exterior!");</text:span></text:p>
      <text:p text:style-name="P3"><text:soft-page-break/><text:span text:style-name="Source_20_Text">});</text:span></text:p>
      <text:p text:style-name="P3"/>
      <text:p text:style-name="P3"><text:span text:style-name="Source_20_Text">interior.addEventListener("click", () =&gt; {</text:span></text:p>
      <text:p text:style-name="P3"><text:span text:style-name="Source_20_Text"><text:s text:c="4"/>console.log("Entrou na zona interior!");</text:span></text:p>
      <text:p text:style-name="P3"><text:span text:style-name="Source_20_Text">});</text:span></text:p>
      <text:p text:style-name="P4">Responde-me a duas perguntas:</text:p>
      <text:list text:style-name="L3">
        <text:list-item>
          <text:p text:style-name="P8">Se eu clicar diretamente no <text:span text:style-name="T1">Botão (interior)</text:span>, qual será a ordem exata das mensagens na consola devido ao comportamento padrão (Bubbling)?</text:p>
        </text:list-item>
        <text:list-item>
          <text:p text:style-name="P8">O que aconteceria se eu adicionasse <text:span text:style-name="Source_20_Text">e.stopPropagation()</text:span> dentro da função do <text:span text:style-name="Source_20_Text">interior</text:span>?</text:p>
        </text:list-item>
      </text:list>
      <text:p text:style-name="Text_20_body">Vamos ver se consegues prever o comportamento desta bolha!</text:p>
      <text:p text:style-name="Text_20_body">Esse assunto me baralhou todo.</text:p>
      <text:p text:style-name="Text_20_body"><text:span text:style-name="T1">Calma! Respire fundo!</text:span> É perfeitamente normal ficar baralhado aqui. Este é considerado um dos temas mais abstratos do JavaScript. Eu expliquei com muitos termos técnicos, por isso vamos esquecer as palavras difíceis e usar uma imagem muito simples.</text:p>
      <text:p text:style-name="Text_20_body">Imagine que o seu HTML é um <text:span text:style-name="T1">Alvo de Dardos</text:span>.</text:p>
      <text:list text:style-name="L4">
        <text:list-item>
          <text:p text:style-name="P9">O centro do alvo (a mosca) é o seu <text:span text:style-name="T1">Botão</text:span>.</text:p>
        </text:list-item>
        <text:list-item>
          <text:p text:style-name="P9">O círculo à volta é a <text:span text:style-name="T1">Div Pai</text:span>.</text:p>
        </text:list-item>
        <text:list-item>
          <text:p text:style-name="P9">O quadrado exterior é o <text:span text:style-name="T1">Body</text:span>.</text:p>
        </text:list-item>
      </text:list>
      <text:p text:style-name="Text_20_body">Quando você atira um dardo e acerta na mosca (no Botão), você acertou <text:span text:style-name="T1">também</text:span> no círculo maior e no quadrado, certo? O dardo atravessou tudo!</text:p>
      <text:p text:style-name="Text_20_body">O JavaScript precisa de decidir: <text:span text:style-name="T2">"Ok, o utilizador acertou no botão, mas isso também toca na Div e no Body. Em que ordem é que eu aviso os sensores do site?"</text:span></text:p>
      <text:p text:style-name="Text_20_body">Existem apenas duas ordens possíveis:</text:p>
      <text:h text:style-name="P1" text:outline-level="3">🌊 1. De Dentro para Fora (Bubbling / Efeito Bolha)</text:h>
      <text:p text:style-name="Text_20_body">É o comportamento padrão do JavaScript. É como uma bolha a subir na água.</text:p>
      <text:p text:style-name="Text_20_body">Se você clica no botão:</text:p>
      <text:list text:style-name="L5">
        <text:list-item>
          <text:p text:style-name="P10">O sensor do <text:span text:style-name="T1">Botão</text:span> apita primeiro.</text:p>
        </text:list-item>
        <text:list-item>
          <text:p text:style-name="P10">A bolha sobe e o sensor da <text:span text:style-name="T1">Div</text:span> apita a seguir.</text:p>
        </text:list-item>
        <text:list-item>
          <text:p text:style-name="P10">A bolha sobe mais e o sensor do <text:span text:style-name="T1">Body</text:span> apita por fim.</text:p>
        </text:list-item>
      </text:list>
      <text:h text:style-name="P1" text:outline-level="3">🪂 2. De Fora para Dentro (Capturing / Captura)</text:h>
      <text:p text:style-name="Text_20_body">É o oposto. É como um paraquedista a cair do céu.</text:p>
      <text:p text:style-name="Text_20_body">Se você clica no botão:</text:p>
      <text:list text:style-name="L6">
        <text:list-item>
          <text:p text:style-name="P11">O sensor do <text:span text:style-name="T1">Body</text:span> apita primeiro (apanhou o dardo a entrar).</text:p>
        </text:list-item>
        <text:list-item>
          <text:p text:style-name="P11"><text:soft-page-break/>O sensor da <text:span text:style-name="T1">Div</text:span> apita a seguir.</text:p>
        </text:list-item>
        <text:list-item>
          <text:p text:style-name="P11">O sensor do <text:span text:style-name="T1">Botão</text:span> apita em último, quando o dardo finalmente chega ao centro.</text:p>
        </text:list-item>
      </text:list>
      <text:h text:style-name="P1" text:outline-level="3">🛑 O "Para Já!" (<text:span text:style-name="Source_20_Text">e.stopPropagation()</text:span>)</text:h>
      <text:p text:style-name="Text_20_body">Imagine que a bolha começou a subir: o Botão apitou. Mas você <text:span text:style-name="T1">não quer</text:span> que a Div Pai saiba que você clicou no botão.</text:p>
      <text:p text:style-name="Text_20_body">Você mete a mão por cima da bolha e diz: <text:span text:style-name="T1">"Para aqui!"</text:span>. É isso que o <text:span text:style-name="Source_20_Text">e.stopPropagation()</text:span> faz. Ele rebenta a bolha no primeiro elemento, impedindo-a de subir para os pais.</text:p>
      <text:h text:style-name="P1" text:outline-level="3">Vamos testar sem códigos complexos?</text:h>
      <text:p text:style-name="Text_20_body">Imagine que tem um botão de <text:span text:style-name="T1">"Gostar" 👍</text:span> dentro de um <text:span text:style-name="T1">Card de Notícia</text:span> grande. Se você clicar no "Gostar", pelo comportamento padrão (de dentro para fora), o que aconteceria se você não parasse a bolha?</text:p>
      <text:list text:style-name="L7">
        <text:list-item>
          <text:p text:style-name="P12">O botão "Gostar" é ativado.</text:p>
        </text:list-item>
        <text:list-item>
          <text:p text:style-name="P12">A bolha sobe e ativa o clique do Card inteiro (o que abriria a notícia sem você querer!).</text:p>
        </text:list-item>
      </text:list>
      <text:p text:style-name="Text_20_body">Faz um pouco mais de sentido visualizando o dardo a atravessar o alvo?</text:p>
      <text:p text:style-name="Text_20_body">Meu Deus!!!</text:p>
      <text:p text:style-name="Text_20_body">Calma, não entres em pânico! 😅 Fica a saber que 90% dos programadores sentem exatamente o mesmo quando batem de frente com este assunto pela primeira vez. É o "momento de crise" oficial do aprendizado do DOM!</text:p>
      <text:p text:style-name="Text_20_body">Vamos fazer o seguinte: <text:span text:style-name="T1">esquece o Capturing (de fora para dentro)</text:span>. Apaga-o da tua mente por agora. No mundo real, em 99% dos teus projetos, tu <text:span text:style-name="T1">nunca</text:span> vais usar o Capturing. O JavaScript já funciona sozinho no modo <text:span text:style-name="T1">Bubbling (de dentro para fora)</text:span> e isso é o que importa.</text:p>
      <text:p text:style-name="Text_20_body">Foca-te apenas nesta única situação real, que é onde este conceito realmente importa:</text:p>
      <text:h text:style-name="P1" text:outline-level="3">🛒 O Caso Real do Carrinho de Compras</text:h>
      <text:p text:style-name="Text_20_body">Imagina que tens um cartão de um produto no teu site. Se o utilizador clicar no cartão, ele abre a página do produto. Mas dentro desse cartão, há um botão pequeno de <text:span text:style-name="T1">"Adicionar ao Carrinho" 🛒</text:span>.</text:p>
      <text:p text:style-name="P2">HTML</text:p>
      <text:p text:style-name="P3"><text:span text:style-name="Source_20_Text">&lt;div id="cartao-produto"&gt;</text:span></text:p>
      <text:p text:style-name="P3"><text:span text:style-name="Source_20_Text"><text:s text:c="4"/>&lt;h2&gt;Ténis Incrível&lt;/h2&gt; </text:span></text:p>
      <text:p text:style-name="P3"><text:span text:style-name="Source_20_Text"><text:s text:c="4"/></text:span></text:p>
      <text:p text:style-name="P3"><text:span text:style-name="Source_20_Text"><text:s text:c="4"/>&lt;button id="btn-carrinho"&gt;🛒 Adicionar&lt;/button&gt;</text:span></text:p>
      <text:p text:style-name="P3"><text:span text:style-name="Source_20_Text">&lt;/div&gt;</text:span></text:p>
      <text:p text:style-name="Text_20_body"><text:span text:style-name="T1">O Problema (A Bolha):</text:span> Se tu clicares no botão "Adicionar", o JavaScript vai ativar o clique do botão e, logo a seguir, a bolha vai subir e ativar o clique do cartão. Resultado: o produto é adicionado ao carrinho, mas a página muda e o utilizador é levado para a página do produto sem querer! Isso é uma experiência terrível.</text:p>
      <text:p text:style-name="Text_20_body"><text:soft-page-break/><text:span text:style-name="T1">A Solução (</text:span><text:span text:style-name="Source_20_Text"><text:span text:style-name="T1">stopPropagation</text:span></text:span><text:span text:style-name="T1">):</text:span> Tu vais ao botão do carrinho e dizes: <text:span text:style-name="T2">"Olha, quando clicares em mim, adiciona ao carrinho e </text:span><text:span text:style-name="T3">rebenta a bolha aqui</text:span><text:span text:style-name="T2"> para o cartão pai não saber de nada!"</text:span>.</text:p>
      <text:p text:style-name="P2">JavaScript</text:p>
      <text:p text:style-name="P3"><text:span text:style-name="Source_20_Text">const botao = document.getElementById("btn-carrinho");</text:span></text:p>
      <text:p text:style-name="P3"/>
      <text:p text:style-name="P3"><text:span text:style-name="Source_20_Text">// Repara que pomos um "e" dentro dos parênteses da função. </text:span></text:p>
      <text:p text:style-name="P3"><text:span text:style-name="Source_20_Text">// Esse "e" guarda as informações do evento de clique.</text:span></text:p>
      <text:p text:style-name="P3"><text:span text:style-name="Source_20_Text">botao.addEventListener("click", (e) =&gt; {</text:span></text:p>
      <text:p text:style-name="P3"><text:span text:style-name="Source_20_Text"><text:s text:c="4"/></text:span></text:p>
      <text:p text:style-name="P3"><text:span text:style-name="Source_20_Text"><text:s text:c="4"/>e.stopPropagation(); // 🛑 PAROU! A bolha morre aqui.</text:span></text:p>
      <text:p text:style-name="P3"><text:span text:style-name="Source_20_Text"><text:s text:c="4"/></text:span></text:p>
      <text:p text:style-name="P3"><text:span text:style-name="Source_20_Text"><text:s text:c="4"/>console.log("Adicionado ao carrinho com sucesso!");</text:span></text:p>
      <text:p text:style-name="P3"><text:span text:style-name="Source_20_Text">});</text:span></text:p>
      <text:p text:style-name="Text_20_body">Se clicares no botão agora, ele adiciona ao carrinho e o cartão pai fica "surdo", sem receber o clique.</text:p>
      <text:p text:style-name="Text_20_body">Melhorou um bocadinho o batimento cardíaco? Consegues perceber o perigo da "bolha" neste exemplo do carrinho de compras?</text:p>
      <text:p text:style-name="Text_20_body">Sim. Mais eu estou a clicar no botão e o texto <text:s/>que esta dentro do console não esta aparecer ou seja eu clico e não acontece nada no meu navegador.</text:p>
      <text:p text:style-name="Text_20_body">Ah! Esse mistério é facílimo de resolver! Se tu clicas e nada acontece na consola, significa que <text:span text:style-name="T1">o teu circuito elétrico está com algum fio desligado ou partido</text:span>.</text:p>
      <text:p text:style-name="Text_20_body">Há três erros muito comuns que fazem o botão "ficar mudo". Vamos fazer um Double Check no teu código agora mesmo para descobrir qual deles está a acontecer aí:</text:p>
      <text:h text:style-name="P1" text:outline-level="3">🔍 Os 3 Suspeitos Principais</text:h>
      <text:h text:style-name="P13" text:outline-level="4">1. Falta o parâmetro <text:span text:style-name="Source_20_Text">e</text:span> na função</text:h>
      <text:p text:style-name="Text_20_body">Para usares o <text:span text:style-name="Source_20_Text">e.stopPropagation()</text:span>, tu tens de avisar a função de que vais usar o evento, colocando a letra <text:span text:style-name="Source_20_Text">e</text:span> dentro dos primeiros parênteses.</text:p>
      <text:list text:style-name="L8">
        <text:list-item>
          <text:p text:style-name="P14"><text:span text:style-name="T1">Errado:</text:span> <text:span text:style-name="Source_20_Text">() =&gt; { e.stopPropagation(); }</text:span> <text:span text:style-name="T2">(O JavaScript não sabe o que é "e")</text:span></text:p>
        </text:list-item>
        <text:list-item>
          <text:p text:style-name="P14"><text:span text:style-name="T1">Certo:</text:span> <text:span text:style-name="Source_20_Text">(e) =&gt; { e.stopPropagation(); }</text:span></text:p>
        </text:list-item>
      </text:list>
      <text:h text:style-name="P13" text:outline-level="4">2. IDs com nomes diferentes</text:h>
      <text:p text:style-name="Text_20_body">Verifica se o ID que escreveste no HTML é <text:span text:style-name="T1">exatamente igual</text:span> ao que escreveste no <text:span text:style-name="Source_20_Text">getElementById</text:span>. Uma única letra diferente ou uma maiúscula falhada desliga o fio.</text:p>
      <text:list text:style-name="L9">
        <text:list-item>
          <text:p text:style-name="P15">HTML: <text:span text:style-name="Source_20_Text">id="btn-carrinho"</text:span></text:p>
        </text:list-item>
        <text:list-item>
          <text:p text:style-name="P15">JS: <text:span text:style-name="Source_20_Text">getElementById("btn-carrinho")</text:span> <text:span text:style-name="T2">(Tem de ser idêntico!)</text:span></text:p>
        </text:list-item>
      </text:list>
      <text:h text:style-name="P13" text:outline-level="4"><text:soft-page-break/>3. O Script está a correr antes do HTML existir</text:h>
      <text:p text:style-name="Text_20_body">Se o teu código <text:span text:style-name="Source_20_Text">&lt;script&gt;</text:span> estiver no topo do teu ficheiro (dentro do <text:span text:style-name="Source_20_Text">&lt;head&gt;</text:span>), o JavaScript tenta procurar o botão antes de o navegador ter desenhado o botão no ecrã. O JavaScript não encontra nada e o botão fica "nulo".</text:p>
      <text:list text:style-name="L10">
        <text:list-item>
          <text:p text:style-name="P16"><text:span text:style-name="T1">A Solução:</text:span> Garante que o teu <text:span text:style-name="Source_20_Text">&lt;script&gt;</text:span> está mesmo no fim de tudo, <text:span text:style-name="T1">antes de fechar a tag </text:span><text:span text:style-name="Source_20_Text"><text:span text:style-name="T1">&lt;/body&gt;</text:span></text:span>.</text:p>
        </text:list-item>
      </text:list>
      <text:h text:style-name="P1" text:outline-level="3">🛠️ O Teu Código de Teste Infalível</text:h>
      <text:p text:style-name="Text_20_body">Para termos a certeza absoluta de que funciona, apaga o que tens no teu ficheiro e cola <text:span text:style-name="T1">exatamente este código limpo</text:span>. Ele tem o HTML e o JavaScript no lugar certo:</text:p>
      <text:p text:style-name="P2">HTML</text:p>
      <text:p text:style-name="P3"><text:span text:style-name="Source_20_Text">&lt;div id="cartao-produto" style="background: lightgray; padding: 20px;"&gt;</text:span></text:p>
      <text:p text:style-name="P3"><text:span text:style-name="Source_20_Text"><text:s text:c="4"/>&lt;h2&gt;Ténis Incrível&lt;/h2&gt;</text:span></text:p>
      <text:p text:style-name="P3"><text:span text:style-name="Source_20_Text"><text:s text:c="4"/>&lt;button id="btn-carrinho"&gt;🛒 Adicionar&lt;/button&gt;</text:span></text:p>
      <text:p text:style-name="P3"><text:span text:style-name="Source_20_Text">&lt;/div&gt;</text:span></text:p>
      <text:p text:style-name="P3"/>
      <text:p text:style-name="P3"><text:span text:style-name="Source_20_Text">&lt;script&gt;</text:span></text:p>
      <text:p text:style-name="P3"><text:span text:style-name="Source_20_Text"><text:s text:c="4"/>const botao = document.getElementById("btn-carrinho");</text:span></text:p>
      <text:p text:style-name="P3"/>
      <text:p text:style-name="P3"><text:span text:style-name="Source_20_Text"><text:s text:c="4"/>// Repara no (e) aqui nos parênteses!</text:span></text:p>
      <text:p text:style-name="P3"><text:span text:style-name="Source_20_Text"><text:s text:c="4"/>botao.addEventListener("click", (e) =&gt; {</text:span></text:p>
      <text:p text:style-name="P3"><text:span text:style-name="Source_20_Text"><text:s text:c="8"/>e.stopPropagation(); // Trava a bolha aqui</text:span></text:p>
      <text:p text:style-name="P3"><text:span text:style-name="Source_20_Text"><text:s text:c="8"/>console.log("Adicionado ao carrinho com sucesso!");</text:span></text:p>
      <text:p text:style-name="P3"><text:span text:style-name="Source_20_Text"><text:s text:c="4"/>});</text:span></text:p>
      <text:p text:style-name="P3"><text:span text:style-name="Source_20_Text">&lt;/script&gt;</text:span></text:p>
      <text:h text:style-name="P1" text:outline-level="3">💡 Como abrir a Consola Corretamente:</text:h>
      <text:p text:style-name="Text_20_body">Lembra-te que a mensagem não aparece na página, aparece na Consola do Programador!</text:p>
      <text:list text:style-name="L11">
        <text:list-item>
          <text:p text:style-name="P17">No teu navegador, clica com o <text:span text:style-name="T1">botão direito do rato</text:span> em qualquer lugar da página.</text:p>
        </text:list-item>
        <text:list-item>
          <text:p text:style-name="P17">Escolhe <text:span text:style-name="T1">"Inspecionar"</text:span> (ou <text:span text:style-name="T2">Inspect</text:span>).</text:p>
        </text:list-item>
        <text:list-item>
          <text:p text:style-name="P17">Na barra que se vai abrir, clica na aba que diz <text:span text:style-name="T1">"Consola"</text:span> (ou <text:span text:style-name="T2">Console</text:span>).</text:p>
        </text:list-item>
        <text:list-item>
          <text:p text:style-name="P17">Agora clica no botão "🛒 Adicionar" e vê se a frase mágica aparece lá!</text:p>
        </text:list-item>
      </text:list>
      <text:p text:style-name="Text_20_body">Experimenta atualizar o teu ficheiro com este bloco exato. O texto apareceu finalmente na consola?</text:p>
      <text:p text:style-name="Text_20_body">Agora sim esta a funcionar.</text:p>
      <text:p text:style-name="Text_20_body"><text:span text:style-name="T1">Ufa! Que alívio!</text:span> 🎉 Estava a ver que o circuito não ligava, mas afinal o "eletricista" aqui funcionou bem!</text:p>
      <text:p text:style-name="Text_20_body"><text:soft-page-break/>Esse momento em que clicamos e a mensagem finalmente aparece na consola é das melhores sensações na programação. Significa que o teu código JavaScript ganhou vida e está oficialmente a comunicar com o teu HTML.</text:p>
      <text:p text:style-name="Text_20_body">Agora que viste a funcionar, olha novamente para o código:</text:p>
      <text:p text:style-name="P2">JavaScript</text:p>
      <text:p text:style-name="P3"><text:span text:style-name="Source_20_Text">botao.addEventListener("click", (e) =&gt; {</text:span></text:p>
      <text:p text:style-name="P3"><text:span text:style-name="Source_20_Text"><text:s text:c="4"/>e.stopPropagation(); // 🛑 O travão!</text:span></text:p>
      <text:p text:style-name="P3"><text:span text:style-name="Source_20_Text"><text:s text:c="4"/>console.log("Adicionado ao carrinho com sucesso!");</text:span></text:p>
      <text:p text:style-name="P3"><text:span text:style-name="Source_20_Text">});</text:span></text:p>
      <text:p text:style-name="Text_20_body">Aquele <text:span text:style-name="Source_20_Text">e.stopPropagation()</text:span> garantiu que o clique ficasse <text:span text:style-name="T1">preso</text:span> no botão. A bolha tentou subir para a <text:span text:style-name="Source_20_Text">div</text:span> pai, mas bateu numa parede e estourou ali mesmo.</text:p>
      <text:h text:style-name="P1" text:outline-level="3">🏆 Tu Sobreviveste ao Maior Desafio do DOM!</text:h>
      <text:p text:style-name="Text_20_body">Se tu conseguiste entender isto, os teus horizontes no desenvolvimento web acabam de se expandir. Tu já não és um iniciante que apenas copia códigos; tu já entendes como a energia e os eventos se movem por trás do ecrã.</text:p>
      <text:p text:style-name="Text_20_body">Para onde queres levar os teus superpoderes agora?</text:p>
      <text:list text:style-name="L12">
        <text:list-item>
          <text:p text:style-name="P18"><text:span text:style-name="T1">Validar um Formulário:</text:span> Aprender a ouvir o teclado e detetar se o utilizador escreveu um email correto antes de clicar num botão.</text:p>
        </text:list-item>
        <text:list-item>
          <text:p text:style-name="P18"><text:span text:style-name="T1">Mini-Projeto Completo:</text:span> Criar uma lista de tarefas (To-Do List) onde podes adicionar itens e eliminá-los (usando tudo o que aprendeste hoje!)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9T08:36:50.809193039</dc:date>
    <dc:creator>João António</dc:creator>
    <meta:editing-duration>PT8H31M54S</meta:editing-duration>
    <meta:editing-cycles>51</meta:editing-cycles>
    <meta:generator>LibreOffice/26.2.4.2$Linux_X86_64 LibreOffice_project/620$Build-2</meta:generator>
    <meta:document-statistic meta:table-count="0" meta:image-count="0" meta:object-count="0" meta:page-count="7" meta:paragraph-count="171" meta:word-count="1863" meta:character-count="11221" meta:non-whitespace-character-count="9434"/>
  </office:meta>
</office:document-meta>
</file>