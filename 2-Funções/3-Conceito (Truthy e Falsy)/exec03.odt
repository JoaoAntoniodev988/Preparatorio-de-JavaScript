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Text_20_body" style:list-style-name="L1">
      <style:text-properties officeooo:rsid="0016cbdf"/>
    </style:style>
    <style:style style:name="P4" style:family="paragraph" style:parent-style-name="Heading_20_4">
      <style:paragraph-properties fo:margin-top="0cm" fo:margin-bottom="0.247cm" style:contextual-spacing="false" fo:line-height="115%"/>
      <style:text-properties officeooo:rsid="0016cbdf"/>
    </style:style>
    <style:style style:name="P5" style:family="paragraph" style:parent-style-name="Standard">
      <style:text-properties officeooo:rsid="0016cbdf"/>
    </style:style>
    <style:style style:name="P6" style:family="paragraph" style:parent-style-name="Preformatted_20_Text">
      <style:paragraph-properties fo:margin-top="0cm" fo:margin-bottom="0.247cm" style:contextual-spacing="false" fo:line-height="115%"/>
      <style:text-properties officeooo:rsid="0016cbdf"/>
    </style:style>
    <style:style style:name="P7" style:family="paragraph" style:parent-style-name="Heading_20_3">
      <style:paragraph-properties fo:margin-top="0cm" fo:margin-bottom="0.247cm" style:contextual-spacing="false" fo:line-height="115%"/>
      <style:text-properties officeooo:rsid="0016cbdf"/>
    </style:style>
    <style:style style:name="P8" style:family="paragraph" style:parent-style-name="Text_20_body">
      <style:text-properties fo:font-weight="bold" officeooo:rsid="0016cbdf"/>
    </style:style>
    <style:style style:name="P9" style:family="paragraph" style:parent-style-name="Text_20_body" style:list-style-name="L2">
      <style:text-properties officeooo:rsid="0016cbdf"/>
    </style:style>
    <style:style style:name="P10" style:family="paragraph" style:parent-style-name="Text_20_body" style:list-style-name="L3">
      <style:text-properties officeooo:rsid="0016cbdf"/>
    </style:style>
    <style:style style:name="P11" style:family="paragraph" style:parent-style-name="Text_20_body" style:list-style-name="L4">
      <style:text-properties officeooo:rsid="0016cbdf"/>
    </style:style>
    <style:style style:name="P12" style:family="paragraph" style:parent-style-name="Text_20_body" style:list-style-name="L5">
      <style:text-properties officeooo:rsid="0016cbdf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🎭 O Conceito Avançado: Truthy e Falsy</text:span></text:h>
      <text:p text:style-name="P2">No JavaScript, existe um "superpoder" (e uma rasteira clássica) chamado <text:span text:style-name="T1">Truthy</text:span> e <text:span text:style-name="T1">Falsy</text:span>.</text:p>
      <text:p text:style-name="P2">Até agora, nós colocávamos valores explicitamente booleanos (<text:span text:style-name="Source_20_Text">true</text:span> ou <text:span text:style-name="Source_20_Text">false</text:span>) dentro do <text:span text:style-name="Source_20_Text">if</text:span>. Mas no JavaScript, <text:span text:style-name="T1">qualquer tipo de dado</text:span> (um número, um texto, um objeto) pode ser colocado dentro de um <text:span text:style-name="Source_20_Text">if</text:span>, e o JavaScript vai convertê-lo secretamente para verdadeiro ou falso.</text:p>
      <text:list text:style-name="L1">
        <text:list-item>
          <text:p text:style-name="P3"><text:span text:style-name="T1">Falsy:</text:span> Valores que o JavaScript avalia automaticamente como <text:span text:style-name="Source_20_Text">false</text:span>. Só existem <text:span text:style-name="T1">6 principais</text:span>:</text:p>
          <text:list>
            <text:list-item>
              <text:p text:style-name="P3"><text:span text:style-name="Source_20_Text">false</text:span> (o próprio booleano)</text:p>
            </text:list-item>
            <text:list-item>
              <text:p text:style-name="P3"><text:span text:style-name="Source_20_Text">0</text:span> (o número zero)</text:p>
            </text:list-item>
            <text:list-item>
              <text:p text:style-name="P3"><text:span text:style-name="Source_20_Text">""</text:span> ou <text:span text:style-name="Source_20_Text">''</text:span> (texto vazio / String vazia)</text:p>
            </text:list-item>
            <text:list-item>
              <text:p text:style-name="P3"><text:span text:style-name="Source_20_Text">null</text:span> (ausência de valor)</text:p>
            </text:list-item>
            <text:list-item>
              <text:p text:style-name="P3"><text:span text:style-name="Source_20_Text">undefined</text:span> (variável declarada mas sem valor)</text:p>
            </text:list-item>
            <text:list-item>
              <text:p text:style-name="P3"><text:span text:style-name="Source_20_Text">NaN</text:span> (Not a Number - erro matemático)</text:p>
            </text:list-item>
          </text:list>
        </text:list-item>
        <text:list-item>
          <text:p text:style-name="P3"><text:span text:style-name="T1">Truthy:</text:span> <text:span text:style-name="T1">Tudo o resto!</text:span> Qualquer número diferente de zero (mesmo os negativos), qualquer texto com pelo menos um espaço ou letra, e listas/objetos vazios.</text:p>
        </text:list-item>
      </text:list>
      <text:h text:style-name="P4" text:outline-level="4">Exemplo no Mundo Real:</text:h>
      <text:p text:style-name="P2">Em vez de escrever <text:span text:style-name="Source_20_Text">if (nomeUsuario !== "")</text:span>, os programadores escrevem apenas:</text:p>
      <text:p text:style-name="P5"><text:span text:style-name="Source_20_Text">JavaScript</text:span></text:p>
      <text:p text:style-name="P6"><text:span text:style-name="Source_20_Text">const nomeUsuario = "Carlos";</text:span></text:p>
      <text:p text:style-name="P6"/>
      <text:p text:style-name="P6"><text:span text:style-name="Source_20_Text">if (nomeUsuario) { // Como o texto não está vazio, ele é "Truthy" (Verdadeiro)!</text:span></text:p>
      <text:p text:style-name="P6"><text:span text:style-name="Source_20_Text"><text:s text:c="4"/>console.log("Bem-vindo, " + nomeUsuario);</text:span></text:p>
      <text:p text:style-name="P6"><text:span text:style-name="Source_20_Text">}</text:span></text:p>
      <text:h text:style-name="P7" text:outline-level="3">🏋️‍♂️ Exercício 1: O Carrinho Está Vazio?</text:h>
      <text:p text:style-name="P2">Vamos começar a praticar. Imagina o sistema de um e-commerce. A variável <text:span text:style-name="Source_20_Text">quantidadeItens</text:span> guarda o número de produtos no carrinho do cliente.</text:p>
      <text:p text:style-name="P5"><text:span text:style-name="Source_20_Text">JavaScript</text:span></text:p>
      <text:p text:style-name="P6"><text:span text:style-name="Source_20_Text">const quantidadeItens = 0;</text:span></text:p>
      <text:p text:style-name="P6"/>
      <text:p text:style-name="P6"><text:span text:style-name="Source_20_Text">if (quantidadeItens) {</text:span></text:p>
      <text:p text:style-name="P6"><text:span text:style-name="Source_20_Text"><text:s text:c="4"/>console.log("Avançar para o pagamento! 🛒");</text:span></text:p>
      <text:p text:style-name="P6"><text:span text:style-name="Source_20_Text">} else {</text:span></text:p>
      <text:p text:style-name="P6"><text:span text:style-name="Source_20_Text"><text:s text:c="4"/>console.log("O seu carrinho está vazio. Adicione produtos! ❌");</text:span></text:p>
      <text:p text:style-name="P6"><text:span text:style-name="Source_20_Text">}</text:span></text:p>
      <text:p text:style-name="P8">A tua missão no Exercício 1:</text:p>
      <text:list text:style-name="L2">
        <text:list-item>
          <text:p text:style-name="P9"><text:soft-page-break/>O número <text:span text:style-name="Source_20_Text">0</text:span> é considerado <text:span text:style-name="T1">Truthy</text:span> ou <text:span text:style-name="T1">Falsy</text:span>?</text:p>
        </text:list-item>
        <text:list-item>
          <text:p text:style-name="P9">Qual das duas mensagens vai aparecer no ecrã?</text:p>
        </text:list-item>
      </text:list>
      <text:p text:style-name="P2"><text:span text:style-name="Source_20_Text">Falsy, <text:s/>O seu carrinho está vazio. Adcione produtos.</text:span></text:p>
      <text:p text:style-name="P2"><text:span text:style-name="Source_20_Text"><text:span text:style-name="T1">Na mosca! Exatamente!</text:span></text:span><text:span text:style-name="Source_20_Text"> 🛒</text:span></text:p>
      <text:p text:style-name="P2">Como o número <text:span text:style-name="Source_20_Text">0</text:span> faz parte daquela lista restrita de valores <text:span text:style-name="T1">Falsy</text:span>, o JavaScript converte-o automaticamente para <text:span text:style-name="Source_20_Text">false</text:span> dentro do <text:span text:style-name="Source_20_Text">if</text:span>. Por isso, o sistema salta direto para o <text:span text:style-name="Source_20_Text">else</text:span> e avisa o cliente.</text:p>
      <text:p text:style-name="P2">Os programadores usam este truque a toda a hora para poupar código, evitando ter de escrever <text:span text:style-name="Source_20_Text">if (quantidadeItens &gt; 0)</text:span>.</text:p>
      <text:h text:style-name="P7" text:outline-level="3">🏋️‍♂️ Exercício 2: O Campo de Texto do Formulário</text:h>
      <text:p text:style-name="P2">Imagina que estás a validar o formulário de registo de um site. O utilizador clicou no botão "Enviar", mas deixou o campo <text:span text:style-name="Source_20_Text">email</text:span> completamente em branco.</text:p>
      <text:p text:style-name="P5"><text:span text:style-name="Source_20_Text">JavaScript</text:span></text:p>
      <text:p text:style-name="P6"><text:span text:style-name="Source_20_Text">const emailInserido = ""; </text:span></text:p>
      <text:p text:style-name="P6"/>
      <text:p text:style-name="P6"><text:span text:style-name="Source_20_Text">if (emailInserido) {</text:span></text:p>
      <text:p text:style-name="P6"><text:span text:style-name="Source_20_Text"><text:s text:c="4"/>console.log("Email válido! A guardar no sistema... 📬");</text:span></text:p>
      <text:p text:style-name="P6"><text:span text:style-name="Source_20_Text">} else {</text:span></text:p>
      <text:p text:style-name="P6"><text:span text:style-name="Source_20_Text"><text:s text:c="4"/>console.log("Erro: O campo de email não pode estar vazio! ⚠️");</text:span></text:p>
      <text:p text:style-name="P6"><text:span text:style-name="Source_20_Text">}</text:span></text:p>
      <text:p text:style-name="P8">A tua missão no Exercício 2:</text:p>
      <text:list text:style-name="L3">
        <text:list-item>
          <text:p text:style-name="P10">Uma string vazia <text:span text:style-name="Source_20_Text">""</text:span> é <text:span text:style-name="T1">Truthy</text:span> ou <text:span text:style-name="T1">Falsy</text:span>?</text:p>
        </text:list-item>
        <text:list-item>
          <text:p text:style-name="P10">Qual será a mensagem exibida no ecrã?</text:p>
        </text:list-item>
      </text:list>
      <text:p text:style-name="P2"><text:span text:style-name="Source_20_Text">Falsy. Erro: o compo de Email não pode estar vazio!</text:span></text:p>
      <text:p text:style-name="P2"><text:span text:style-name="Source_20_Text"><text:span text:style-name="T1">Mais um acerto em cheio! Perfeito!</text:span></text:span><text:span text:style-name="Source_20_Text"> 🎯</text:span></text:p>
      <text:p text:style-name="P2">Uma string totalmente vazia (<text:span text:style-name="Source_20_Text">""</text:span>) é <text:span text:style-name="T1">Falsy</text:span>. O JavaScript interpreta isso como "não há nada aqui dentro", logo, não deixa o <text:span text:style-name="Source_20_Text">if</text:span> avançar e cai diretamente no <text:span text:style-name="Source_20_Text">else</text:span>.</text:p>
      <text:p text:style-name="P2">Se o utilizador tivesse digitado apenas uma letra ou até mesmo um espaço (<text:span text:style-name="Source_20_Text">" "</text:span>), o JavaScript já consideraria <text:span text:style-name="T1">Truthy</text:span>!</text:p>
      <text:h text:style-name="P7" text:outline-level="3">🏋️‍♂️ Exercício 3: O Perfil sem Foto (O "Null")</text:h>
      <text:p text:style-name="P2">Vamos para um caso muito comum em aplicações reais. Quando um utilizador cria uma conta, ele ainda não fez o upload de uma foto de perfil. O sistema preenche essa variável com <text:span text:style-name="Source_20_Text">null</text:span> (que significa "ausência total de valor").</text:p>
      <text:p text:style-name="P5"><text:span text:style-name="Source_20_Text">JavaScript</text:span></text:p>
      <text:p text:style-name="P6"><text:span text:style-name="Source_20_Text">const fotoPerfil = null;</text:span></text:p>
      <text:p text:style-name="P6"><text:soft-page-break/></text:p>
      <text:p text:style-name="P6"><text:span text:style-name="Source_20_Text">if (fotoPerfil) {</text:span></text:p>
      <text:p text:style-name="P6"><text:span text:style-name="Source_20_Text"><text:s text:c="4"/>console.log("A carregar a foto de perfil do utilizador... 🖼️");</text:span></text:p>
      <text:p text:style-name="P6"><text:span text:style-name="Source_20_Text">} else {</text:span></text:p>
      <text:p text:style-name="P6"><text:span text:style-name="Source_20_Text"><text:s text:c="4"/>console.log("A usar o avatar cinzento padrão. 👤");</text:span></text:p>
      <text:p text:style-name="P6"><text:span text:style-name="Source_20_Text">}</text:span></text:p>
      <text:p text:style-name="P8">A sua missão no Exercício 3:</text:p>
      <text:list text:style-name="L4">
        <text:list-item>
          <text:p text:style-name="P11">O valor <text:span text:style-name="Source_20_Text">null</text:span> é <text:span text:style-name="T1">Truthy</text:span> ou <text:span text:style-name="T1">Falsy</text:span>?</text:p>
        </text:list-item>
        <text:list-item>
          <text:p text:style-name="P11">O que o sistema vai fazer (qual mensagem aparece no ecrã)?</text:p>
        </text:list-item>
      </text:list>
      <text:p text:style-name="P2"><text:span text:style-name="Source_20_Text">Falsy. A usar o avatar cinzento padrão.</text:span></text:p>
      <text:p text:style-name="P2"><text:span text:style-name="Source_20_Text"><text:span text:style-name="T1">Certíssimo! Resposta impecável!</text:span></text:span><text:span text:style-name="Source_20_Text"> 👤</text:span></text:p>
      <text:p text:style-name="P2">Como <text:span text:style-name="Source_20_Text">null</text:span> representa a ausência total de um objeto ou valor, ele é classificado como <text:span text:style-name="T1">Falsy</text:span>. O sistema entende o recado de que "não há foto" e carrega o avatar padrão.</text:p>
      <text:h text:style-name="P7" text:outline-level="3">🏋️‍♂️ Exercício 4: O Desafio Supremo do Saldo (A Rasteira do Zero)</text:h>
      <text:p text:style-name="P2">Agora que você acertou 3 seguidas com facilidade, vamos ao teste definitivo. Este é um erro real que muitos programadores juniores cometem em sistemas financeiros.</text:p>
      <text:p text:style-name="P2">Imagina o ecrã de uma aplicação de homebanking. O sistema quer verificar se o cliente tem algum dinheiro na conta para poder exibir um botão de "Investir".</text:p>
      <text:p text:style-name="P5">JavaScript</text:p>
      <text:p text:style-name="P6"><text:span text:style-name="Source_20_Text">const saldoConta = 0;</text:span></text:p>
      <text:p text:style-name="P6"/>
      <text:p text:style-name="P6"><text:span text:style-name="Source_20_Text">if (saldoConta) {</text:span></text:p>
      <text:p text:style-name="P6"><text:span text:style-name="Source_20_Text"><text:s text:c="4"/>console.log("Mostrar botão: 'Investir Dinheiro' 💰");</text:span></text:p>
      <text:p text:style-name="P6"><text:span text:style-name="Source_20_Text">} else {</text:span></text:p>
      <text:p text:style-name="P6"><text:span text:style-name="Source_20_Text"><text:s text:c="4"/>console.log("Ocultar botão. Saldo indisponível ou zerado. 🛑");</text:span></text:p>
      <text:p text:style-name="P6"><text:span text:style-name="Source_20_Text">}</text:span></text:p>
      <text:p text:style-name="P2"><text:span text:style-name="T1">A sua missão no Exercício 4:</text:span> Pense do ponto de vista do negócio: o cliente tem exatamente <text:span text:style-name="T1">0 euros</text:span> na conta.</text:p>
      <text:list text:style-name="L5">
        <text:list-item>
          <text:p text:style-name="P12">O JavaScript vai considerar esse <text:span text:style-name="Source_20_Text">0</text:span> como Truthy ou Falsy?</text:p>
        </text:list-item>
        <text:list-item>
          <text:p text:style-name="P12">Qual mensagem vai aparecer no ecrã?</text:p>
        </text:list-item>
        <text:list-item>
          <text:p text:style-name="P12"><text:span text:style-name="T1">Pergunta de Reflexão:</text:span> Se o cliente tivesse <text:span text:style-name="T1">-50 euros</text:span> (saldo negativo / conta a descoberto), o número <text:span text:style-name="Source_20_Text">-50</text:span> seria Truthy ou Falsy? O botão de investir apareceria para ele? (Lembre-se da lista dos 6 Falsy!)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7T00:11:45.013019677</dc:date>
    <dc:creator>João António</dc:creator>
    <meta:editing-duration>PT6H43M13S</meta:editing-duration>
    <meta:editing-cycles>26</meta:editing-cycles>
    <meta:generator>LibreOffice/26.2.4.2$Linux_X86_64 LibreOffice_project/620$Build-2</meta:generator>
    <meta:document-statistic meta:table-count="0" meta:image-count="0" meta:object-count="0" meta:page-count="3" meta:paragraph-count="79" meta:word-count="784" meta:character-count="4586" meta:non-whitespace-character-count="3860"/>
  </office:meta>
</office:document-meta>
</file>