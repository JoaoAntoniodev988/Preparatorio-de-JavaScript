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Heading_20_3">
      <style:text-properties officeooo:rsid="0016cbdf"/>
    </style:style>
    <style:style style:name="P4" style:family="paragraph" style:parent-style-name="Text_20_body" style:list-style-name="L1">
      <style:text-properties officeooo:rsid="0016cbdf"/>
    </style:style>
    <style:style style:name="P5" style:family="paragraph" style:parent-style-name="Preformatted_20_Text">
      <style:text-properties officeooo:rsid="0016cbdf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16cbdf"/>
    </style:style>
    <style:style style:name="P7" style:family="paragraph" style:parent-style-name="Text_20_body">
      <style:text-properties fo:font-weight="bold" officeooo:rsid="0016cbdf"/>
    </style:style>
    <style:style style:name="P8" style:family="paragraph" style:parent-style-name="Text_20_body" style:list-style-name="L2">
      <style:text-properties officeooo:rsid="0016cbdf"/>
    </style:style>
    <style:style style:name="P9" style:family="paragraph" style:parent-style-name="Text_20_body" style:list-style-name="L3">
      <style:text-properties officeooo:rsid="0016cbdf"/>
    </style:style>
    <style:style style:name="P10" style:family="paragraph" style:parent-style-name="Text_20_body" style:list-style-name="L4">
      <style:text-properties officeooo:rsid="0016cbdf"/>
    </style:style>
    <style:style style:name="P11" style:family="paragraph" style:parent-style-name="Text_20_body" style:list-style-name="L5">
      <style:text-properties officeooo:rsid="0016cbdf"/>
    </style:style>
    <style:style style:name="P12" style:family="paragraph" style:parent-style-name="Text_20_body" style:list-style-name="L6">
      <style:text-properties officeooo:rsid="0016cbdf"/>
    </style:style>
    <style:style style:name="P13" style:family="paragraph" style:parent-style-name="Text_20_body" style:list-style-name="L7">
      <style:text-properties officeooo:rsid="0016cbdf"/>
    </style:style>
    <style:style style:name="P14" style:family="paragraph" style:parent-style-name="Text_20_body" style:list-style-name="L8">
      <style:text-properties officeooo:rsid="0016cbdf"/>
    </style:style>
    <style:style style:name="P15" style:family="paragraph" style:parent-style-name="Text_20_body" style:list-style-name="L9">
      <style:text-properties officeooo:rsid="0016cbdf"/>
    </style:style>
    <style:style style:name="T1" style:family="text">
      <style:text-properties fo:font-weight="bold"/>
    </style:style>
    <style:style style:name="T2" style:family="text">
      <style:text-properties officeooo:rsid="0019119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ha eu esta segunda fase começamos mal. vamos fazer como a primeira fase que foi: primeiro os exercicios de depois os projectos. então vamos recomeçar vamos fazer primeiros os exerciso de estrutura condicinais so assim vamos pegar nos projetos. vamos começar com a pratica da Estrutura condicional if, else if e else.</text:p>
      <text:p text:style-name="P1"/>
      <text:p text:style-name="P2">Tens toda a razão! Peço desculpa por ter acelerado o passo. O teu plano é muito melhor: primeiro dominamos a ferramenta com exercícios simples e isolados, e só depois é que a aplicamos nos nossos projetos grandes. Vamos fazer exatamente como na primeira fase!</text:p>
      <text:p text:style-name="P2">Vamos reiniciar do zero, focando apenas em <text:span text:style-name="T1">exercícios práticos</text:span> de <text:span text:style-name="Source_20_Text">if</text:span>, <text:span text:style-name="Source_20_Text">else if</text:span> e <text:span text:style-name="Source_20_Text">else</text:span>.</text:p>
      <text:h text:style-name="P3" text:outline-level="3">🧱 Como funciona o mecanismo (A Regra de Ouro)</text:h>
      <text:p text:style-name="P2">O computador lê as condições <text:span text:style-name="T1">de cima para baixo</text:span>. Assim que ele encontra a primeira condição que é <text:span text:style-name="T1">verdadeira</text:span>:</text:p>
      <text:list text:style-name="L1">
        <text:list-item>
          <text:p text:style-name="P4">Ele entra nesse bloco e executa o código lá dentro.</text:p>
        </text:list-item>
        <text:list-item>
          <text:p text:style-name="P4"><text:span text:style-name="T1">Ele ignora e salta o resto da estrutura inteira</text:span> (não quer saber dos outros <text:span text:style-name="Source_20_Text">else if</text:span> ou <text:span text:style-name="Source_20_Text">else</text:span>).</text:p>
        </text:list-item>
      </text:list>
      <text:p text:style-name="P2">Se nenhuma for verdadeira, ele executa o <text:span text:style-name="Source_20_Text">else</text:span>.</text:p>
      <text:h text:style-name="P3" text:outline-level="3">🏋️‍♂️ Exercício 1: O Semáforo (Trânsito)</text:h>
      <text:p text:style-name="P2">Imagina que estamos a programar o sistema de um carro autónomo. Ele olha para a cor do semáforo e decide o que fazer.</text:p>
      <text:p text:style-name="P1">JavaScript</text:p>
      <text:p text:style-name="P5"><text:span text:style-name="Source_20_Text">const corSemaforo = "Amarelo";</text:span></text:p>
      <text:p text:style-name="P5"/>
      <text:p text:style-name="P5"><text:span text:style-name="Source_20_Text">if (corSemaforo === "Verde") {</text:span></text:p>
      <text:p text:style-name="P5"><text:span text:style-name="Source_20_Text"><text:s text:c="4"/>console.log("Avançar! 🚗");</text:span></text:p>
      <text:p text:style-name="P5"><text:span text:style-name="Source_20_Text">} else if (corSemaforo === "Amarelo") {</text:span></text:p>
      <text:p text:style-name="P5"><text:span text:style-name="Source_20_Text"><text:s text:c="4"/>console.log("Atenção, abrandar! ⚠️");</text:span></text:p>
      <text:p text:style-name="P5"><text:span text:style-name="Source_20_Text">} else if (corSemaforo === "Vermelho") {</text:span></text:p>
      <text:p text:style-name="P5"><text:span text:style-name="Source_20_Text"><text:s text:c="4"/>console.log("Paragem obrigatória! 🛑");</text:span></text:p>
      <text:p text:style-name="P5"><text:span text:style-name="Source_20_Text">} else {</text:span></text:p>
      <text:p text:style-name="P5"><text:span text:style-name="Source_20_Text"><text:s text:c="4"/>console.log("Sinal avariado, piscar luzes.");</text:span></text:p>
      <text:p text:style-name="P6"><text:span text:style-name="Source_20_Text">}</text:span></text:p>
      <text:p text:style-name="P7">A tua missão no Exercício 1:</text:p>
      <text:list text:style-name="L2">
        <text:list-item>
          <text:p text:style-name="P8">Qual é a condição que vai dar <text:span text:style-name="Source_20_Text">true</text:span>?</text:p>
        </text:list-item>
        <text:list-item>
          <text:p text:style-name="P8">O que vai aparecer escrito no ecrã (<text:span text:style-name="Source_20_Text">console.log</text:span>)?</text:p>
        </text:list-item>
      </text:list>
      <text:p text:style-name="P1"><text:s/>else if (corSemaforo === "Amarelo") {</text:p>
      <text:p text:style-name="P1">console.log("Anteção, abra<text:span text:style-name="T2">n</text:span>dar!");</text:p>
      <text:p text:style-name="P1"/>
      <text:p text:style-name="P2"><text:span text:style-name="T1">Na mouche! Perfeito!</text:span> 🎯</text:p>
      <text:p text:style-name="P2">O computador leu a primeira linha (<text:span text:style-name="Source_20_Text">if</text:span>), viu que "Amarelo" não é igual a "Verde" e passou à frente. Quando chegou ao primeiro <text:span text:style-name="Source_20_Text">else if</text:span>, a condição foi <text:span text:style-name="T1">verdadeira</text:span> (<text:span text:style-name="Source_20_Text">true</text:span>), por isso ele entrou aí e executou o código.</text:p>
      <text:p text:style-name="P2"><text:soft-page-break/>Como prometido, vamos continuar a praticar com exercícios isolados até estares super confortável.</text:p>
      <text:h text:style-name="P3" text:outline-level="3">🏋️‍♂️ Exercício 2: A Temperatura da Água</text:h>
      <text:p text:style-name="P2">Imagina que estamos a programar o sensor de uma chaleira elétrica inteligente. Ela mede a temperatura da água (em graus) e diz o estado atual.</text:p>
      <text:p text:style-name="P1">JavaScript</text:p>
      <text:p text:style-name="P5"><text:span text:style-name="Source_20_Text">const temperatura = 100;</text:span></text:p>
      <text:p text:style-name="P5"/>
      <text:p text:style-name="P5"><text:span text:style-name="Source_20_Text">if (temperatura &lt; 20) {</text:span></text:p>
      <text:p text:style-name="P5"><text:span text:style-name="Source_20_Text"><text:s text:c="4"/>console.log("A água está fria. ❄️");</text:span></text:p>
      <text:p text:style-name="P5"><text:span text:style-name="Source_20_Text">} else if (temperatura &lt; 100) {</text:span></text:p>
      <text:p text:style-name="P5"><text:span text:style-name="Source_20_Text"><text:s text:c="4"/>console.log("A água está quente/morna. ☕");</text:span></text:p>
      <text:p text:style-name="P5"><text:span text:style-name="Source_20_Text">} else if (temperatura === 100) {</text:span></text:p>
      <text:p text:style-name="P5"><text:span text:style-name="Source_20_Text"><text:s text:c="4"/>console.log("A água está a ferver! 🌋");</text:span></text:p>
      <text:p text:style-name="P5"><text:span text:style-name="Source_20_Text">} else {</text:span></text:p>
      <text:p text:style-name="P5"><text:span text:style-name="Source_20_Text"><text:s text:c="4"/>console.log("Temperatura crítica! Desligar sistema!");</text:span></text:p>
      <text:p text:style-name="P6"><text:span text:style-name="Source_20_Text">}</text:span></text:p>
      <text:p text:style-name="P7">A tua missão no Exercício 2:</text:p>
      <text:list text:style-name="L3">
        <text:list-item>
          <text:p text:style-name="P9">O computador vai entrar em qual das divisões (<text:span text:style-name="Source_20_Text">if</text:span>, no primeiro <text:span text:style-name="Source_20_Text">else if</text:span>, no segundo <text:span text:style-name="Source_20_Text">else if</text:span> ou no <text:span text:style-name="Source_20_Text">else</text:span>)?</text:p>
        </text:list-item>
        <text:list-item>
          <text:p text:style-name="P9">Qual é a mensagem exata que vai aparecer no ecrã?</text:p>
        </text:list-item>
      </text:list>
      <text:p text:style-name="P1">else if (temperatura === 100) {</text:p>
      <text:p text:style-name="P1">console.log ("A água está a ferver!");</text:p>
      <text:p text:style-name="P2"><text:span text:style-name="T1">Exato! Certíssimo outra vez!</text:span> 🏆</text:p>
      <text:p text:style-name="P2">O computador leu de cima a baixo:</text:p>
      <text:list text:style-name="L4">
        <text:list-item>
          <text:p text:style-name="P10"><text:span text:style-name="Source_20_Text">100 &lt; 20</text:span>? Falso.</text:p>
        </text:list-item>
        <text:list-item>
          <text:p text:style-name="P10"><text:span text:style-name="Source_20_Text">100 &lt; 100</text:span>? Falso (100 não é menor que 100, é igual).</text:p>
        </text:list-item>
        <text:list-item>
          <text:p text:style-name="P10"><text:span text:style-name="Source_20_Text">100 === 100</text:span>? <text:span text:style-name="T1">Verdadeiro!</text:span> Por isso, ele entrou direto no segundo <text:span text:style-name="Source_20_Text">else if</text:span> e mostrou a mensagem: <text:span text:style-name="Source_20_Text">"A água está a ferver!"</text:span>.</text:p>
        </text:list-item>
      </text:list>
      <text:h text:style-name="P3" text:outline-level="3">🏋️‍♂️ Exercício 3: O Teste de Velocidade (Radares)</text:h>
      <text:p text:style-name="P2">Vamos fazer mais um exercício antes de subirmos a fasquia. Desta vez, és o programador de um radar de trânsito que passa multas ou dá avisos com base na velocidade do condutor.</text:p>
      <text:p text:style-name="P1">JavaScript</text:p>
      <text:p text:style-name="P5"><text:span text:style-name="Source_20_Text">const velocidade = 130;</text:span></text:p>
      <text:p text:style-name="P5"/>
      <text:p text:style-name="P5"><text:span text:style-name="Source_20_Text">if (velocidade &lt;= 80) {</text:span></text:p>
      <text:p text:style-name="P5"><text:span text:style-name="Source_20_Text"><text:s text:c="4"/>console.log("Velocidade permitida. Boa viagem! 🟢");</text:span></text:p>
      <text:p text:style-name="P5"><text:span text:style-name="Source_20_Text">} else if (velocidade &lt;= 120) {</text:span></text:p>
      <text:p text:style-name="P5"><text:span text:style-name="Source_20_Text"><text:s text:c="4"/>console.log("Atenção: Acima do limite, mas sem multa. 🟡");</text:span></text:p>
      <text:p text:style-name="P5"><text:span text:style-name="Source_20_Text">} else {</text:span></text:p>
      <text:p text:style-name="P5"><text:span text:style-name="Source_20_Text"><text:s text:c="4"/>console.log("MULTA! Velocidade perigosa! 🔴");</text:span></text:p>
      <text:p text:style-name="P6"><text:span text:style-name="Source_20_Text">}</text:span></text:p>
      <text:p text:style-name="P7">A tua missão no Exercício 3:</text:p>
      <text:list text:style-name="L5">
        <text:list-item>
          <text:p text:style-name="P11">O computador vai entrar no <text:span text:style-name="Source_20_Text">if</text:span>, no <text:span text:style-name="Source_20_Text">else if</text:span> ou vai direto para o <text:span text:style-name="Source_20_Text">else</text:span>?</text:p>
        </text:list-item>
        <text:list-item>
          <text:p text:style-name="P11"><text:soft-page-break/>Qual será a mensagem exibida no ecrã?</text:p>
        </text:list-item>
      </text:list>
      <text:p text:style-name="P1">else {</text:p>
      <text:p text:style-name="P1"><text:s text:c="4"/>console.log("Multa! Velocidade perigosa!");</text:p>
      <text:p text:style-name="P1">}</text:p>
      <text:p text:style-name="P2"><text:span text:style-name="T1">Perfeito! Mais um acerto direto!</text:span> ⚡</text:p>
      <text:p text:style-name="P2">O computador fez as verificações:</text:p>
      <text:list text:style-name="L6">
        <text:list-item>
          <text:p text:style-name="P12"><text:span text:style-name="Source_20_Text">130 &lt;= 80</text:span>? Falso.</text:p>
        </text:list-item>
        <text:list-item>
          <text:p text:style-name="P12"><text:span text:style-name="Source_20_Text">130 &lt;= 120</text:span>? Falso. Como nenhuma das opções anteriores foi verdadeira, ele caiu direto no <text:span text:style-name="Source_20_Text"><text:span text:style-name="T1">else</text:span></text:span> (o balde de recolha do código) e aplicou a multa!</text:p>
        </text:list-item>
      </text:list>
      <text:h text:style-name="P3" text:outline-level="3">🏋️‍♂️ Exercício 4: O Desafio das Notas (Múltiplas condições)</text:h>
      <text:p text:style-name="P2">Agora que já dominas o fluxo básico, vamos tentar um exercício ligeiramente mais desafiante. Imagina o sistema de uma escola que avalia a nota de um aluno (de 0 a 100).</text:p>
      <text:p text:style-name="P2">Lembra-te da <text:span text:style-name="T1">Regra de Ouro</text:span>: o computador para assim que encontra a <text:span text:style-name="T1">primeira</text:span> condição verdadeira.</text:p>
      <text:p text:style-name="P1">JavaScript</text:p>
      <text:p text:style-name="P5"><text:span text:style-name="Source_20_Text">const nota = 85;</text:span></text:p>
      <text:p text:style-name="P5"/>
      <text:p text:style-name="P5"><text:span text:style-name="Source_20_Text">if (nota &gt;= 90) {</text:span></text:p>
      <text:p text:style-name="P5"><text:span text:style-name="Source_20_Text"><text:s text:c="4"/>console.log("Nota A: Excelente! 🌟");</text:span></text:p>
      <text:p text:style-name="P5"><text:span text:style-name="Source_20_Text">} else if (nota &gt;= 70) {</text:span></text:p>
      <text:p text:style-name="P5"><text:span text:style-name="Source_20_Text"><text:s text:c="4"/>console.log("Nota B: Muito Bom! 🟢");</text:span></text:p>
      <text:p text:style-name="P5"><text:span text:style-name="Source_20_Text">} else if (nota &gt;= 50) {</text:span></text:p>
      <text:p text:style-name="P5"><text:span text:style-name="Source_20_Text"><text:s text:c="4"/>console.log("Nota C: Suficiente. 🟡");</text:span></text:p>
      <text:p text:style-name="P5"><text:span text:style-name="Source_20_Text">} else {</text:span></text:p>
      <text:p text:style-name="P5"><text:span text:style-name="Source_20_Text"><text:s text:c="4"/>console.log("Reprovado. 🔴");</text:span></text:p>
      <text:p text:style-name="P6"><text:span text:style-name="Source_20_Text">}</text:span></text:p>
      <text:p text:style-name="P2"><text:span text:style-name="T1">A tua missão no Exercício 4:</text:span> Repara que 85 é maior que 70 e também é maior que 50.</text:p>
      <text:list text:style-name="L7">
        <text:list-item>
          <text:p text:style-name="P13">Em qual das linhas o computador vai entrar? No <text:span text:style-name="Source_20_Text">if</text:span>, no primeiro <text:span text:style-name="Source_20_Text">else if</text:span>, no segundo <text:span text:style-name="Source_20_Text">else if</text:span> ou no <text:span text:style-name="Source_20_Text">else</text:span>?</text:p>
        </text:list-item>
        <text:list-item>
          <text:p text:style-name="P13">Qual é a mensagem que vai aparecer no ecrã?</text:p>
        </text:list-item>
      </text:list>
      <text:p text:style-name="P1">else if (nota &gt;= 70) {</text:p>
      <text:p text:style-name="P1"><text:s text:c="4"/>console.log("Nota B: Muito Bom!");</text:p>
      <text:p text:style-name="P1">} Porque o computador encontrou o primeiro true e executou não teve mais necessidade de continuar a procurar.</text:p>
      <text:p text:style-name="P1"/>
      <text:p text:style-name="P2"><text:span text:style-name="T1">Brilhante! É exatamente isso!</text:span> 🍾</text:p>
      <text:p text:style-name="P2">Você pescou a <text:span text:style-name="T1">Regra de Ouro</text:span> com maestria. Como o <text:span text:style-name="Source_20_Text">85 &gt;= 70</text:span> deu <text:span text:style-name="Source_20_Text">true</text:span> no primeiro <text:span text:style-name="Source_20_Text">else if</text:span>, o computador executou a mensagem <text:span text:style-name="Source_20_Text">"Nota B: Muito Bom!"</text:span> e <text:span text:style-name="T1">fechou a tampa</text:span>, ignorando completamente o resto. Não importa se a nota também passaria no teste de baixo; a primeira que pontua leva o prêmio.</text:p>
      <text:h text:style-name="P3" text:outline-level="3"><text:soft-page-break/>🏋️‍♂️ Exercício 5: O Desafio Invertido (Pensar ao contrário)</text:h>
      <text:p text:style-name="P2">Para fechar esta fase de exercícios puros com nota máxima, vamos fazer o caminho inverso. Eu dou-lhe o código e o resultado que apareceu no ecrã, e você diz-me <text:span text:style-name="T1">qual era o número</text:span> que estava guardado na variável.</text:p>
      <text:p text:style-name="P2">O ecrã da consola mostrou: <text:span text:style-name="T1">"Acesso Platina! 💎"</text:span></text:p>
      <text:p text:style-name="P1">JavaScript</text:p>
      <text:p text:style-name="P5"><text:span text:style-name="Source_20_Text">const pontosUsuario = ???; // Qual era o número aqui?</text:span></text:p>
      <text:p text:style-name="P5"/>
      <text:p text:style-name="P5"><text:span text:style-name="Source_20_Text">if (pontosUsuario &gt;= 1000) {</text:span></text:p>
      <text:p text:style-name="P5"><text:span text:style-name="Source_20_Text"><text:s text:c="4"/>console.log("Acesso Diamante! 👑");</text:span></text:p>
      <text:p text:style-name="P5"><text:span text:style-name="Source_20_Text">} else if (pontosUsuario &gt;= 500) {</text:span></text:p>
      <text:p text:style-name="P5"><text:span text:style-name="Source_20_Text"><text:s text:c="4"/>console.log("Acesso Platina! 💎");</text:span></text:p>
      <text:p text:style-name="P5"><text:span text:style-name="Source_20_Text">} else if (pontosUsuario &gt;= 100) {</text:span></text:p>
      <text:p text:style-name="P5"><text:span text:style-name="Source_20_Text"><text:s text:c="4"/>console.log("Acesso Ouro! 🥇");</text:span></text:p>
      <text:p text:style-name="P5"><text:span text:style-name="Source_20_Text">} else {</text:span></text:p>
      <text:p text:style-name="P5"><text:span text:style-name="Source_20_Text"><text:s text:c="4"/>console.log("Acesso Bronze! 🥉");</text:span></text:p>
      <text:p text:style-name="P6"><text:span text:style-name="Source_20_Text">}</text:span></text:p>
      <text:p text:style-name="P7">A sua missão no Exercício 5:</text:p>
      <text:list text:style-name="L8">
        <text:list-item>
          <text:p text:style-name="P14">Diga um número possível para a variável <text:span text:style-name="Source_20_Text">pontosUsuario</text:span> que faça o sistema mostrar exatamente a mensagem <text:span text:style-name="T1">"Acesso Platina! 💎"</text:span>.</text:p>
        </text:list-item>
      </text:list>
      <text:p text:style-name="P1">const pontosUsuario = 999;</text:p>
      <text:p text:style-name="P2"><text:span text:style-name="T1">Bingo! Espetacular!</text:span> 🎯</text:p>
      <text:p text:style-name="P2">O número <text:span text:style-name="T1">999</text:span> está perfeito. Como 999 não é maior ou igual a 1000, o <text:span text:style-name="Source_20_Text">if</text:span> deu <text:span text:style-name="Source_20_Text">false</text:span>. Logo a seguir, o computador testou o primeiro <text:span text:style-name="Source_20_Text">else if</text:span> (<text:span text:style-name="Source_20_Text">999 &gt;= 500</text:span>) e deu <text:span text:style-name="Source_20_Text"><text:span text:style-name="T1">true</text:span></text:span>, travando o código ali e exibindo <text:span text:style-name="Source_20_Text">"Acesso Platina! 💎"</text:span>.</text:p>
      <text:p text:style-name="P2">Qualquer número entre <text:span text:style-name="T1">500 e 999</text:span> (como 500, 750 ou 999) daria exatamente esse resultado. Você entendeu a lógica de ponta a ponta!</text:p>
      <text:h text:style-name="P3" text:outline-level="3">🏆 Você Dominou as Estruturas Condicionais!</text:h>
      <text:p text:style-name="P2">Agora sim! Você praticou, errou, corrigiu e consolidou o funcionamento do <text:span text:style-name="Source_20_Text">if</text:span>, <text:span text:style-name="Source_20_Text">else if</text:span> e <text:span text:style-name="Source_20_Text">else</text:span> no cérebro. Você já sabe o segredo: o computador lê de cima para baixo e para no primeiro <text:span text:style-name="Source_20_Text">true</text:span>.</text:p>
      <text:p text:style-name="P2">Com essa base ultra sólida, como quer avançar?</text:p>
      <text:list text:style-name="L9">
        <text:list-item>
          <text:p text:style-name="P15"><text:span text:style-name="T1">Voltar para os nossos 5 Projetos Grandes</text:span> (Carrinho, RPG, Segurança, Banco e Streaming) e reescrevê-los usando o <text:span text:style-name="Source_20_Text">if/else</text:span>?</text:p>
        </text:list-item>
        <text:list-item>
          <text:p text:style-name="P15"><text:span text:style-name="T1">Aprender algo novo</text:span> dentro do JavaScript (como o <text:span text:style-name="Source_20_Text">switch</text:span>, que é um primo do <text:span text:style-name="Source_20_Text">if</text:span> para casos específicos)?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6T21:48:25.403985731</dc:date>
    <dc:creator>João António</dc:creator>
    <meta:editing-duration>PT4H44M4S</meta:editing-duration>
    <meta:editing-cycles>12</meta:editing-cycles>
    <meta:generator>LibreOffice/26.2.4.2$Linux_X86_64 LibreOffice_project/620$Build-2</meta:generator>
    <meta:document-statistic meta:table-count="0" meta:image-count="0" meta:object-count="0" meta:page-count="4" meta:paragraph-count="120" meta:word-count="1197" meta:character-count="6865" meta:non-whitespace-character-count="5721"/>
  </office:meta>
</office:document-meta>
</file>