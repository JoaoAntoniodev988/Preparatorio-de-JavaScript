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6cbdf"/>
    </style:style>
    <style:style style:name="P4" style:family="paragraph" style:parent-style-name="Preformatted_20_Text">
      <style:text-properties officeooo:rsid="0016cbd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6" style:family="paragraph" style:parent-style-name="Text_20_body" style:list-style-name="L1">
      <style:text-properties officeooo:rsid="0016cbdf"/>
    </style:style>
    <style:style style:name="P7" style:family="paragraph" style:parent-style-name="Text_20_body" style:list-style-name="L2">
      <style:text-properties officeooo:rsid="0016cbdf"/>
    </style:style>
    <style:style style:name="P8" style:family="paragraph" style:parent-style-name="Standard">
      <style:text-properties officeooo:rsid="0016cbdf"/>
    </style:style>
    <style:style style:name="P9" style:family="paragraph" style:parent-style-name="Text_20_body">
      <style:text-properties fo:font-weight="bold"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🔀 Próxima Paragem: A Condição Múltipla <text:span text:style-name="Source_20_Text">switch</text:span></text:h>
      <text:p text:style-name="P2">Agora que já vês o impacto real disto, vamos conhecer o <text:span text:style-name="Source_20_Text"><text:span text:style-name="T1">switch</text:span></text:span>.</text:p>
      <text:p text:style-name="P2">O <text:span text:style-name="Source_20_Text">switch</text:span> é um primo do <text:span text:style-name="Source_20_Text">if / else if</text:span>. Ele serve exatamente para o mesmo: tomar decisões. No entanto, ele foi criado para quando temos <text:span text:style-name="T1">uma única variável</text:span> e queremos testá-la contra <text:span text:style-name="T1">vários valores exatos e específicos</text:span> (como os dias da semana, as cores do semáforo, ou os meses do ano).</text:p>
      <text:p text:style-name="P2">Em vez de escreveres dez <text:span text:style-name="Source_20_Text">else if</text:span> seguidos, o <text:span text:style-name="Source_20_Text">switch</text:span> deixa o código muito mais limpo e legível.</text:p>
      <text:p text:style-name="P2">Olha para a estrutura dele:</text:p>
      <text:p text:style-name="P3">JavaScript</text:p>
      <text:p text:style-name="P4"><text:span text:style-name="Source_20_Text">const diaSemana = 1;</text:span></text:p>
      <text:p text:style-name="P4"/>
      <text:p text:style-name="P4"><text:span text:style-name="Source_20_Text">switch (diaSemana) {</text:span></text:p>
      <text:p text:style-name="P4"><text:span text:style-name="Source_20_Text"><text:s text:c="4"/>case 1:</text:span></text:p>
      <text:p text:style-name="P4"><text:span text:style-name="Source_20_Text"><text:s text:c="8"/>console.log("Segunda-feira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Terça-feira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Fim de semana!");</text:span></text:p>
      <text:p text:style-name="P5"><text:span text:style-name="Source_20_Text">}</text:span></text:p>
      <text:p text:style-name="P2">Duas palavras-chave novas e muito importantes aqui:</text:p>
      <text:list text:style-name="L1">
        <text:list-item>
          <text:p text:style-name="P6"><text:span text:style-name="Source_20_Text"><text:span text:style-name="T1">break</text:span></text:span><text:span text:style-name="T1">:</text:span> Significa "Para!". Se o computador encontrar o caso certo, executa o código e o <text:span text:style-name="Source_20_Text">break</text:span> faz com que ele saia do <text:span text:style-name="Source_20_Text">switch</text:span> imediatamente. Se te esqueceres do <text:span text:style-name="Source_20_Text">break</text:span>, ele continua a executar os casos de baixo mesmo que sejam falsos!</text:p>
        </text:list-item>
        <text:list-item>
          <text:p text:style-name="P6"><text:span text:style-name="Source_20_Text"><text:span text:style-name="T1">default</text:span></text:span><text:span text:style-name="T1">:</text:span> É o equivalente ao <text:span text:style-name="Source_20_Text">else</text:span>. Se nenhum dos <text:span text:style-name="Source_20_Text">case</text:span> anteriores for o correto, ele executa o que estiver no <text:span text:style-name="Source_20_Text">default</text:span>.</text:p>
        </text:list-item>
      </text:list>
      <text:p text:style-name="P2">Estás pronto para começarmos a praticar com os exercícios simples do <text:span text:style-name="Source_20_Text">switch</text:span>, exatamente como fizemos antes?</text:p>
      <text:p text:style-name="P2">Maravilhoso! Vamos começar a praticar o <text:span text:style-name="Source_20_Text">switch</text:span> com exercícios bem focados e simples para apanhares o jeito ao mecanismo dos <text:span text:style-name="Source_20_Text">case</text:span>, do <text:span text:style-name="Source_20_Text">break</text:span> e do <text:span text:style-name="Source_20_Text">default</text:span>.</text:p>
      <text:h text:style-name="P1" text:outline-level="3">🧱 Regra de Ouro do <text:span text:style-name="Source_20_Text">switch</text:span></text:h>
      <text:p text:style-name="P2">O <text:span text:style-name="Source_20_Text">switch</text:span> pega numa variável e vai direto ao <text:span text:style-name="Source_20_Text">case</text:span> que tem o valor <text:span text:style-name="T1">exato</text:span> dela.</text:p>
      <text:list text:style-name="L2">
        <text:list-item>
          <text:p text:style-name="P7">O comando <text:span text:style-name="Source_20_Text"><text:span text:style-name="T1">break;</text:span></text:span> é obrigatório no final de cada caso. Ele serve para dizer: <text:span text:style-name="T2">"Computador, já encontraste o que querias, podes fechar a estrutura e sair."</text:span></text:p>
        </text:list-item>
        <text:list-item>
          <text:p text:style-name="P7">Se não puseres o <text:span text:style-name="Source_20_Text">break</text:span>, o computador continua a ler e a executar os casos de baixo, mesmo que eles não tenham nada a ver!</text:p>
        </text:list-item>
      </text:list>
      <text:h text:style-name="P1" text:outline-level="3"><text:soft-page-break/>🏋️‍♂️ Exercício 1: O Menu do Menu Executivo (Restaurante)</text:h>
      <text:p text:style-name="P2">Imagina que estás a programar o sistema de um ecrã tátil de um restaurante. O utilizador escolhe o número do prato e o sistema mostra o que vem lá dentro.</text:p>
      <text:p text:style-name="P8">avaScript</text:p>
      <text:p text:style-name="P4"><text:span text:style-name="Source_20_Text">const opcaoEscolhida = 2;</text:span></text:p>
      <text:p text:style-name="P4"/>
      <text:p text:style-name="P4"><text:span text:style-name="Source_20_Text">switch (opcaoEscolhida) {</text:span></text:p>
      <text:p text:style-name="P4"><text:span text:style-name="Source_20_Text"><text:s text:c="4"/>case 1:</text:span></text:p>
      <text:p text:style-name="P4"><text:span text:style-name="Source_20_Text"><text:s text:c="8"/>console.log("Escolheu: Hambúrguer com Batatas. 🍔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Escolheu: Pizza de Pepperoni. 🍕");</text:span></text:p>
      <text:p text:style-name="P4"><text:span text:style-name="Source_20_Text"><text:s text:c="8"/>break;</text:span></text:p>
      <text:p text:style-name="P4"><text:span text:style-name="Source_20_Text"><text:s text:c="4"/>case 3:</text:span></text:p>
      <text:p text:style-name="P4"><text:span text:style-name="Source_20_Text"><text:s text:c="8"/>console.log("Escolheu: Salada Saudável. 🥗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Opção inválida! Escolha de 1 a 3.");</text:span></text:p>
      <text:p text:style-name="P5"><text:span text:style-name="Source_20_Text">}</text:span></text:p>
      <text:p text:style-name="P9">A tua missão no Exercício 1:</text:p>
      <text:list text:style-name="L3">
        <text:list-item>
          <text:p text:style-name="P10">O computador vai saltar para qual <text:span text:style-name="Source_20_Text">case</text:span>?</text:p>
        </text:list-item>
        <text:list-item>
          <text:p text:style-name="P10">Qual é a mensagem exata que vai aparecer no ecrã?</text:p>
        </text:list-item>
      </text:list>
      <text:p text:style-name="P8"><text:s/>case 2:</text:p>
      <text:p text:style-name="P8"><text:s text:c="8"/>console.log("Escolheu: Pizza de Pepperoni");</text:p>
      <text:p text:style-name="P8">break;</text:p>
      <text:p text:style-name="P8"/>
      <text:p text:style-name="P2"><text:span text:style-name="T1">Certíssimo! Resposta perfeita!</text:span> 🍕</text:p>
      <text:p text:style-name="P2">O computador olhou para <text:span text:style-name="Source_20_Text">opcaoEscolhida = 2</text:span>, ignorou completamente o <text:span text:style-name="Source_20_Text">case 1</text:span>, foi direto ao <text:span text:style-name="Source_20_Text"><text:span text:style-name="T1">case 2</text:span></text:span>, imprimiu a mensagem da pizza e, graças ao <text:span text:style-name="Source_20_Text">break;</text:span>, saiu do <text:span text:style-name="Source_20_Text">switch</text:span> imediatamente.</text:p>
      <text:p text:style-name="P2">Vamos para o próximo, agora testando o "plano de contingência" do sistema.</text:p>
      <text:h text:style-name="P1" text:outline-level="3">🏋️‍♂️ Exercício 2: O Comando de Voz da Casa Inteligente</text:h>
      <text:p text:style-name="P2">Imagina que estás a programar uma inteligência artificial para uma casa inteligente. O utilizador diz um comando de voz e o sistema ativa o eletrodoméstico.</text:p>
      <text:p text:style-name="P8">JavaScript</text:p>
      <text:p text:style-name="P4"><text:span text:style-name="Source_20_Text">const comandoVoz = "ligar ar condicionado";</text:span></text:p>
      <text:p text:style-name="P4"/>
      <text:p text:style-name="P4"><text:span text:style-name="Source_20_Text">switch (comandoVoz) {</text:span></text:p>
      <text:p text:style-name="P4"><text:span text:style-name="Source_20_Text"><text:s text:c="4"/>case "ligar luzes":</text:span></text:p>
      <text:p text:style-name="P4"><text:span text:style-name="Source_20_Text"><text:s text:c="8"/>console.log("Luzes acesas! 💡");</text:span></text:p>
      <text:p text:style-name="P4"><text:span text:style-name="Source_20_Text"><text:s text:c="8"/>break;</text:span></text:p>
      <text:p text:style-name="P4"><text:span text:style-name="Source_20_Text"><text:s text:c="4"/>case "desligar luzes":</text:span></text:p>
      <text:p text:style-name="P4"><text:span text:style-name="Source_20_Text"><text:s text:c="8"/>console.log("Tudo escuro! 🌑");</text:span></text:p>
      <text:p text:style-name="P4"><text:span text:style-name="Source_20_Text"><text:s text:c="8"/>break;</text:span></text:p>
      <text:p text:style-name="P4"><text:span text:style-name="Source_20_Text"><text:s text:c="4"/>case "abrir cortinas":</text:span></text:p>
      <text:p text:style-name="P4"><text:span text:style-name="Source_20_Text"><text:s text:c="8"/>console.log("Cortinas abertas! ☀️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Comando não reconhecido. Tente novamente! ❓");</text:span></text:p>
      <text:p text:style-name="P5"><text:soft-page-break/><text:span text:style-name="Source_20_Text">}</text:span></text:p>
      <text:p text:style-name="P9">A tua missão no Exercício 2:</text:p>
      <text:list text:style-name="L4">
        <text:list-item>
          <text:p text:style-name="P11">O computador vai encontrar algum <text:span text:style-name="Source_20_Text">case</text:span> correspondente? Se não, para onde é que ele vai?</text:p>
        </text:list-item>
        <text:list-item>
          <text:p text:style-name="P11">Qual é a mensagem exata que vai aparecer no ecrã?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2:39:47.702207728</dc:date>
    <dc:creator>João António</dc:creator>
    <meta:editing-duration>PT5H27M49S</meta:editing-duration>
    <meta:editing-cycles>17</meta:editing-cycles>
    <meta:generator>LibreOffice/26.2.4.2$Linux_X86_64 LibreOffice_project/620$Build-2</meta:generator>
    <meta:document-statistic meta:table-count="0" meta:image-count="0" meta:object-count="0" meta:page-count="3" meta:paragraph-count="72" meta:word-count="567" meta:character-count="3580" meta:non-whitespace-character-count="2888"/>
  </office:meta>
</office:document-meta>
</file>