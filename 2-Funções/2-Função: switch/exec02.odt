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6cbdf"/>
    </style:style>
    <style:style style:name="P4" style:family="paragraph" style:parent-style-name="Preformatted_20_Text">
      <style:text-properties officeooo:rsid="0016cbd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6" style:family="paragraph" style:parent-style-name="Text_20_body" style:list-style-name="L1">
      <style:text-properties officeooo:rsid="0016cbdf"/>
    </style:style>
    <style:style style:name="P7" style:family="paragraph" style:parent-style-name="Standard">
      <style:text-properties officeooo:rsid="0016cbdf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🔀 Próxima Paragem: A Condição Múltipla <text:span text:style-name="Source_20_Text">switch</text:span></text:h>
      <text:p text:style-name="P2">Agora que já vês o impacto real disto, vamos conhecer o <text:span text:style-name="Source_20_Text"><text:span text:style-name="T1">switch</text:span></text:span>.</text:p>
      <text:p text:style-name="P2">O <text:span text:style-name="Source_20_Text">switch</text:span> é um primo do <text:span text:style-name="Source_20_Text">if / else if</text:span>. Ele serve exatamente para o mesmo: tomar decisões. No entanto, ele foi criado para quando temos <text:span text:style-name="T1">uma única variável</text:span> e queremos testá-la contra <text:span text:style-name="T1">vários valores exatos e específicos</text:span> (como os dias da semana, as cores do semáforo, ou os meses do ano).</text:p>
      <text:p text:style-name="P2">Em vez de escreveres dez <text:span text:style-name="Source_20_Text">else if</text:span> seguidos, o <text:span text:style-name="Source_20_Text">switch</text:span> deixa o código muito mais limpo e legível.</text:p>
      <text:p text:style-name="P2">Olha para a estrutura dele:</text:p>
      <text:p text:style-name="P3">JavaScript</text:p>
      <text:p text:style-name="P4"><text:span text:style-name="Source_20_Text">const diaSemana = 1;</text:span></text:p>
      <text:p text:style-name="P4"/>
      <text:p text:style-name="P4"><text:span text:style-name="Source_20_Text">switch (diaSemana) {</text:span></text:p>
      <text:p text:style-name="P4"><text:span text:style-name="Source_20_Text"><text:s text:c="4"/>case 1:</text:span></text:p>
      <text:p text:style-name="P4"><text:span text:style-name="Source_20_Text"><text:s text:c="8"/>console.log("Segunda-feira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Terça-feira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Fim de semana!");</text:span></text:p>
      <text:p text:style-name="P5"><text:span text:style-name="Source_20_Text">}</text:span></text:p>
      <text:p text:style-name="P2">Duas palavras-chave novas e muito importantes aqui:</text:p>
      <text:list text:style-name="L1">
        <text:list-item>
          <text:p text:style-name="P6"><text:span text:style-name="Source_20_Text"><text:span text:style-name="T1">break</text:span></text:span><text:span text:style-name="T1">:</text:span> Significa "Para!". Se o computador encontrar o caso certo, executa o código e o <text:span text:style-name="Source_20_Text">break</text:span> faz com que ele saia do <text:span text:style-name="Source_20_Text">switch</text:span> imediatamente. Se te esqueceres do <text:span text:style-name="Source_20_Text">break</text:span>, ele continua a executar os casos de baixo mesmo que sejam falsos!</text:p>
        </text:list-item>
        <text:list-item>
          <text:p text:style-name="P6"><text:span text:style-name="Source_20_Text"><text:span text:style-name="T1">default</text:span></text:span><text:span text:style-name="T1">:</text:span> É o equivalente ao <text:span text:style-name="Source_20_Text">else</text:span>. Se nenhum dos <text:span text:style-name="Source_20_Text">case</text:span> anteriores for o correto, ele executa o que estiver no <text:span text:style-name="Source_20_Text">default</text:span>.</text:p>
        </text:list-item>
      </text:list>
      <text:p text:style-name="P2">Estás pronto para começarmos a praticar com os exercícios simples do <text:span text:style-name="Source_20_Text">switch</text:span>, exatamente como fizemos antes?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2:05:02.693627735</dc:date>
    <dc:creator>João António</dc:creator>
    <meta:editing-duration>PT4H53M6S</meta:editing-duration>
    <meta:editing-cycles>14</meta:editing-cycles>
    <meta:generator>LibreOffice/26.2.4.2$Linux_X86_64 LibreOffice_project/620$Build-2</meta:generator>
    <meta:document-statistic meta:table-count="0" meta:image-count="0" meta:object-count="0" meta:page-count="1" meta:paragraph-count="21" meta:word-count="202" meta:character-count="1241" meta:non-whitespace-character-count="1010"/>
  </office:meta>
</office:document-meta>
</file>