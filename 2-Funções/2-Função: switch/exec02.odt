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147cm"/>
    </style:style>
    <style:style style:name="Tabela1.B" style:family="table-column">
      <style:table-column-properties style:column-width="7.385cm"/>
    </style:style>
    <style:style style:name="Tabela1.C" style:family="table-column">
      <style:table-column-properties style:column-width="6.468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Heading_20_3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6cbdf"/>
    </style:style>
    <style:style style:name="P4" style:family="paragraph" style:parent-style-name="Preformatted_20_Text">
      <style:text-properties officeooo:rsid="0016cbdf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16cbdf"/>
    </style:style>
    <style:style style:name="P6" style:family="paragraph" style:parent-style-name="Text_20_body" style:list-style-name="L1">
      <style:text-properties officeooo:rsid="0016cbdf"/>
    </style:style>
    <style:style style:name="P7" style:family="paragraph" style:parent-style-name="Text_20_body" style:list-style-name="L2">
      <style:text-properties officeooo:rsid="0016cbdf"/>
    </style:style>
    <style:style style:name="P8" style:family="paragraph" style:parent-style-name="Standard">
      <style:text-properties officeooo:rsid="0016cbdf"/>
    </style:style>
    <style:style style:name="P9" style:family="paragraph" style:parent-style-name="Text_20_body">
      <style:text-properties fo:font-weight="bold" officeooo:rsid="0016cbdf"/>
    </style:style>
    <style:style style:name="P10" style:family="paragraph" style:parent-style-name="Text_20_body" style:list-style-name="L3">
      <style:text-properties officeooo:rsid="0016cbdf"/>
    </style:style>
    <style:style style:name="P11" style:family="paragraph" style:parent-style-name="Text_20_body" style:list-style-name="L4">
      <style:text-properties officeooo:rsid="0016cbdf"/>
    </style:style>
    <style:style style:name="P12" style:family="paragraph" style:parent-style-name="Text_20_body" style:list-style-name="L5">
      <style:text-properties officeooo:rsid="0016cbdf"/>
    </style:style>
    <style:style style:name="P13" style:family="paragraph" style:parent-style-name="Text_20_body" style:list-style-name="L6">
      <style:text-properties officeooo:rsid="0016cbdf"/>
    </style:style>
    <style:style style:name="P14" style:family="paragraph" style:parent-style-name="Text_20_body" style:list-style-name="L7">
      <style:text-properties officeooo:rsid="0016cbdf"/>
    </style:style>
    <style:style style:name="P15" style:family="paragraph" style:parent-style-name="Text_20_body" style:list-style-name="L8">
      <style:text-properties officeooo:rsid="0016cbdf"/>
    </style:style>
    <style:style style:name="P16" style:family="paragraph" style:parent-style-name="Text_20_body" style:list-style-name="L9">
      <style:text-properties officeooo:rsid="0016cbdf"/>
    </style:style>
    <style:style style:name="P17" style:family="paragraph" style:parent-style-name="Text_20_body" style:list-style-name="L10">
      <style:text-properties officeooo:rsid="0016cbdf"/>
    </style:style>
    <style:style style:name="P18" style:family="paragraph" style:parent-style-name="Text_20_body">
      <style:text-properties style:font-name="Google Sans Text" officeooo:rsid="0016cbdf"/>
    </style:style>
    <style:style style:name="P19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  <style:text-properties officeooo:rsid="0016cbdf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officeooo:rsid="0016cbdf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16cbdf"/>
    </style:style>
    <style:style style:name="P22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6cbdf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7" style:family="paragraph" style:parent-style-name="Quotations">
      <style:paragraph-properties fo:margin-left="0cm" fo:margin-right="1cm" fo:margin-top="0cm" fo:margin-bottom="0.499cm" style:contextual-spacing="false" fo:line-height="114%" fo:text-indent="0cm" style:auto-text-indent="false"/>
      <style:text-properties style:font-name="Google Sans Text" fo:font-weight="bold" officeooo:rsid="0016cbdf"/>
    </style:style>
    <style:style style:name="P28" style:family="paragraph" style:parent-style-name="Quotations">
      <style:paragraph-properties fo:margin-left="0cm" fo:margin-right="1cm" fo:margin-top="0cm" fo:margin-bottom="0.499cm" style:contextual-spacing="false" fo:line-height="114%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family="'Google Sans', sans-serif"/>
    </style:style>
    <style:style style:name="T5" style:family="text">
      <style:text-properties style:font-name="Google Sans Text"/>
    </style:style>
    <style:style style:name="T6" style:family="text">
      <style:text-properties style:font-name="Google Sans Text" fo:font-weight="bold"/>
    </style:style>
    <style:style style:name="T7" style:family="text">
      <style:text-properties style:font-name="Google Sans Text" fo:font-weight="bold" officeooo:rsid="0016cbdf"/>
    </style:style>
    <style:style style:name="T8" style:family="text">
      <style:text-properties style:font-name="Google Sans Text" officeooo:rsid="0016cbd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🔀 Próxima Paragem: A Condição Múltipla <text:span text:style-name="Source_20_Text">switch</text:span></text:h>
      <text:p text:style-name="P2">Agora que já vês o impacto real disto, vamos conhecer o <text:span text:style-name="Source_20_Text"><text:span text:style-name="T1">switch</text:span></text:span>.</text:p>
      <text:p text:style-name="P2">O <text:span text:style-name="Source_20_Text">switch</text:span> é um primo do <text:span text:style-name="Source_20_Text">if / else if</text:span>. Ele serve exatamente para o mesmo: tomar decisões. No entanto, ele foi criado para quando temos <text:span text:style-name="T1">uma única variável</text:span> e queremos testá-la contra <text:span text:style-name="T1">vários valores exatos e específicos</text:span> (como os dias da semana, as cores do semáforo, ou os meses do ano).</text:p>
      <text:p text:style-name="P2">Em vez de escreveres dez <text:span text:style-name="Source_20_Text">else if</text:span> seguidos, o <text:span text:style-name="Source_20_Text">switch</text:span> deixa o código muito mais limpo e legível.</text:p>
      <text:p text:style-name="P2">Olha para a estrutura dele:</text:p>
      <text:p text:style-name="P3">JavaScript</text:p>
      <text:p text:style-name="P4"><text:span text:style-name="Source_20_Text">const diaSemana = 1;</text:span></text:p>
      <text:p text:style-name="P4"/>
      <text:p text:style-name="P4"><text:span text:style-name="Source_20_Text">switch (diaSemana) {</text:span></text:p>
      <text:p text:style-name="P4"><text:span text:style-name="Source_20_Text"><text:s text:c="4"/>case 1:</text:span></text:p>
      <text:p text:style-name="P4"><text:span text:style-name="Source_20_Text"><text:s text:c="8"/>console.log("Segunda-feira");</text:span></text:p>
      <text:p text:style-name="P4"><text:span text:style-name="Source_20_Text"><text:s text:c="8"/>break;</text:span></text:p>
      <text:p text:style-name="P4"><text:span text:style-name="Source_20_Text"><text:s text:c="4"/>case 2:</text:span></text:p>
      <text:p text:style-name="P4"><text:span text:style-name="Source_20_Text"><text:s text:c="8"/>console.log("Terça-feira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Fim de semana!");</text:span></text:p>
      <text:p text:style-name="P5"><text:span text:style-name="Source_20_Text">}</text:span></text:p>
      <text:p text:style-name="P2">Duas palavras-chave novas e muito importantes aqui:</text:p>
      <text:list text:style-name="L1">
        <text:list-item>
          <text:p text:style-name="P6"><text:span text:style-name="Source_20_Text"><text:span text:style-name="T1">break</text:span></text:span><text:span text:style-name="T1">:</text:span> Significa "Para!". Se o computador encontrar o caso certo, executa o código e o <text:span text:style-name="Source_20_Text">break</text:span> faz com que ele saia do <text:span text:style-name="Source_20_Text">switch</text:span> imediatamente. Se te esqueceres do <text:span text:style-name="Source_20_Text">break</text:span>, ele continua a executar os casos de baixo mesmo que sejam falsos!</text:p>
        </text:list-item>
        <text:list-item>
          <text:p text:style-name="P6"><text:span text:style-name="Source_20_Text"><text:span text:style-name="T1">default</text:span></text:span><text:span text:style-name="T1">:</text:span> É o equivalente ao <text:span text:style-name="Source_20_Text">else</text:span>. Se nenhum dos <text:span text:style-name="Source_20_Text">case</text:span> anteriores for o correto, ele executa o que estiver no <text:span text:style-name="Source_20_Text">default</text:span>.</text:p>
        </text:list-item>
      </text:list>
      <text:p text:style-name="P2">Estás pronto para começarmos a praticar com os exercícios simples do <text:span text:style-name="Source_20_Text">switch</text:span>, exatamente como fizemos antes?</text:p>
      <text:p text:style-name="P2">Maravilhoso! Vamos começar a praticar o <text:span text:style-name="Source_20_Text">switch</text:span> com exercícios bem focados e simples para apanhares o jeito ao mecanismo dos <text:span text:style-name="Source_20_Text">case</text:span>, do <text:span text:style-name="Source_20_Text">break</text:span> e do <text:span text:style-name="Source_20_Text">default</text:span>.</text:p>
      <text:h text:style-name="P1" text:outline-level="3">🧱 Regra de Ouro do <text:span text:style-name="Source_20_Text">switch</text:span></text:h>
      <text:p text:style-name="P2">O <text:span text:style-name="Source_20_Text">switch</text:span> pega numa variável e vai direto ao <text:span text:style-name="Source_20_Text">case</text:span> que tem o valor <text:span text:style-name="T1">exato</text:span> dela.</text:p>
      <text:list text:style-name="L2">
        <text:list-item>
          <text:p text:style-name="P7">O comando <text:span text:style-name="Source_20_Text"><text:span text:style-name="T1">break;</text:span></text:span> é obrigatório no final de cada caso. Ele serve para dizer: <text:span text:style-name="T2">"Computador, já encontraste o que querias, podes fechar a estrutura e sair."</text:span></text:p>
        </text:list-item>
        <text:list-item>
          <text:p text:style-name="P7">Se não puseres o <text:span text:style-name="Source_20_Text">break</text:span>, o computador continua a ler e a executar os casos de baixo, mesmo que eles não tenham nada a ver!</text:p>
        </text:list-item>
      </text:list>
      <text:h text:style-name="P1" text:outline-level="3"><text:soft-page-break/>🏋️‍♂️ Exercício 1: O Menu do Menu Executivo (Restaurante)</text:h>
      <text:p text:style-name="P2">Imagina que estás a programar o sistema de um ecrã tátil de um restaurante. O utilizador escolhe o número do prato e o sistema mostra o que vem lá dentro.</text:p>
      <text:p text:style-name="P8">avaScript</text:p>
      <text:p text:style-name="P4"><text:span text:style-name="Source_20_Text">const opcaoEscolhida = 2;</text:span></text:p>
      <text:p text:style-name="P4"/>
      <text:p text:style-name="P4"><text:span text:style-name="Source_20_Text">switch (opcaoEscolhida) {</text:span></text:p>
      <text:p text:style-name="P4"><text:span text:style-name="Source_20_Text"><text:s text:c="4"/>case 1:</text:span></text:p>
      <text:p text:style-name="P4"><text:span text:style-name="Source_20_Text"><text:s text:c="8"/>console.log("Escolheu: Hambúrguer com Batatas. 🍔");</text:span></text:p>
      <text:p text:style-name="P4"><text:span text:style-name="Source_20_Text"><text:s text:c="8"/>break;</text:span></text:p>
      <text:p text:style-name="P4"><text:span text:style-name="Source_20_Text"><text:s text:c="4"/>case 2:</text:span></text:p>
      <text:p text:style-name="P4"><text:span text:style-name="Source_20_Text"><text:s text:c="8"/>console.log("Escolheu: Pizza de Pepperoni. 🍕");</text:span></text:p>
      <text:p text:style-name="P4"><text:span text:style-name="Source_20_Text"><text:s text:c="8"/>break;</text:span></text:p>
      <text:p text:style-name="P4"><text:span text:style-name="Source_20_Text"><text:s text:c="4"/>case 3:</text:span></text:p>
      <text:p text:style-name="P4"><text:span text:style-name="Source_20_Text"><text:s text:c="8"/>console.log("Escolheu: Salada Saudável. 🥗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Opção inválida! Escolha de 1 a 3.");</text:span></text:p>
      <text:p text:style-name="P5"><text:span text:style-name="Source_20_Text">}</text:span></text:p>
      <text:p text:style-name="P9">A tua missão no Exercício 1:</text:p>
      <text:list text:style-name="L3">
        <text:list-item>
          <text:p text:style-name="P10">O computador vai saltar para qual <text:span text:style-name="Source_20_Text">case</text:span>?</text:p>
        </text:list-item>
        <text:list-item>
          <text:p text:style-name="P10">Qual é a mensagem exata que vai aparecer no ecrã?</text:p>
        </text:list-item>
      </text:list>
      <text:p text:style-name="P8"><text:s/>case 2:</text:p>
      <text:p text:style-name="P8"><text:s text:c="8"/>console.log("Escolheu: Pizza de Pepperoni");</text:p>
      <text:p text:style-name="P8">break;</text:p>
      <text:p text:style-name="P8"/>
      <text:p text:style-name="P2"><text:span text:style-name="T1">Certíssimo! Resposta perfeita!</text:span> 🍕</text:p>
      <text:p text:style-name="P2">O computador olhou para <text:span text:style-name="Source_20_Text">opcaoEscolhida = 2</text:span>, ignorou completamente o <text:span text:style-name="Source_20_Text">case 1</text:span>, foi direto ao <text:span text:style-name="Source_20_Text"><text:span text:style-name="T1">case 2</text:span></text:span>, imprimiu a mensagem da pizza e, graças ao <text:span text:style-name="Source_20_Text">break;</text:span>, saiu do <text:span text:style-name="Source_20_Text">switch</text:span> imediatamente.</text:p>
      <text:p text:style-name="P2">Vamos para o próximo, agora testando o "plano de contingência" do sistema.</text:p>
      <text:h text:style-name="P1" text:outline-level="3">🏋️‍♂️ Exercício 2: O Comando de Voz da Casa Inteligente</text:h>
      <text:p text:style-name="P2">Imagina que estás a programar uma inteligência artificial para uma casa inteligente. O utilizador diz um comando de voz e o sistema ativa o eletrodoméstico.</text:p>
      <text:p text:style-name="P8">JavaScript</text:p>
      <text:p text:style-name="P4"><text:span text:style-name="Source_20_Text">const comandoVoz = "ligar ar condicionado";</text:span></text:p>
      <text:p text:style-name="P4"/>
      <text:p text:style-name="P4"><text:span text:style-name="Source_20_Text">switch (comandoVoz) {</text:span></text:p>
      <text:p text:style-name="P4"><text:span text:style-name="Source_20_Text"><text:s text:c="4"/>case "ligar luzes":</text:span></text:p>
      <text:p text:style-name="P4"><text:span text:style-name="Source_20_Text"><text:s text:c="8"/>console.log("Luzes acesas! 💡");</text:span></text:p>
      <text:p text:style-name="P4"><text:span text:style-name="Source_20_Text"><text:s text:c="8"/>break;</text:span></text:p>
      <text:p text:style-name="P4"><text:span text:style-name="Source_20_Text"><text:s text:c="4"/>case "desligar luzes":</text:span></text:p>
      <text:p text:style-name="P4"><text:span text:style-name="Source_20_Text"><text:s text:c="8"/>console.log("Tudo escuro! 🌑");</text:span></text:p>
      <text:p text:style-name="P4"><text:span text:style-name="Source_20_Text"><text:s text:c="8"/>break;</text:span></text:p>
      <text:p text:style-name="P4"><text:span text:style-name="Source_20_Text"><text:s text:c="4"/>case "abrir cortinas":</text:span></text:p>
      <text:p text:style-name="P4"><text:span text:style-name="Source_20_Text"><text:s text:c="8"/>console.log("Cortinas abertas! ☀️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Comando não reconhecido. Tente novamente! ❓");</text:span></text:p>
      <text:p text:style-name="P5"><text:soft-page-break/><text:span text:style-name="Source_20_Text">}</text:span></text:p>
      <text:p text:style-name="P9">A tua missão no Exercício 2:</text:p>
      <text:list text:style-name="L4">
        <text:list-item>
          <text:p text:style-name="P11">O computador vai encontrar algum <text:span text:style-name="Source_20_Text">case</text:span> correspondente? Se não, para onde é que ele vai?</text:p>
        </text:list-item>
        <text:list-item>
          <text:p text:style-name="P11">Qual é a mensagem exata que vai aparecer no ecrã?</text:p>
        </text:list-item>
      </text:list>
      <text:p text:style-name="P2"><text:span text:style-name="T1">Exatamente! Na mosca!</text:span> 🎯</text:p>
      <text:p text:style-name="P2">Como o comando <text:span text:style-name="Source_20_Text">"ligar ar condicionado"</text:span> não batia certo com nenhum dos <text:span text:style-name="Source_20_Text">case</text:span> listados, o computador acionou o <text:span text:style-name="Source_20_Text"><text:span text:style-name="T1">default</text:span></text:span> (que funciona exatamente como o nosso velho amigo <text:span text:style-name="Source_20_Text">else</text:span>), exibindo a mensagem de comando não reconhecido.</text:p>
      <text:h text:style-name="P1" text:outline-level="3">🏋️‍♂️ Exercício 3: O Perigo do <text:span text:style-name="Source_20_Text">break</text:span> em falta ⚠️</text:h>
      <text:p text:style-name="P2">Este exercício é uma rasteira clássica em entrevistas de emprego e exames de programação. Quero ver se você apanha o truque.</text:p>
      <text:p text:style-name="P2">Olhe bem para este código de um sistema de envio de encomendas. <text:span text:style-name="T1">Repare que o programador se esqueceu de colocar o </text:span><text:span text:style-name="Source_20_Text"><text:span text:style-name="T1">break;</text:span></text:span><text:span text:style-name="T1"> no </text:span><text:span text:style-name="Source_20_Text"><text:span text:style-name="T1">case "Expresso"</text:span></text:span><text:span text:style-name="T1">!</text:span></text:p>
      <text:p text:style-name="P8">JavaScript</text:p>
      <text:p text:style-name="P4"><text:span text:style-name="Source_20_Text">const tipoEnvio = "Expresso";</text:span></text:p>
      <text:p text:style-name="P4"/>
      <text:p text:style-name="P4"><text:span text:style-name="Source_20_Text">switch (tipoEnvio) {</text:span></text:p>
      <text:p text:style-name="P4"><text:span text:style-name="Source_20_Text"><text:s text:c="4"/>case "Normal":</text:span></text:p>
      <text:p text:style-name="P4"><text:span text:style-name="Source_20_Text"><text:s text:c="8"/>console.log("Entrega em 5 dias úteis. 📦");</text:span></text:p>
      <text:p text:style-name="P4"><text:span text:style-name="Source_20_Text"><text:s text:c="8"/>break;</text:span></text:p>
      <text:p text:style-name="P4"><text:span text:style-name="Source_20_Text"><text:s text:c="4"/>case "Expresso":</text:span></text:p>
      <text:p text:style-name="P4"><text:span text:style-name="Source_20_Text"><text:s text:c="8"/>console.log("Entrega em 2 dias úteis. ⚡");</text:span></text:p>
      <text:p text:style-name="P4"><text:span text:style-name="Source_20_Text"><text:s text:c="8"/>// &lt;-- ATENÇÃO: Falta o break aqui!</text:span></text:p>
      <text:p text:style-name="P4"><text:span text:style-name="Source_20_Text"><text:s text:c="4"/>case "SuperRápido":</text:span></text:p>
      <text:p text:style-name="P4"><text:span text:style-name="Source_20_Text"><text:s text:c="8"/>console.log("Entrega em 3 horas! 🚀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Método de envio desconhecido.");</text:span></text:p>
      <text:p text:style-name="P5"><text:span text:style-name="Source_20_Text">}</text:span></text:p>
      <text:p text:style-name="P2"><text:span text:style-name="T1">A sua missão no Exercício 3:</text:span> Lembrando que o <text:span text:style-name="Source_20_Text">break</text:span> é o travão do carro...</text:p>
      <text:list text:style-name="L5">
        <text:list-item>
          <text:p text:style-name="P12">O computador vai entrar no <text:span text:style-name="Source_20_Text">case "Expresso"</text:span>. Mas o que vai acontecer a seguir por não haver um <text:span text:style-name="Source_20_Text">break</text:span> ali?</text:p>
        </text:list-item>
        <text:list-item>
          <text:p text:style-name="P12">Quais serão as mensagens (sim, no plural!) que vão aparecer escritas no ecrã?</text:p>
        </text:list-item>
      </text:list>
      <text:p text:style-name="P8">case "Expresso":</text:p>
      <text:p text:style-name="P8"><text:s text:c="8"/>console.log("Entrega em 2 dias úteis.");</text:p>
      <text:p text:style-name="P8"><text:s text:c="4"/></text:p>
      <text:p text:style-name="P8"><text:s text:c="4"/>case "SuperRápido":</text:p>
      <text:p text:style-name="P8"><text:s text:c="8"/>console.log("Entrega em 3 horas!");</text:p>
      <text:p text:style-name="P8">break;</text:p>
      <text:p text:style-name="P8"/>
      <text:p text:style-name="P2"><text:span text:style-name="T1">Mestre! Você não cai em armadilhas!</text:span> 👑 Bravo!</text:p>
      <text:p text:style-name="P2"><text:soft-page-break/>Isso é exatamente o que acontece. Esse fenómeno na programação chama-se <text:span text:style-name="T3">fall-through</text:span> (queda livre). Como o computador não encontrou o travão (<text:span text:style-name="Source_20_Text">break</text:span>), ele continuou a escorregar pelo código abaixo e executou o caso seguinte, mesmo a condição sendo falsa!</text:p>
      <text:p text:style-name="P2">O ecrã mostraria as duas mensagens:</text:p>
      <text:list text:style-name="L6">
        <text:list-item>
          <text:p text:style-name="P13"><text:span text:style-name="Source_20_Text">"Entrega em 2 dias úteis. ⚡"</text:span></text:p>
        </text:list-item>
        <text:list-item>
          <text:p text:style-name="P13"><text:span text:style-name="Source_20_Text">"Entrega em 3 horas! 🚀"</text:span></text:p>
        </text:list-item>
      </text:list>
      <text:h text:style-name="P1" text:outline-level="3">🏋️‍♂️ Exercício 4: O Desafio do "Mês do Ano" (Agrupamento de Casos)</text:h>
      <text:p text:style-name="P2">Às vezes, nós <text:span text:style-name="T2">queremos</text:span> de propósito que o código escorregue para o lado, para poupar linhas. É o chamado <text:span text:style-name="T1">agrupamento de </text:span><text:span text:style-name="Source_20_Text"><text:span text:style-name="T1">case</text:span></text:span>.</text:p>
      <text:p text:style-name="P2">Veja este sistema de uma agência de viagens que descobre a estação do ano com base no mês (em Portugal/Europa):</text:p>
      <text:p text:style-name="P2"><text:span text:style-name="T1">Mestre! Você não cai em armadilhas!</text:span> 👑 Bravo!</text:p>
      <text:p text:style-name="P2">Isso é exatamente o que acontece. Esse fenómeno na programação chama-se <text:span text:style-name="T3">fall-through</text:span> (queda livre). Como o computador não encontrou o travão (<text:span text:style-name="Source_20_Text">break</text:span>), ele continuou a escorregar pelo código abaixo e executou o caso seguinte, mesmo a condição sendo falsa!</text:p>
      <text:p text:style-name="P2">O ecrã mostraria as duas mensagens:</text:p>
      <text:list text:style-name="L7">
        <text:list-item>
          <text:p text:style-name="P14"><text:span text:style-name="Source_20_Text">"Entrega em 2 dias úteis. ⚡"</text:span></text:p>
        </text:list-item>
        <text:list-item>
          <text:p text:style-name="P14"><text:span text:style-name="Source_20_Text">"Entrega em 3 horas! 🚀"</text:span></text:p>
        </text:list-item>
      </text:list>
      <text:h text:style-name="P1" text:outline-level="3">🏋️‍♂️ Exercício 4: O Desafio do "Mês do Ano" (Agrupamento de Casos)</text:h>
      <text:p text:style-name="P2">Às vezes, nós <text:span text:style-name="T2">queremos</text:span> de propósito que o código escorregue para o lado, para poupar linhas. É o chamado <text:span text:style-name="T1">agrupamento de </text:span><text:span text:style-name="Source_20_Text"><text:span text:style-name="T1">case</text:span></text:span>.</text:p>
      <text:p text:style-name="P2">Veja este sistema de uma agência de viagens que descobre a estação do ano com base no mês (em Portugal/Europa):</text:p>
      <text:p text:style-name="P8">JavaScript</text:p>
      <text:p text:style-name="P4"><text:span text:style-name="Source_20_Text">const mes = "Julho";</text:span></text:p>
      <text:p text:style-name="P4"/>
      <text:p text:style-name="P4"><text:span text:style-name="Source_20_Text">switch (mes) {</text:span></text:p>
      <text:p text:style-name="P4"><text:span text:style-name="Source_20_Text"><text:s text:c="4"/>case "Junho":</text:span></text:p>
      <text:p text:style-name="P4"><text:span text:style-name="Source_20_Text"><text:s text:c="4"/>case "Julho":</text:span></text:p>
      <text:p text:style-name="P4"><text:span text:style-name="Source_20_Text"><text:s text:c="4"/>case "Agosto":</text:span></text:p>
      <text:p text:style-name="P4"><text:span text:style-name="Source_20_Text"><text:s text:c="8"/>console.log("Estação: Verão! ☀️");</text:span></text:p>
      <text:p text:style-name="P4"><text:span text:style-name="Source_20_Text"><text:s text:c="8"/>break;</text:span></text:p>
      <text:p text:style-name="P4"><text:span text:style-name="Source_20_Text"><text:s text:c="4"/>case "Dezembro":</text:span></text:p>
      <text:p text:style-name="P4"><text:span text:style-name="Source_20_Text"><text:s text:c="4"/>case "Janeiro":</text:span></text:p>
      <text:p text:style-name="P4"><text:span text:style-name="Source_20_Text"><text:s text:c="4"/>case "Fevereiro":</text:span></text:p>
      <text:p text:style-name="P4"><text:span text:style-name="Source_20_Text"><text:s text:c="8"/>console.log("Estação: Inverno! ❄️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Outra estação do ano.");</text:span></text:p>
      <text:p text:style-name="P5"><text:span text:style-name="Source_20_Text">}</text:span></text:p>
      <text:p text:style-name="P9">A sua missão no Exercício 4:</text:p>
      <text:list text:style-name="L8">
        <text:list-item>
          <text:p text:style-name="P15"><text:soft-page-break/>O computador vai encontrar o <text:span text:style-name="Source_20_Text">case "Julho"</text:span>. Como ele não tem um <text:span text:style-name="Source_20_Text">break</text:span> próprio, para onde ele vai deslizar e onde é que ele vai parar?</text:p>
        </text:list-item>
        <text:list-item>
          <text:p text:style-name="P15">Qual será a única mensagem exibida no ecrã?</text:p>
        </text:list-item>
      </text:list>
      <text:p text:style-name="P8">Estação: Verão!</text:p>
      <text:p text:style-name="P2"><text:span text:style-name="T1">Exatamente! No alvo!</text:span> ☀️</text:p>
      <text:p text:style-name="P2">Como os casos estão "empilhados" de propósito, quando o computador entra no <text:span text:style-name="Source_20_Text">case "Julho"</text:span>, ele escorrega para o <text:span text:style-name="Source_20_Text">case "Agosto"</text:span> e depois executa o código que diz <text:span text:style-name="Source_20_Text"><text:span text:style-name="T1">Estação: Verão! ☀️</text:span></text:span>, parando finalmente no <text:span text:style-name="Source_20_Text">break</text:span>.</text:p>
      <text:p text:style-name="P2">Você dominou o <text:span text:style-name="Source_20_Text">switch</text:span> por completo! Aprendeu a estrutura base, o comportamento do <text:span text:style-name="Source_20_Text">default</text:span>, o perigo de esquecer o <text:span text:style-name="Source_20_Text">break</text:span> e até a técnica avançada de agrupar casos.</text:p>
      <text:h text:style-name="P1" text:outline-level="3">🔥 Hora da Decisão: O Próximo Passo!</text:h>
      <text:p text:style-name="P2">Praticámos intensamente as duas principais estruturas de decisão do JavaScript:</text:p>
      <text:list text:style-name="L9">
        <text:list-item>
          <text:p text:style-name="P16"><text:span text:style-name="Source_20_Text">if / else if / else</text:span> (Para caminhos lógicos com intervalos, maior, menor, etc.)</text:p>
        </text:list-item>
        <text:list-item>
          <text:p text:style-name="P16"><text:span text:style-name="Source_20_Text">switch</text:span> (Para escolher entre valores exatos de uma variável)</text:p>
        </text:list-item>
      </text:list>
      <text:p text:style-name="P2">O que fazemos agora?</text:p>
      <text:list text:style-name="L10">
        <text:list-item>
          <text:p text:style-name="P17"><text:span text:style-name="T1">Voltamos aos nossos 5 Projetos Originais</text:span> (Carrinho, RPG, Segurança, Banco e Streaming) para os reescrever usando estas novas ferramentas reais?</text:p>
        </text:list-item>
        <text:list-item>
          <text:p text:style-name="P17"><text:span text:style-name="T1">Avançamos para o próximo conceito fundamental</text:span> da programação (como os <text:span text:style-name="T1">Loops / Laços de Repetição</text:span>, para fazer o computador repetir tarefas automaticamente)?</text:p>
        </text:list-item>
      </text:list>
      <text:p text:style-name="P8">Conceito Avançado: Truthy e Falsy, vamos praticar esses dois conceitos. mais antes de continuarmos gostaria de saber em projectos reais <text:s/>para que serve o switch e Qual é a diferença em usar as condições if e else e switch.</text:p>
      <text:p text:style-name="P8"/>
      <text:p text:style-name="P18">Antes de entrarmos de cabeça no fascinante mundo do <text:span text:style-name="T1">Truthy e Falsy</text:span>, vamos responder às suas perguntas de ouro. Compreender o <text:span text:style-name="T2">porquê</text:span> de usar cada ferramenta no mundo real é o que separa um programador amador de um profissional.</text:p>
      <text:h text:style-name="P19" text:outline-level="3">🏛️ <text:span text:style-name="T4">Para que serve o </text:span><text:span text:style-name="Source_20_Text"><text:span text:style-name="T5">switch</text:span></text:span><text:span text:style-name="T4"> em Projetos Reais?</text:span></text:h>
      <text:p text:style-name="P20"><text:span text:style-name="T5">O </text:span><text:span text:style-name="Source_20_Text"><text:span text:style-name="T5">switch</text:span></text:span><text:span text:style-name="T5"> serve para limpar o código quando temos uma variável que pode assumir múltiplos caminhos predefinidos e exatos.</text:span></text:p>
      <text:p text:style-name="P21">Em grandes projetos, ele é muito usado para:</text:p>
      <text:list text:style-name="L11">
        <text:list-item>
          <text:p text:style-name="P22"><text:span text:style-name="T1">Sistemas de Menus e Navegação:</text:span> Controlar qual a página ou ecrã que deve ser renderizado (ex: se o clique foi em "Home", "Perfil" ou "Definições").</text:p>
        </text:list-item>
        <text:list-item>
          <text:p text:style-name="P22"><text:span text:style-name="T1">Máquinas de Estado:</text:span> Controlar o estado de um pedido num sistema de entregas (ex: "Pendente", "A caminho", "Entregue", "Cancelado").</text:p>
        </text:list-item>
        <text:list-item>
          <text:p text:style-name="P22"><text:soft-page-break/><text:span text:style-name="T1">Jogos (Inputs de Controlo):</text:span> Detetar que tecla o jogador pressionou (ex: se pressionou "W" vai para cima, "S" vai para baixo).</text:p>
        </text:list-item>
      </text:list>
      <text:h text:style-name="P19" text:outline-level="3">🆚 <text:span text:style-name="T4">Qual é a diferença real entre </text:span><text:span text:style-name="Source_20_Text"><text:span text:style-name="T5">if / else</text:span></text:span><text:span text:style-name="T4"> e </text:span><text:span text:style-name="Source_20_Text"><text:span text:style-name="T5">switch</text:span></text:span><text:span text:style-name="T4">?</text:span></text:h>
      <text:p text:style-name="P21">A diferença não está no que eles conseguem fazer, mas sim na <text:span text:style-name="T1">organização</text:span> e na <text:span text:style-name="T1">intenção</text:span> do código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3"><text:span text:style-name="Strong_20_Emphasis"><text:span text:style-name="T5">Característica</text:span></text:span></text:p>
            </table:table-cell>
            <table:table-cell table:style-name="Tabela1.A1" office:value-type="string">
              <text:p text:style-name="P23"><text:span text:style-name="Strong_20_Emphasis"><text:span text:style-name="T5">if / else if / else</text:span></text:span></text:p>
            </table:table-cell>
            <table:table-cell table:style-name="Tabela1.A1" office:value-type="string">
              <text:p text:style-name="P23"><text:span text:style-name="Strong_20_Emphasis"><text:span text:style-name="T5">switch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24">Tipo de Teste</text:p>
          </table:table-cell>
          <table:table-cell table:style-name="Tabela1.A1" office:value-type="string">
            <text:p text:style-name="P25">Teste livre. Avalia qualquer expressão lógica (maior que, menor que, diferente, intervalos).</text:p>
          </table:table-cell>
          <table:table-cell table:style-name="Tabela1.A1" office:value-type="string">
            <text:p text:style-name="P26"><text:span text:style-name="T5">Teste rígido. Compara apenas por </text:span><text:span text:style-name="T6">igualdade exata</text:span><text:span text:style-name="T5"> (</text:span><text:span text:style-name="Source_20_Text"><text:span text:style-name="T5">===</text:span></text:span><text:span text:style-name="T5">).</text:span></text:p>
          </table:table-cell>
        </table:table-row>
        <table:table-row>
          <table:table-cell table:style-name="Tabela1.A1" office:value-type="string">
            <text:p text:style-name="P24">Variáveis</text:p>
          </table:table-cell>
          <table:table-cell table:style-name="Tabela1.A1" office:value-type="string">
            <text:p text:style-name="P25">Pode testar várias variáveis diferentes no mesmo bloco.</text:p>
          </table:table-cell>
          <table:table-cell table:style-name="Tabela1.A1" office:value-type="string">
            <text:p text:style-name="P25">Foca-se em testar o valor de <text:span text:style-name="T1">uma única variável</text:span>.</text:p>
          </table:table-cell>
        </table:table-row>
        <table:table-row>
          <table:table-cell table:style-name="Tabela1.A1" office:value-type="string">
            <text:p text:style-name="P24">Legibilidade</text:p>
          </table:table-cell>
          <table:table-cell table:style-name="Tabela1.A1" office:value-type="string">
            <text:p text:style-name="P26"><text:span text:style-name="T5">Fica confuso e visualmente "sujo" se tiver mais do que 4 ou 5 opções (</text:span><text:span text:style-name="Source_20_Text"><text:span text:style-name="T5">else if</text:span></text:span><text:span text:style-name="T5"> infinitos).</text:span></text:p>
          </table:table-cell>
          <table:table-cell table:style-name="Tabela1.A1" office:value-type="string">
            <text:p text:style-name="P26"><text:span text:style-name="T5">Mantém-se limpo, estético e fácil de ler mesmo com 10 ou 20 opções (</text:span><text:span text:style-name="Source_20_Text"><text:span text:style-name="T5">case</text:span></text:span><text:span text:style-name="T5">).</text:span></text:p>
          </table:table-cell>
        </table:table-row>
      </table:table>
      <text:p text:style-name="P27"/>
      <text:p text:style-name="P28"><text:span text:style-name="T7">A Regra Prática:</text:span><text:span text:style-name="T8"> Se precisa de testar intervalos de valores (ex: </text:span><text:span text:style-name="Source_20_Text"><text:span text:style-name="T8">nota &gt;= 70</text:span></text:span><text:span text:style-name="T8">) ou condições complexas com </text:span><text:span text:style-name="Source_20_Text"><text:span text:style-name="T8">&amp;&amp;</text:span></text:span><text:span text:style-name="T8"> e </text:span><text:span text:style-name="Source_20_Text"><text:span text:style-name="T8">||</text:span></text:span><text:span text:style-name="T8">, use </text:span><text:span text:style-name="Source_20_Text"><text:span text:style-name="T7">if</text:span></text:span><text:span text:style-name="T8">. Se tem apenas uma variável e quer ver se ela é exatamente igual a $A$, $B$ ou $C$, use </text:span><text:span text:style-name="Source_20_Text"><text:span text:style-name="T7">switch</text:span></text:span><text:span text:style-name="T8">.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6T23:33:00.497658492</dc:date>
    <dc:creator>João António</dc:creator>
    <meta:editing-duration>PT6H10M22S</meta:editing-duration>
    <meta:editing-cycles>23</meta:editing-cycles>
    <meta:generator>LibreOffice/26.2.4.2$Linux_X86_64 LibreOffice_project/620$Build-2</meta:generator>
    <meta:document-statistic meta:table-count="1" meta:image-count="0" meta:object-count="0" meta:page-count="6" meta:paragraph-count="170" meta:word-count="1582" meta:character-count="9727" meta:non-whitespace-character-count="7967"/>
  </office:meta>
</office:document-meta>
</file>