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6cbdf"/>
    </style:style>
    <style:style style:name="P2" style:family="paragraph" style:parent-style-name="Text_20_body">
      <style:text-properties officeooo:rsid="0016cbdf"/>
    </style:style>
    <style:style style:name="P3" style:family="paragraph" style:parent-style-name="Heading_20_3">
      <style:text-properties officeooo:rsid="0016cbdf"/>
    </style:style>
    <style:style style:name="P4" style:family="paragraph" style:parent-style-name="Text_20_body" style:list-style-name="L1">
      <style:text-properties officeooo:rsid="0016cbdf"/>
    </style:style>
    <style:style style:name="P5" style:family="paragraph" style:parent-style-name="Preformatted_20_Text">
      <style:text-properties officeooo:rsid="0016cbdf"/>
    </style:style>
    <style:style style:name="P6" style:family="paragraph" style:parent-style-name="Preformatted_20_Text">
      <style:paragraph-properties fo:margin-top="0cm" fo:margin-bottom="0.499cm" style:contextual-spacing="false"/>
      <style:text-properties officeooo:rsid="0016cbdf"/>
    </style:style>
    <style:style style:name="P7" style:family="paragraph" style:parent-style-name="Text_20_body">
      <style:text-properties fo:font-weight="bold" officeooo:rsid="0016cbdf"/>
    </style:style>
    <style:style style:name="P8" style:family="paragraph" style:parent-style-name="Text_20_body" style:list-style-name="L2">
      <style:text-properties officeooo:rsid="0016cbdf"/>
    </style:style>
    <style:style style:name="P9" style:family="paragraph" style:parent-style-name="Text_20_body" style:list-style-name="L3">
      <style:text-properties officeooo:rsid="0016cbdf"/>
    </style:style>
    <style:style style:name="P10" style:family="paragraph" style:parent-style-name="Text_20_body" style:list-style-name="L4">
      <style:text-properties officeooo:rsid="0016cbdf"/>
    </style:style>
    <style:style style:name="T1" style:family="text">
      <style:text-properties fo:font-weight="bold"/>
    </style:style>
    <style:style style:name="T2" style:family="text">
      <style:text-properties officeooo:rsid="00191197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lha eu esta segunda fase começamos mal. vamos fazer como a primeira fase que foi: primeiro os exercicios de depois os projectos. então vamos recomeçar vamos fazer primeiros os exerciso de estrutura condicinais so assim vamos pegar nos projetos. vamos começar com a pratica da Estrutura condicional if, else if e else.</text:p>
      <text:p text:style-name="P1"/>
      <text:p text:style-name="P2">Tens toda a razão! Peço desculpa por ter acelerado o passo. O teu plano é muito melhor: primeiro dominamos a ferramenta com exercícios simples e isolados, e só depois é que a aplicamos nos nossos projetos grandes. Vamos fazer exatamente como na primeira fase!</text:p>
      <text:p text:style-name="P2">Vamos reiniciar do zero, focando apenas em <text:span text:style-name="T1">exercícios práticos</text:span> de <text:span text:style-name="Source_20_Text">if</text:span>, <text:span text:style-name="Source_20_Text">else if</text:span> e <text:span text:style-name="Source_20_Text">else</text:span>.</text:p>
      <text:h text:style-name="P3" text:outline-level="3">🧱 Como funciona o mecanismo (A Regra de Ouro)</text:h>
      <text:p text:style-name="P2">O computador lê as condições <text:span text:style-name="T1">de cima para baixo</text:span>. Assim que ele encontra a primeira condição que é <text:span text:style-name="T1">verdadeira</text:span>:</text:p>
      <text:list text:style-name="L1">
        <text:list-item>
          <text:p text:style-name="P4">Ele entra nesse bloco e executa o código lá dentro.</text:p>
        </text:list-item>
        <text:list-item>
          <text:p text:style-name="P4"><text:span text:style-name="T1">Ele ignora e salta o resto da estrutura inteira</text:span> (não quer saber dos outros <text:span text:style-name="Source_20_Text">else if</text:span> ou <text:span text:style-name="Source_20_Text">else</text:span>).</text:p>
        </text:list-item>
      </text:list>
      <text:p text:style-name="P2">Se nenhuma for verdadeira, ele executa o <text:span text:style-name="Source_20_Text">else</text:span>.</text:p>
      <text:h text:style-name="P3" text:outline-level="3">🏋️‍♂️ Exercício 1: O Semáforo (Trânsito)</text:h>
      <text:p text:style-name="P2">Imagina que estamos a programar o sistema de um carro autónomo. Ele olha para a cor do semáforo e decide o que fazer.</text:p>
      <text:p text:style-name="P1">JavaScript</text:p>
      <text:p text:style-name="P5"><text:span text:style-name="Source_20_Text">const corSemaforo = "Amarelo";</text:span></text:p>
      <text:p text:style-name="P5"/>
      <text:p text:style-name="P5"><text:span text:style-name="Source_20_Text">if (corSemaforo === "Verde") {</text:span></text:p>
      <text:p text:style-name="P5"><text:span text:style-name="Source_20_Text"><text:s text:c="4"/>console.log("Avançar! 🚗");</text:span></text:p>
      <text:p text:style-name="P5"><text:span text:style-name="Source_20_Text">} else if (corSemaforo === "Amarelo") {</text:span></text:p>
      <text:p text:style-name="P5"><text:span text:style-name="Source_20_Text"><text:s text:c="4"/>console.log("Atenção, abrandar! ⚠️");</text:span></text:p>
      <text:p text:style-name="P5"><text:span text:style-name="Source_20_Text">} else if (corSemaforo === "Vermelho") {</text:span></text:p>
      <text:p text:style-name="P5"><text:span text:style-name="Source_20_Text"><text:s text:c="4"/>console.log("Paragem obrigatória! 🛑");</text:span></text:p>
      <text:p text:style-name="P5"><text:span text:style-name="Source_20_Text">} else {</text:span></text:p>
      <text:p text:style-name="P5"><text:span text:style-name="Source_20_Text"><text:s text:c="4"/>console.log("Sinal avariado, piscar luzes.");</text:span></text:p>
      <text:p text:style-name="P6"><text:span text:style-name="Source_20_Text">}</text:span></text:p>
      <text:p text:style-name="P7">A tua missão no Exercício 1:</text:p>
      <text:list text:style-name="L2">
        <text:list-item>
          <text:p text:style-name="P8">Qual é a condição que vai dar <text:span text:style-name="Source_20_Text">true</text:span>?</text:p>
        </text:list-item>
        <text:list-item>
          <text:p text:style-name="P8">O que vai aparecer escrito no ecrã (<text:span text:style-name="Source_20_Text">console.log</text:span>)?</text:p>
        </text:list-item>
      </text:list>
      <text:p text:style-name="P1"><text:s/>else if (corSemaforo === "Amarelo") {</text:p>
      <text:p text:style-name="P1">console.log("Anteção, abra<text:span text:style-name="T2">n</text:span>dar!");</text:p>
      <text:p text:style-name="P1"/>
      <text:p text:style-name="P2"><text:span text:style-name="T1">Na mouche! Perfeito!</text:span> 🎯</text:p>
      <text:p text:style-name="P2">O computador leu a primeira linha (<text:span text:style-name="Source_20_Text">if</text:span>), viu que "Amarelo" não é igual a "Verde" e passou à frente. Quando chegou ao primeiro <text:span text:style-name="Source_20_Text">else if</text:span>, a condição foi <text:span text:style-name="T1">verdadeira</text:span> (<text:span text:style-name="Source_20_Text">true</text:span>), por isso ele entrou aí e executou o código.</text:p>
      <text:p text:style-name="P2"><text:soft-page-break/>Como prometido, vamos continuar a praticar com exercícios isolados até estares super confortável.</text:p>
      <text:h text:style-name="P3" text:outline-level="3">🏋️‍♂️ Exercício 2: A Temperatura da Água</text:h>
      <text:p text:style-name="P2">Imagina que estamos a programar o sensor de uma chaleira elétrica inteligente. Ela mede a temperatura da água (em graus) e diz o estado atual.</text:p>
      <text:p text:style-name="P1">JavaScript</text:p>
      <text:p text:style-name="P5"><text:span text:style-name="Source_20_Text">const temperatura = 100;</text:span></text:p>
      <text:p text:style-name="P5"/>
      <text:p text:style-name="P5"><text:span text:style-name="Source_20_Text">if (temperatura &lt; 20) {</text:span></text:p>
      <text:p text:style-name="P5"><text:span text:style-name="Source_20_Text"><text:s text:c="4"/>console.log("A água está fria. ❄️");</text:span></text:p>
      <text:p text:style-name="P5"><text:span text:style-name="Source_20_Text">} else if (temperatura &lt; 100) {</text:span></text:p>
      <text:p text:style-name="P5"><text:span text:style-name="Source_20_Text"><text:s text:c="4"/>console.log("A água está quente/morna. ☕");</text:span></text:p>
      <text:p text:style-name="P5"><text:span text:style-name="Source_20_Text">} else if (temperatura === 100) {</text:span></text:p>
      <text:p text:style-name="P5"><text:span text:style-name="Source_20_Text"><text:s text:c="4"/>console.log("A água está a ferver! 🌋");</text:span></text:p>
      <text:p text:style-name="P5"><text:span text:style-name="Source_20_Text">} else {</text:span></text:p>
      <text:p text:style-name="P5"><text:span text:style-name="Source_20_Text"><text:s text:c="4"/>console.log("Temperatura crítica! Desligar sistema!");</text:span></text:p>
      <text:p text:style-name="P6"><text:span text:style-name="Source_20_Text">}</text:span></text:p>
      <text:p text:style-name="P7">A tua missão no Exercício 2:</text:p>
      <text:list text:style-name="L3">
        <text:list-item>
          <text:p text:style-name="P9">O computador vai entrar em qual das divisões (<text:span text:style-name="Source_20_Text">if</text:span>, no primeiro <text:span text:style-name="Source_20_Text">else if</text:span>, no segundo <text:span text:style-name="Source_20_Text">else if</text:span> ou no <text:span text:style-name="Source_20_Text">else</text:span>)?</text:p>
        </text:list-item>
        <text:list-item>
          <text:p text:style-name="P9">Qual é a mensagem exata que vai aparecer no ecrã?</text:p>
        </text:list-item>
      </text:list>
      <text:p text:style-name="P1">else if (temperatura === 100) {</text:p>
      <text:p text:style-name="P1">console.log ("A água está a ferver!");</text:p>
      <text:p text:style-name="P2"><text:span text:style-name="T1">Exato! Certíssimo outra vez!</text:span> 🏆</text:p>
      <text:p text:style-name="P2">O computador leu de cima a baixo:</text:p>
      <text:list text:style-name="L4">
        <text:list-item>
          <text:p text:style-name="P10"><text:span text:style-name="Source_20_Text">100 &lt; 20</text:span>? Falso.</text:p>
        </text:list-item>
        <text:list-item>
          <text:p text:style-name="P10"><text:span text:style-name="Source_20_Text">100 &lt; 100</text:span>? Falso (100 não é menor que 100, é igual).</text:p>
        </text:list-item>
        <text:list-item>
          <text:p text:style-name="P10"><text:span text:style-name="Source_20_Text">100 === 100</text:span>? <text:span text:style-name="T1">Verdadeiro!</text:span> Por isso, ele entrou direto no segundo <text:span text:style-name="Source_20_Text">else if</text:span> e mostrou a mensagem: <text:span text:style-name="Source_20_Text">"A água está a ferver!"</text:span>.</text:p>
        </text:list-item>
      </text:list>
      <text:h text:style-name="P3" text:outline-level="3">🏋️‍♂️ Exercício 3: O Teste de Velocidade (Radares)</text:h>
      <text:p text:style-name="P2">Vamos fazer mais um exercício antes de subirmos a fasquia. Desta vez, és o programador de um radar de trânsito que passa multas ou dá avisos com base na velocidade do condutor.</text:p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  <style:master-page style:name="Envelope" style:page-layout-name="Mpm4"/>
    <style:master-page style:name="Index" style:page-layout-name="Mpm1"/>
    <style:master-page style:name="HTML" style:page-layout-name="Mpm5"/>
    <style:master-page style:name="Footnote" style:page-layout-name="Mpm6"/>
    <style:master-page style:name="Endnote" style:page-layout-name="Mpm6"/>
    <style:master-page style:name="Landscape" style:page-layout-name="Mpm7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João António</meta:initial-creator>
    <meta:creation-date>2026-06-26T16:53:46.915108440</meta:creation-date>
    <dc:date>2026-06-26T21:15:03.188367553</dc:date>
    <dc:creator>João António</dc:creator>
    <meta:editing-duration>PT4H21M15S</meta:editing-duration>
    <meta:editing-cycles>8</meta:editing-cycles>
    <meta:generator>LibreOffice/26.2.4.2$Linux_X86_64 LibreOffice_project/620$Build-2</meta:generator>
    <meta:document-statistic meta:table-count="0" meta:image-count="0" meta:object-count="0" meta:page-count="2" meta:paragraph-count="54" meta:word-count="557" meta:character-count="3223" meta:non-whitespace-character-count="2696"/>
  </office:meta>
</office:document-meta>
</file>