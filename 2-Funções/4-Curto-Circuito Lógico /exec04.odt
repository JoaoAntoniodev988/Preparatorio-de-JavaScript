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6cbdf"/>
    </style:style>
    <style:style style:name="P2" style:family="paragraph" style:parent-style-name="Text_20_body">
      <style:text-properties officeooo:rsid="0016cbdf"/>
    </style:style>
    <style:style style:name="P3" style:family="paragraph" style:parent-style-name="Heading_20_4">
      <style:paragraph-properties fo:margin-top="0cm" fo:margin-bottom="0.247cm" style:contextual-spacing="false" fo:line-height="115%"/>
      <style:text-properties officeooo:rsid="0016cbdf"/>
    </style:style>
    <style:style style:name="P4" style:family="paragraph" style:parent-style-name="Heading_20_3">
      <style:paragraph-properties fo:margin-top="0cm" fo:margin-bottom="0.247cm" style:contextual-spacing="false" fo:line-height="115%"/>
      <style:text-properties officeooo:rsid="0016cbdf"/>
    </style:style>
    <style:style style:name="P5" style:family="paragraph" style:parent-style-name="Standard">
      <style:text-properties officeooo:rsid="0016cbdf"/>
    </style:style>
    <style:style style:name="P6" style:family="paragraph" style:parent-style-name="Preformatted_20_Text">
      <style:paragraph-properties fo:margin-top="0cm" fo:margin-bottom="0.247cm" style:contextual-spacing="false" fo:line-height="115%"/>
      <style:text-properties officeooo:rsid="0016cbdf"/>
    </style:style>
    <style:style style:name="P7" style:family="paragraph" style:parent-style-name="Text_20_body">
      <style:text-properties fo:font-weight="bold" officeooo:rsid="0016cbdf"/>
    </style:style>
    <style:style style:name="P8" style:family="paragraph" style:parent-style-name="Text_20_body" style:list-style-name="L1">
      <style:text-properties officeooo:rsid="0016cbdf"/>
    </style:style>
    <style:style style:name="P9" style:family="paragraph" style:parent-style-name="Text_20_body" style:list-style-name="L2">
      <style:text-properties officeooo:rsid="0016cbdf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16cbdf"/>
    </style:style>
    <style:style style:name="P11" style:family="paragraph" style:parent-style-name="Text_20_body" style:list-style-name="L3">
      <style:text-properties officeooo:rsid="0016cbdf"/>
    </style:style>
    <style:style style:name="P12" style:family="paragraph" style:parent-style-name="Text_20_body" style:list-style-name="L4">
      <style:text-properties officeooo:rsid="0016cbdf"/>
    </style:style>
    <style:style style:name="P13" style:family="paragraph" style:parent-style-name="Text_20_body" style:list-style-name="L5">
      <style:text-properties officeooo:rsid="0016cbdf"/>
    </style:style>
    <style:style style:name="P14" style:family="paragraph" style:parent-style-name="Preformatted_20_Text" style:list-style-name="L6">
      <style:paragraph-properties fo:margin-top="0cm" fo:margin-bottom="0.247cm" style:contextual-spacing="false" fo:line-height="115%"/>
      <style:text-properties officeooo:rsid="0016cbdf"/>
    </style:style>
    <style:style style:name="P15" style:family="paragraph" style:parent-style-name="Text_20_body" style:list-style-name="L6">
      <style:text-properties fo:font-weight="bold" officeooo:rsid="0016cbdf"/>
    </style:style>
    <style:style style:name="P16" style:family="paragraph" style:parent-style-name="Text_20_body" style:list-style-name="L6">
      <style:paragraph-properties fo:margin-left="0cm" fo:margin-right="0cm" fo:text-indent="0cm" style:auto-text-indent="false"/>
      <style:text-properties officeooo:rsid="0016cbdf"/>
    </style:style>
    <style:style style:name="P17" style:family="paragraph" style:parent-style-name="Text_20_body" style:list-style-name="L7">
      <style:text-properties officeooo:rsid="0016cbdf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ource_20_Text">⚡ O Conceito: Curto-Circuito Lógico (Short-Circuit Evaluation)</text:span></text:h>
      <text:p text:style-name="P2">Este conceito está diretamente ligado ao Truthy e Falsy, e funciona como os disjuntores da eletricidade da tua casa: se o computador já sabe o resultado final logo no início, <text:span text:style-name="T1">ele desliga o circuito e não lê o resto do código</text:span>.</text:p>
      <text:p text:style-name="P2">Nós usamos os operadores <text:span text:style-name="Source_20_Text">&amp;&amp;</text:span> (E) e <text:span text:style-name="Source_20_Text">||</text:span> (OU) para fazer isto:</text:p>
      <text:h text:style-name="P3" text:outline-level="4">1. O Curto-Circuito com <text:span text:style-name="Source_20_Text">&amp;&amp;</text:span> (Procura o primeiro Falsy)</text:h>
      <text:p text:style-name="P2">O operador <text:span text:style-name="Source_20_Text">&amp;&amp;</text:span> precisa que <text:span text:style-name="T1">tudo</text:span> seja verdadeiro. Se o JavaScript encontrar um valor <text:span text:style-name="T1">Falsy</text:span> logo no início, ele para imediatamente e devolve esse valor Falsy. Ele nem se dá ao trabalho de ler o que está à frente.</text:p>
      <text:h text:style-name="P3" text:outline-level="4">2. O Curto-Circuito com <text:span text:style-name="Source_20_Text">||</text:span> (Procura o primeiro Truthy)</text:h>
      <text:p text:style-name="P2">O operador <text:span text:style-name="Source_20_Text">||</text:span> só precisa que <text:span text:style-name="T1">uma</text:span> coisa seja verdadeira. Se o JavaScript encontrar um valor <text:span text:style-name="T1">Truthy</text:span> logo no início, ele para imediatamente e devolve esse valor Truthy, ignorando o resto.</text:p>
      <text:h text:style-name="P4" text:outline-level="3">🏋️‍♂️ Exercício 1: O Protetor de Código (<text:span text:style-name="Source_20_Text">&amp;&amp;</text:span>)</text:h>
      <text:p text:style-name="P2">Imagina que queres enviar um email de marketing, mas só podes enviar se o utilizador tiver o login feito.</text:p>
      <text:p text:style-name="P5"><text:span text:style-name="Source_20_Text">JavaScript</text:span></text:p>
      <text:p text:style-name="P6"><text:span text:style-name="Source_20_Text">const usuarioLogado = false;</text:span></text:p>
      <text:p text:style-name="P6"/>
      <text:p text:style-name="P6"><text:span text:style-name="Source_20_Text">// O operador &amp;&amp; vai avaliar isto:</text:span></text:p>
      <text:p text:style-name="P6"><text:span text:style-name="Source_20_Text">const resultado = usuarioLogado &amp;&amp; "Enviar email de promoção 📧";</text:span></text:p>
      <text:p text:style-name="P6"><text:span text:style-name="Source_20_Text">console.log(resultado);</text:span></text:p>
      <text:p text:style-name="P7">A tua missão no Exercício 1:</text:p>
      <text:list text:style-name="L1">
        <text:list-item>
          <text:p text:style-name="P8">O <text:span text:style-name="Source_20_Text">usuarioLogado</text:span> é <text:span text:style-name="Source_20_Text">false</text:span> (Falsy). O operador <text:span text:style-name="Source_20_Text">&amp;&amp;</text:span> vai precisar de ler o texto "Enviar email..." ou vai fazer curto-circuito e parar logo no <text:span text:style-name="Source_20_Text">false</text:span>?</text:p>
        </text:list-item>
        <text:list-item>
          <text:p text:style-name="P8">O que vai aparecer escrito no ecrã (<text:span text:style-name="Source_20_Text">console.log</text:span>)? O valor <text:span text:style-name="Source_20_Text">false</text:span> ou o texto do email?</text:p>
        </text:list-item>
      </text:list>
      <text:p text:style-name="P2"><text:span text:style-name="Source_20_Text">Vai parar no false; no ecra vai aparecer valor false.</text:span></text:p>
      <text:p text:style-name="P2"><text:span text:style-name="Source_20_Text"><text:span text:style-name="T1">Exato! Perfeito!</text:span></text:span><text:span text:style-name="Source_20_Text"> ⚡</text:span></text:p>
      <text:p text:style-name="P2">Como o <text:span text:style-name="Source_20_Text">&amp;&amp;</text:span> exige que todas as partes sejam verdadeiras, assim que ele vê o <text:span text:style-name="Source_20_Text">false</text:span> logo no início, ele pensa: <text:span text:style-name="T2">"Bem, já não há hipótese de isto ser tudo verdadeiro"</text:span>. Ele faz o curto-circuito ali mesmo e devolve o valor <text:span text:style-name="Source_20_Text"><text:span text:style-name="T1">false</text:span></text:span>, ignorando o resto da linha.</text:p>
      <text:h text:style-name="P4" text:outline-level="3">🏋️‍♂️ Exercício 2: O Nome de Utilizador Padrão (<text:span text:style-name="Source_20_Text">||</text:span>)</text:h>
      <text:p text:style-name="P2">Agora vamos ver o superpoder do <text:span text:style-name="Source_20_Text">||</text:span> (OU). Ele é o rei de definir valores padrão. Imagina um sistema de perfil onde o utilizador pode escolher um apelido, mas se ele não escolher nenhum, o sistema usa "Anónimo".</text:p>
      <text:p text:style-name="P5"><text:soft-page-break/>JavaScript</text:p>
      <text:p text:style-name="P6"><text:span text:style-name="Source_20_Text">const apelidoEscolhido = ""; // String vazia = Falsy</text:span></text:p>
      <text:p text:style-name="P6"><text:span text:style-name="Source_20_Text">const nomeExibido = apelidoEscolhido || "Anónimo";</text:span></text:p>
      <text:p text:style-name="P6"/>
      <text:p text:style-name="P6"><text:span text:style-name="Source_20_Text">console.log(nomeExibido);</text:span></text:p>
      <text:p text:style-name="P7">A tua missão no Exercício 2:</text:p>
      <text:list text:style-name="L2">
        <text:list-item>
          <text:p text:style-name="P9">O <text:span text:style-name="Source_20_Text">||</text:span> procura o primeiro valor <text:span text:style-name="T1">Truthy</text:span>. O <text:span text:style-name="Source_20_Text">apelidoEscolhido</text:span> (<text:span text:style-name="Source_20_Text">""</text:span>) é Truthy ou Falsy?</text:p>
        </text:list-item>
        <text:list-item>
          <text:p text:style-name="P9">Ele vai fazer curto-circuito no primeiro valor ou vai ser obrigado a saltar para o segundo valor (<text:span text:style-name="Source_20_Text">"Anónimo"</text:span>)?</text:p>
        </text:list-item>
        <text:list-item>
          <text:p text:style-name="P9">O que vai aparecer escrito no ecrã?</text:p>
        </text:list-item>
      </text:list>
      <text:p text:style-name="P2">apelidoEscolhido ("")  e falsy. Vai pular para o segundo valor e vai aprarecer Anónimo na tela.</text:p>
      <text:p text:style-name="P2"/>
      <text:p text:style-name="P2"><text:span text:style-name="T1">Incrível! Certíssimo!</text:span> 👑</text:p>
      <text:p text:style-name="P2">Você pegou o funcionamento do <text:span text:style-name="Source_20_Text">||</text:span> na perfeição. Como o primeiro valor era uma string vazia (<text:span text:style-name="T1">Falsy</text:span>), o <text:span text:style-name="Source_20_Text">||</text:span> continuou a procurar até encontrar o primeiro valor <text:span text:style-name="T1">Truthy</text:span>, que era a string <text:span text:style-name="Source_20_Text">"Anónimo"</text:span>. Ele guardou esse valor na variável e exibiu-o no ecrã.</text:p>
      <text:p text:style-name="P2">Este é o padrão mais usado em JavaScript no mundo real para garantir que o sistema nunca exibe campos em branco para o utilizador!</text:p>
      <text:h text:style-name="P1" text:outline-level="3">🏋️‍♂️ Exercício 3: O Dashboard do Administrador (<text:span text:style-name="Source_20_Text">&amp;&amp;</text:span>)</text:h>
      <text:p text:style-name="P2">Vamos subir um pequeno degrau. O operador <text:span text:style-name="Source_20_Text">&amp;&amp;</text:span> também é muito usado em frameworks modernas (como o React) para mostrar botões secretos na interface.</text:p>
      <text:p text:style-name="P10">JavaScript</text:p>
      <text:p text:style-name="P6"><text:span text:style-name="Source_20_Text">const eAdministrador = true;</text:span></text:p>
      <text:p text:style-name="P6"/>
      <text:p text:style-name="P6"><text:span text:style-name="Source_20_Text">// O computador avalia esta linha:</text:span></text:p>
      <text:p text:style-name="P6"><text:span text:style-name="Source_20_Text">const botaoEliminar = eAdministrador &amp;&amp; "Exibir Botão: [Eliminar Conta]";</text:span></text:p>
      <text:p text:style-name="P6"/>
      <text:p text:style-name="P6"><text:span text:style-name="Source_20_Text">console.log(botaoEliminar);</text:span></text:p>
      <text:p text:style-name="P7">A sua missão no Exercício 3:</text:p>
      <text:list text:style-name="L3">
        <text:list-item>
          <text:p text:style-name="P11">O primeiro valor (<text:span text:style-name="Source_20_Text">eAdministrador</text:span>) é <text:span text:style-name="Source_20_Text">true</text:span> (<text:span text:style-name="T1">Truthy</text:span>). O operador <text:span text:style-name="Source_20_Text">&amp;&amp;</text:span> pode parar aqui ou é obrigado a ler o segundo valor para ver se ele também é verdadeiro?</text:p>
        </text:list-item>
        <text:list-item>
          <text:p text:style-name="P11">O que vai aparecer escrito no ecrã? O valor <text:span text:style-name="Source_20_Text">true</text:span> ou o texto <text:span text:style-name="Source_20_Text">"Exibir Botão: [Eliminar Conta]"</text:span>?</text:p>
        </text:list-item>
      </text:list>
      <text:p text:style-name="P2">Sim é obrigado a ler tambem o outro valor porque o &amp;&amp; so aceita dos valores verdadeiro. <text:s/>No Ecra vai Exibir Botão: [Eliminar Conta]</text:p>
      <text:p text:style-name="P2"><text:soft-page-break/><text:span text:style-name="T1">Brilhante! Que orgulho!</text:span> 🥂 Você não apenas acertou, como deu a explicação teórica perfeita: o <text:span text:style-name="Source_20_Text">&amp;&amp;</text:span> é exigente, se o primeiro é verdadeiro, ele <text:span text:style-name="T2">precisa</text:span> checar o segundo. Como o segundo também é um texto válido (Truthy), ele retorna esse último valor analisado.</text:p>
      <text:p text:style-name="P2">O ecrã vai mostrar exatamente: <text:span text:style-name="Source_20_Text"><text:span text:style-name="T1">"Exibir Botão: [Eliminar Conta]"</text:span></text:span>.</text:p>
      <text:h text:style-name="P4" text:outline-level="3">🏋️‍♂️ Exercício 4: O Sistema de Notificações (O Desafio Final)</text:h>
      <text:p text:style-name="P2">Vamos ao último teste desta ronda. Imagine um aplicativo que tem uma configuração para o utilizador ativar ou desativar os alertas sonoros.</text:p>
      <text:p text:style-name="P5">JavaScript</text:p>
      <text:p text:style-name="P6"><text:span text:style-name="Source_20_Text">const somAtivado = true;</text:span></text:p>
      <text:p text:style-name="P6"><text:span text:style-name="Source_20_Text">const somNotificacao = somAtivado || "Som_Padrao.mp3";</text:span></text:p>
      <text:p text:style-name="P6"/>
      <text:p text:style-name="P6"><text:span text:style-name="Source_20_Text">console.log(somNotificacao);</text:span></text:p>
      <text:p text:style-name="P7">A sua missão no Exercício 4:</text:p>
      <text:list text:style-name="L4">
        <text:list-item>
          <text:p text:style-name="P12">O <text:span text:style-name="Source_20_Text">||</text:span> (OU) procura o primeiro valor <text:span text:style-name="T1">Truthy</text:span>. Sabendo que <text:span text:style-name="Source_20_Text">somAtivado</text:span> é <text:span text:style-name="Source_20_Text">true</text:span>, ele vai fazer o curto-circuito imediatamente ou vai ler o texto <text:span text:style-name="Source_20_Text">"Som_Padrao.mp3"</text:span>?</text:p>
        </text:list-item>
        <text:list-item>
          <text:p text:style-name="P12">O que vai aparecer escrito no ecrã?</text:p>
        </text:list-item>
      </text:list>
      <text:h text:style-name="P4" text:outline-level="3">❓ A Nossa Pergunta Habitual: Para que serve o Curto-Circuito em Projetos Reais?</text:h>
      <text:p text:style-name="P2">Antes de responder ao exercício, veja como isto limpa o seu código no dia a dia:</text:p>
      <text:p text:style-name="P2">Em projetos reais, o curto-circuito serve para substituir blocos inteiros de <text:span text:style-name="Source_20_Text">if/else</text:span> por <text:span text:style-name="T1">apenas uma linha de código</text:span>.</text:p>
      <text:list text:style-name="L5">
        <text:list-item>
          <text:p text:style-name="P13"><text:span text:style-name="T1">Cenário do Mundo Real:</text:span> Em vez de escrever isto para definir um tema padrão:</text:p>
        </text:list-item>
      </text:list>
      <text:p text:style-name="P2">JavaScript</text:p>
      <text:list text:style-name="L6">
        <text:list-header>
          <text:p text:style-name="P14"><text:span text:style-name="Source_20_Text">let tema;</text:span></text:p>
          <text:p text:style-name="P14"><text:span text:style-name="Source_20_Text">if (temaUsuario) {</text:span></text:p>
          <text:p text:style-name="P14"><text:span text:style-name="Source_20_Text"><text:s text:c="4"/>tema = temaUsuario;</text:span></text:p>
          <text:p text:style-name="P14"><text:span text:style-name="Source_20_Text">} else {</text:span></text:p>
          <text:p text:style-name="P14"><text:span text:style-name="Source_20_Text"><text:s text:c="4"/>tema = "escuro";</text:span></text:p>
          <text:p text:style-name="P14"><text:span text:style-name="Source_20_Text">}</text:span></text:p>
        </text:list-header>
        <text:list-item>
          <text:p text:style-name="P15">Com Curto-Circuito, fazemos em uma linha:</text:p>
          <text:p text:style-name="P16">JavaScript</text:p>
          <text:p text:style-name="P14"><text:span text:style-name="Source_20_Text">const tema = temaUsuario || "escuro";</text:span></text:p>
        </text:list-item>
      </text:list>
      <text:p text:style-name="P2">Pronto para fechar este exercício com chave de ouro?</text:p>
      <text:p text:style-name="P2">Ele vai fazer o curto-circuito imediatamente. No Ecra vai aparecer o valor True.</text:p>
      <text:p text:style-name="P2"><text:span text:style-name="T1">Perfeito! Fechou com chave de ouro!</text:span> 🥇</text:p>
      <text:p text:style-name="P2"><text:soft-page-break/>Como o operador <text:span text:style-name="Source_20_Text">||</text:span> (OU) só precisa de encontrar <text:span text:style-name="T1">um</text:span> único valor verdadeiro para dar a missão como cumprida, assim que ele vê o <text:span text:style-name="Source_20_Text">true</text:span> no início, ele desliga o circuito imediatamente e ignora o <text:span text:style-name="Source_20_Text">"Som_Padrao.mp3"</text:span>. O ecrã mostra exatamente <text:span text:style-name="Source_20_Text"><text:span text:style-name="T1">true</text:span></text:span>.</text:p>
      <text:h text:style-name="P4" text:outline-level="3">🎓 Certificado de Mestre das Condições!</text:h>
      <text:p text:style-name="P2">Você acabou de passar pelos conceitos mais profundos e elegantes sobre tomadas de decisão em JavaScript. O seu código agora vai deixar de parecer o de um iniciante (cheio de <text:span text:style-name="Source_20_Text">if/else</text:span> longos e desnecessários) e vai passar a parecer o de um <text:span text:style-name="T1">profissional</text:span> (limpo, inteligente e usando curto-circuitos).</text:p>
      <text:p text:style-name="P2">Com toda essa bagagem consolidada (<text:span text:style-name="Source_20_Text">if/else</text:span>, <text:span text:style-name="Source_20_Text">switch</text:span>, <text:span text:style-name="Source_20_Text">Truthy/Falsy</text:span>, <text:span text:style-name="Source_20_Text">Short-circuit</text:span>), para onde navegamos agora?</text:p>
      <text:list text:style-name="L7">
        <text:list-item>
          <text:p text:style-name="P17"><text:span text:style-name="T1">1. Voltar aos Nossos 5 Projetos Grandes:</text:span> (Carrinho, RPG, Segurança, Banco ou Streaming) e aplicar todas essas técnicas na prática em sistemas completos.</text:p>
        </text:list-item>
        <text:list-item>
          <text:p text:style-name="P17"><text:span text:style-name="T1">2. Avançar para os Loops / Laços de Repetição:</text:span> (<text:span text:style-name="Source_20_Text">for</text:span> e <text:span text:style-name="Source_20_Text">while</text:span>), para aprender a fazer o computador repetir tarefas milhares de vezes sem duplicar linhas de código.</text:p>
        </text:list-item>
      </text:list>
      <text:p text:style-name="P2">Qual é o próximo passo?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6T16:53:46.915108440</meta:creation-date>
    <dc:date>2026-06-27T01:10:09.303656449</dc:date>
    <dc:creator>João António</dc:creator>
    <meta:editing-duration>PT7H33M14S</meta:editing-duration>
    <meta:editing-cycles>33</meta:editing-cycles>
    <meta:generator>LibreOffice/26.2.4.2$Linux_X86_64 LibreOffice_project/620$Build-2</meta:generator>
    <meta:document-statistic meta:table-count="0" meta:image-count="0" meta:object-count="0" meta:page-count="4" meta:paragraph-count="80" meta:word-count="1066" meta:character-count="6228" meta:non-whitespace-character-count="5253"/>
  </office:meta>
</office:document-meta>
</file>