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1ef461"/>
    </style:style>
    <style:style style:name="P4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5" style:family="paragraph" style:parent-style-name="Preformatted_20_Text">
      <style:paragraph-properties fo:line-height="114%"/>
      <style:text-properties fo:color="#1f1f1f" loext:opacity="100%" style:font-name="Google Sans Flex" fo:font-size="12.75pt" officeooo:rsid="001ef461"/>
    </style:style>
    <style:style style:name="P6" style:family="paragraph" style:parent-style-name="Preformatted_20_Text">
      <style:paragraph-properties fo:margin-top="0cm" fo:margin-bottom="0.499cm" style:contextual-spacing="false" fo:line-height="114%"/>
      <style:text-properties fo:color="#1f1f1f" loext:opacity="100%" style:font-name="Google Sans Flex" fo:font-size="12.75pt" officeooo:rsid="001ef461"/>
    </style:style>
    <style:style style:name="P7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8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P9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1ef461"/>
    </style:style>
    <style:style style:name="P10" style:family="paragraph" style:parent-style-name="Quotations">
      <style:paragraph-properties fo:line-height="114%"/>
      <style:text-properties fo:color="#1f1f1f" loext:opacity="100%" style:font-name="Google Sans Flex" fo:font-size="12.75pt" officeooo:rsid="001ef461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nçar para novos projetos é a melhor forma de testar as tuas novas superpoderes em cenários frescos! Vamos criar <text:span text:style-name="T1">3 novos projetos interativos</text:span>, desenhados especificamente para aplicares tudo o que aprendeste: <text:span text:style-name="Source_20_Text">if/else</text:span>, <text:span text:style-name="Source_20_Text">switch</text:span>, <text:span text:style-name="Source_20_Text">Truthy/Falsy</text:span> e <text:span text:style-name="Source_20_Text">Curto-Circuito</text:span>.</text:p>
      <text:p text:style-name="P2">Aqui estão os novos desafios do teu portefólio:</text:p>
      <text:h text:style-name="P3" text:outline-level="3">🎮 Projeto 1: O Sistema de Combate de um RPG (Turno do Boss)</text:h>
      <text:p text:style-name="P2"><text:span text:style-name="T1">Objetivo:</text:span> Criar a lógica que calcula o que acontece quando o Boss final ataca o jogador, usando curto-circuito para defesas e <text:span text:style-name="Source_20_Text">switch</text:span> para o tipo de feitiço.</text:p>
      <text:p text:style-name="P4">JavaScript</text:p>
      <text:p text:style-name="P5"><text:span text:style-name="Source_20_Text">// Configuração do Personagem</text:span></text:p>
      <text:p text:style-name="P5"><text:span text:style-name="Source_20_Text">const nomeJogador = "Aragorn";</text:span></text:p>
      <text:p text:style-name="P5"><text:span text:style-name="Source_20_Text">const escudoAtivo = false; // &lt;-- Mudei para false!</text:span></text:p>
      <text:p text:style-name="P5"><text:span text:style-name="Source_20_Text">const pocaoDefesa = "Poção de Ferro 🧪"; // &lt;-- Agora ele tem uma poção!</text:span></text:p>
      <text:p text:style-name="P5"/>
      <text:p text:style-name="P5"><text:span text:style-name="Source_20_Text">// 1. Curto-circuito avaliando a defesa:</text:span></text:p>
      <text:p text:style-name="P5"><text:span text:style-name="Source_20_Text">const defesaFinal = escudoAtivo || pocaoDefesa || false;</text:span></text:p>
      <text:p text:style-name="P5"/>
      <text:p text:style-name="P5"><text:span text:style-name="Source_20_Text">const feitiçoBoss = "Raio"; // &lt;-- Mudei para Raio!</text:span></text:p>
      <text:p text:style-name="P5"><text:span text:style-name="Source_20_Text">let danoBase = 0;</text:span></text:p>
      <text:p text:style-name="P5"/>
      <text:p text:style-name="P5"><text:span text:style-name="Source_20_Text">// 2. Seleção do dano base:</text:span></text:p>
      <text:p text:style-name="P5"><text:span text:style-name="Source_20_Text">switch (feitiçoBoss) {</text:span></text:p>
      <text:p text:style-name="P5"><text:span text:style-name="Source_20_Text"><text:s text:c="4"/>case "Fogo":</text:span></text:p>
      <text:p text:style-name="P5"><text:span text:style-name="Source_20_Text"><text:s text:c="8"/>danoBase = 100;</text:span></text:p>
      <text:p text:style-name="P5"><text:span text:style-name="Source_20_Text"><text:s text:c="8"/>break;</text:span></text:p>
      <text:p text:style-name="P5"><text:span text:style-name="Source_20_Text"><text:s text:c="4"/>case "Gelo":</text:span></text:p>
      <text:p text:style-name="P5"><text:span text:style-name="Source_20_Text"><text:s text:c="8"/>danoBase = 80;</text:span></text:p>
      <text:p text:style-name="P5"><text:span text:style-name="Source_20_Text"><text:s text:c="8"/>break;</text:span></text:p>
      <text:p text:style-name="P5"><text:span text:style-name="Source_20_Text"><text:s text:c="4"/>case "Raio":</text:span></text:p>
      <text:p text:style-name="P5"><text:span text:style-name="Source_20_Text"><text:s text:c="8"/>danoBase = 120;</text:span></text:p>
      <text:p text:style-name="P5"><text:span text:style-name="Source_20_Text"><text:s text:c="8"/>break;</text:span></text:p>
      <text:p text:style-name="P5"><text:span text:style-name="Source_20_Text"><text:s text:c="4"/>default:</text:span></text:p>
      <text:p text:style-name="P5"><text:span text:style-name="Source_20_Text"><text:s text:c="8"/>danoBase = 50;</text:span></text:p>
      <text:p text:style-name="P5"><text:span text:style-name="Source_20_Text">}</text:span></text:p>
      <text:p text:style-name="P5"/>
      <text:p text:style-name="P5"><text:span text:style-name="Source_20_Text">// 3. Resultado do impacto:</text:span></text:p>
      <text:p text:style-name="P5"><text:span text:style-name="Source_20_Text">if (defesaFinal) {</text:span></text:p>
      <text:p text:style-name="P5"><text:span text:style-name="Source_20_Text"><text:s text:c="4"/>console.log("Defesa Absoluta! O ataque de " + feitiçoBoss + " falhou. Dano sofrido: 0 🛡️");</text:span></text:p>
      <text:p text:style-name="P5"><text:soft-page-break/><text:span text:style-name="Source_20_Text">} else {</text:span></text:p>
      <text:p text:style-name="P6"><text:span text:style-name="Source_20_Text"><text:s text:c="4"/>console.log("O jogador sofreu o impacto total! Dano sofrido: " + danoBase + " 🔥");</text:span></text:p>
      <text:h text:style-name="P7" text:outline-level="3">⚔️ A Tua Missão de Análise:</text:h>
      <text:p text:style-name="P2">Olhando para esta nova situação do Aragorn, responde a estas 3 perguntas:</text:p>
      <text:list text:style-name="L1">
        <text:list-item>
          <text:p text:style-name="P8">No curto-circuito da <text:span text:style-name="Source_20_Text">defesaFinal</text:span>, o <text:span text:style-name="Source_20_Text">||</text:span> vai parar onde? A variável <text:span text:style-name="Source_20_Text">defesaFinal</text:span> vai guardar o quê? (Lembra-te do Truthy/Falsy).</text:p>
        </text:list-item>
        <text:list-item>
          <text:p text:style-name="P8">O <text:span text:style-name="Source_20_Text">switch</text:span> vai ativar qual <text:span text:style-name="Source_20_Text">case</text:span> e qual será o valor guardado no <text:span text:style-name="Source_20_Text">danoBase</text:span>?</text:p>
        </text:list-item>
        <text:list-item>
          <text:p text:style-name="P8">No <text:span text:style-name="Source_20_Text">if (defesaFinal)</text:span>, o computador vai entrar no bloco do <text:span text:style-name="Source_20_Text">if</text:span> ou vai saltar para o <text:span text:style-name="Source_20_Text">else</text:span>? Qual é a <text:span text:style-name="T1">mensagem exata</text:span> que vai aparecer na consola?</text:p>
        </text:list-item>
      </text:list>
      <text:p text:style-name="P4">O || vai parar na porcaoDefesa, defesafinal sera Porcção de Ferro. <text:s/>O swith vai activar o case Raio e o valor guardado no danoBase 120. o Computador vai entar no bloco do if e a mensagem sera: <text:s/>Desefa Absoluta! O ataque de raio falhou. Dano sofrido: 0.</text:p>
      <text:p text:style-name="P1"><text:span text:style-name="T1">Digno de um verdadeiro mestre de RPG! Que leitura de código impecável!</text:span> ⚔️👑</text:p>
      <text:p text:style-name="P2">Você acertou absolutamente tudo. Vamos ver o porquê do seu sucesso:</text:p>
      <text:list text:style-name="L2">
        <text:list-item>
          <text:p text:style-name="P9"><text:span text:style-name="T1">O Curto-Circuito Perfeito:</text:span> Como o <text:span text:style-name="Source_20_Text">escudoAtivo</text:span> era <text:span text:style-name="Source_20_Text">false</text:span>, o <text:span text:style-name="Source_20_Text">||</text:span> continuou a procurar e encontrou a <text:span text:style-name="Source_20_Text">"Poção de Ferro 🧪"</text:span>. Como qualquer texto com conteúdo é <text:span text:style-name="T1">Truthy</text:span>, ele parou imediatamente ali! A variável <text:span text:style-name="Source_20_Text">defesaFinal</text:span> guardou o texto da poção.</text:p>
        </text:list-item>
        <text:list-item>
          <text:p text:style-name="P9"><text:span text:style-name="T1">O Alvo do Switch:</text:span> O <text:span text:style-name="Source_20_Text">switch</text:span> detetou <text:span text:style-name="Source_20_Text">"Raio"</text:span> com precisão e ativou o <text:span text:style-name="Source_20_Text">case "Raio"</text:span>, definindo o <text:span text:style-name="Source_20_Text">danoBase</text:span> para <text:span text:style-name="Source_20_Text">120</text:span>.</text:p>
        </text:list-item>
        <text:list-item>
          <text:p text:style-name="P9"><text:span text:style-name="T1">A Decisão do IF:</text:span> Como <text:span text:style-name="Source_20_Text">defesaFinal</text:span> continha um texto (Truthy), o <text:span text:style-name="Source_20_Text">if</text:span> foi ativado!</text:p>
        </text:list-item>
      </text:list>
      <text:p text:style-name="P2">A mensagem na consola seria exatamente essa (apenas com o "R" maiúsculo por causa da variável):</text:p>
      <text:p text:style-name="P10"><text:span text:style-name="Source_20_Text">"Defesa Absoluta! O ataque de Raio falhou. Dano sofrido: 0 🛡️"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01:59:14.026320346</dc:date>
    <dc:creator>João António</dc:creator>
    <meta:editing-duration>PT3H39M17S</meta:editing-duration>
    <meta:editing-cycles>21</meta:editing-cycles>
    <meta:generator>LibreOffice/26.2.4.2$Linux_X86_64 LibreOffice_project/620$Build-2</meta:generator>
    <meta:document-statistic meta:table-count="0" meta:image-count="0" meta:object-count="0" meta:page-count="2" meta:paragraph-count="45" meta:word-count="470" meta:character-count="2768" meta:non-whitespace-character-count="2267"/>
  </office:meta>
</office:document-meta>
</file>