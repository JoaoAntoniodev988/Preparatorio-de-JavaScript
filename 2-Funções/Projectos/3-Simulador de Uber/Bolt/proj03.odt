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oogle Sans Flex" svg:font-family="'Google Sans Flex', 'Google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line-height="114%"/>
      <style:text-properties fo:font-variant="normal" fo:text-transform="none" fo:color="#1f1f1f" loext:opacity="100%" style:font-name="Google Sans Flex" fo:font-size="12.75pt" fo:letter-spacing="normal" fo:font-style="normal" fo:font-weight="normal" officeooo:rsid="001ef461"/>
    </style:style>
    <style:style style:name="P2" style:family="paragraph" style:parent-style-name="Text_20_body">
      <style:paragraph-properties fo:line-height="114%"/>
      <style:text-properties fo:color="#1f1f1f" loext:opacity="100%" style:font-name="Google Sans Flex" fo:font-size="12.75pt" officeooo:rsid="001ef461"/>
    </style:style>
    <style:style style:name="P3" style:family="paragraph" style:parent-style-name="Standard">
      <style:paragraph-properties fo:line-height="114%"/>
      <style:text-properties fo:font-variant="normal" fo:text-transform="none" fo:color="#1f1f1f" loext:opacity="100%" style:font-name="Google Sans Flex" fo:font-size="12.75pt" fo:letter-spacing="normal" fo:font-style="normal" fo:font-weight="normal" officeooo:rsid="001ef461"/>
    </style:style>
    <style:style style:name="P4" style:family="paragraph" style:parent-style-name="Preformatted_20_Text">
      <style:paragraph-properties fo:margin-top="0cm" fo:margin-bottom="0.247cm" style:contextual-spacing="false" fo:line-height="114%"/>
      <style:text-properties fo:color="#1f1f1f" loext:opacity="100%" style:font-name="Google Sans Flex" fo:font-size="12.75pt" officeooo:rsid="001ef461"/>
    </style:style>
    <style:style style:name="P5" style:family="paragraph" style:parent-style-name="Text_20_body">
      <style:paragraph-properties fo:line-height="114%"/>
      <style:text-properties fo:font-variant="normal" fo:text-transform="none" fo:color="#1f1f1f" loext:opacity="100%" style:font-name="Google Sans Flex" fo:font-size="12.75pt" fo:letter-spacing="normal" fo:font-style="normal" fo:font-weight="bold" officeooo:rsid="001ef461"/>
    </style:style>
    <style:style style:name="P6" style:family="paragraph" style:parent-style-name="Text_20_body" style:list-style-name="L1">
      <style:paragraph-properties fo:line-height="114%"/>
      <style:text-properties fo:color="#1f1f1f" loext:opacity="100%" style:font-name="Google Sans Flex" fo:font-size="12.75pt" officeooo:rsid="001ef461"/>
    </style:style>
    <style:style style:name="P7" style:family="paragraph" style:parent-style-name="Text_20_body">
      <style:paragraph-properties fo:line-height="114%"/>
      <style:text-properties fo:font-variant="normal" fo:text-transform="none" fo:color="#1f1f1f" loext:opacity="100%" style:font-name="Google Sans Flex" fo:font-size="12.75pt" fo:letter-spacing="normal" fo:font-style="normal" fo:font-weight="normal" officeooo:rsid="001ef461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🚗 Projeto 3: O Simulador de Uber/Bolt</text:h>
      <text:p text:style-name="P2">Se te sentires confortável, vamos ao último projeto para fechar este ciclo. Aqui testamos o preço da viagem com chuva.</text:p>
      <text:p text:style-name="P3">JavaScript</text:p>
      <text:p text:style-name="P4"><text:span text:style-name="Source_20_Text">const categoriaCarro = "Eco"; // &lt;-- Mudei para Eco!</text:span></text:p>
      <text:p text:style-name="P4"><text:span text:style-name="Source_20_Text">const estaAChover = false; <text:s text:c="3"/>// &lt;-- Mudei para false!</text:span></text:p>
      <text:p text:style-name="P4"><text:span text:style-name="Source_20_Text">let precoBase = 0;</text:span></text:p>
      <text:p text:style-name="P4"/>
      <text:p text:style-name="P4"><text:span text:style-name="Source_20_Text">// 1. Definição do preço base:</text:span></text:p>
      <text:p text:style-name="P4"><text:span text:style-name="Source_20_Text">switch (categoriaCarro) {</text:span></text:p>
      <text:p text:style-name="P4"><text:span text:style-name="Source_20_Text"><text:s text:c="4"/>case "Eco":</text:span></text:p>
      <text:p text:style-name="P4"><text:span text:style-name="Source_20_Text"><text:s text:c="8"/>precoBase = 5;</text:span></text:p>
      <text:p text:style-name="P4"><text:span text:style-name="Source_20_Text"><text:s text:c="8"/>break;</text:span></text:p>
      <text:p text:style-name="P4"><text:span text:style-name="Source_20_Text"><text:s text:c="4"/>case "Normal":</text:span></text:p>
      <text:p text:style-name="P4"><text:span text:style-name="Source_20_Text"><text:s text:c="8"/>precoBase = 8;</text:span></text:p>
      <text:p text:style-name="P4"><text:span text:style-name="Source_20_Text"><text:s text:c="8"/>break;</text:span></text:p>
      <text:p text:style-name="P4"><text:span text:style-name="Source_20_Text"><text:s text:c="4"/>case "Premium":</text:span></text:p>
      <text:p text:style-name="P4"><text:span text:style-name="Source_20_Text"><text:s text:c="8"/>precoBase = 15;</text:span></text:p>
      <text:p text:style-name="P4"><text:span text:style-name="Source_20_Text"><text:s text:c="8"/>break;</text:span></text:p>
      <text:p text:style-name="P4"><text:span text:style-name="Source_20_Text"><text:s text:c="4"/>default:</text:span></text:p>
      <text:p text:style-name="P4"><text:span text:style-name="Source_20_Text"><text:s text:c="8"/>precoBase = 7;</text:span></text:p>
      <text:p text:style-name="P4"><text:span text:style-name="Source_20_Text">}</text:span></text:p>
      <text:p text:style-name="P4"/>
      <text:p text:style-name="P4"><text:span text:style-name="Source_20_Text">// 2. Curto-circuito da Chuva:</text:span></text:p>
      <text:p text:style-name="P4"><text:span text:style-name="Source_20_Text">const multiplicadorChuva = estaAChover &amp;&amp; 1.5 || 1;</text:span></text:p>
      <text:p text:style-name="P4"/>
      <text:p text:style-name="P4"><text:span text:style-name="Source_20_Text">const precoFinal = precoBase * multiplicadorChuva;</text:span></text:p>
      <text:p text:style-name="P4"/>
      <text:p text:style-name="P4"><text:span text:style-name="Source_20_Text">console.log("Viagem " + categoriaCarro + " confirmada. Preço final: " + precoFinal + "€ 🚗");</text:span></text:p>
      <text:p text:style-name="P5"><text:soft-page-break/>A tua missão no último projeto:</text:p>
      <text:list text:style-name="L1">
        <text:list-item>
          <text:p text:style-name="P6">O <text:span text:style-name="Source_20_Text">switch</text:span> vai ativar qual <text:span text:style-name="Source_20_Text">case</text:span>? Qual será o valor do <text:span text:style-name="Source_20_Text">precoBase</text:span>?</text:p>
        </text:list-item>
        <text:list-item>
          <text:p text:style-name="P6">Olhe bem para o curto-circuito: <text:span text:style-name="Source_20_Text">estaAChover &amp;&amp; 1.5 || 1</text:span>. Sabendo que <text:span text:style-name="Source_20_Text">estaAChover</text:span> é <text:span text:style-name="Source_20_Text">false</text:span>, o que vai acontecer no <text:span text:style-name="Source_20_Text">&amp;&amp;</text:span>? E qual valor o <text:span text:style-name="Source_20_Text">||</text:span> vai acabar por guardar na variável <text:span text:style-name="Source_20_Text">multiplicadorChuva</text:span>?</text:p>
        </text:list-item>
        <text:list-item>
          <text:p text:style-name="P6">Qual será a mensagem final na consola?</text:p>
        </text:list-item>
      </text:list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oogle Sans Flex" svg:font-family="'Google Sans Flex', 'Google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ão António</meta:initial-creator>
    <meta:creation-date>2026-06-25T23:21:18.255979019</meta:creation-date>
    <dc:date>2026-06-27T02:43:08.474313644</dc:date>
    <dc:creator>João António</dc:creator>
    <meta:editing-duration>PT4H17M</meta:editing-duration>
    <meta:editing-cycles>26</meta:editing-cycles>
    <meta:generator>LibreOffice/26.2.4.2$Linux_X86_64 LibreOffice_project/620$Build-2</meta:generator>
    <meta:document-statistic meta:table-count="0" meta:image-count="0" meta:object-count="0" meta:page-count="2" meta:paragraph-count="28" meta:word-count="177" meta:character-count="1089" meta:non-whitespace-character-count="868"/>
  </office:meta>
</office:document-meta>
</file>