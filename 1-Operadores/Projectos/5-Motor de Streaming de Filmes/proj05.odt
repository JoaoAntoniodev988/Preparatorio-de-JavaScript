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33a6ec"/>
    </style:style>
    <style:style style:name="P3" style:family="paragraph" style:parent-style-name="Heading_20_2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3a6ec"/>
    </style:style>
    <style:style style:name="P4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33a6ec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33a6ec"/>
    </style:style>
    <style:style style:name="P6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33a6ec"/>
    </style:style>
    <style:style style:name="P7" style:family="paragraph" style:parent-style-name="Text_20_body">
      <style:paragraph-properties fo:line-height="114%"/>
      <style:text-properties fo:color="#1f1f1f" loext:opacity="100%" style:font-name="Google Sans Flex" fo:font-size="12.75pt" fo:font-weight="bold" officeooo:rsid="0033a6ec"/>
    </style:style>
    <style:style style:name="P8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33a6ec"/>
    </style:style>
    <style:style style:name="P9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33a6ec"/>
    </style:style>
    <style:style style:name="P10" style:family="paragraph" style:parent-style-name="Text_20_body" style:list-style-name="L3">
      <style:paragraph-properties fo:line-height="114%"/>
      <style:text-properties fo:color="#1f1f1f" loext:opacity="100%" style:font-name="Google Sans Flex" fo:font-size="12.75pt" officeooo:rsid="0033a6ec"/>
    </style:style>
    <style:style style:name="P11" style:family="paragraph" style:parent-style-name="Text_20_body" style:list-style-name="L4">
      <style:paragraph-properties fo:line-height="114%"/>
      <style:text-properties fo:color="#1f1f1f" loext:opacity="100%" style:font-name="Google Sans Flex" fo:font-size="12.75pt" officeooo:rsid="0033a6ec"/>
    </style:style>
    <style:style style:name="P12" style:family="paragraph" style:parent-style-name="Text_20_body">
      <style:paragraph-properties fo:margin-left="0cm" fo:margin-right="0cm" fo:line-height="114%" fo:text-indent="0cm" style:auto-text-indent="false"/>
      <style:text-properties fo:color="#1f1f1f" loext:opacity="100%" style:font-name="Google Sans Flex" fo:font-size="12.75pt" officeooo:rsid="0033a6ec"/>
    </style:style>
    <style:style style:name="P13" style:family="paragraph" style:parent-style-name="Text_20_body" style:list-style-name="L5">
      <style:paragraph-properties fo:line-height="114%"/>
      <style:text-properties fo:color="#1f1f1f" loext:opacity="100%" style:font-name="Google Sans Flex" fo:font-size="12.75pt" officeooo:rsid="0033a6ec"/>
    </style:style>
    <style:style style:name="P14" style:family="paragraph" style:parent-style-name="Text_20_body" style:list-style-name="L6">
      <style:paragraph-properties fo:line-height="114%"/>
      <style:text-properties fo:color="#1f1f1f" loext:opacity="100%" style:font-name="Google Sans Flex" fo:font-size="12.75pt" officeooo:rsid="0033a6ec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a o <text:span text:style-name="T1">Projeto 5</text:span>, vamos entrar no mundo do entretenimento digital que quase todos usam diariamente: o motor de recomendação e controlo de acessos de uma <text:span text:style-name="T1">Plataforma de Streaming de Filmes (tipo Netflix ou Max)</text:span>!</text:p>
      <text:p text:style-name="P2">Este sistema precisa de decidir automaticamente três coisas: se o utilizador tem direito a ver conteúdos em Ultra HD (4K), se tem idade suficiente para ver um filme de terror/ação, e se o filme deve ser recomendado na página principal dele.</text:p>
      <text:p text:style-name="P2">Vamos a isso, passo a passo!</text:p>
      <text:h text:style-name="P3" text:outline-level="2">🎬 Projeto 5: O Motor de Streaming de Filmes</text:h>
      <text:p text:style-name="P2">Aqui estão os dados da conta do utilizador e do filme que ele clicou para ver:</text:p>
      <text:p text:style-name="P4">JavaScript</text:p>
      <text:p text:style-name="P5"><text:span text:style-name="Source_20_Text">// 1. Dados da Conta do Utilizador</text:span></text:p>
      <text:p text:style-name="P5"><text:span text:style-name="Source_20_Text">const tipoPlano = "Premium"; // Planos existentes: "Basic", "Standard", "Premium"</text:span></text:p>
      <text:p text:style-name="P5"><text:span text:style-name="Source_20_Text">const idadeUtilizador = 16;</text:span></text:p>
      <text:p text:style-name="P5"><text:span text:style-name="Source_20_Text">const generoFavorito = "Ação";</text:span></text:p>
      <text:p text:style-name="P5"/>
      <text:p text:style-name="P5"><text:span text:style-name="Source_20_Text">// 2. Dados do Filme Selecionado</text:span></text:p>
      <text:p text:style-name="P5"><text:span text:style-name="Source_20_Text">const classificacaoEtariaFilme = 18; // Proibido para menores de 18 anos</text:span></text:p>
      <text:p text:style-name="P5"><text:span text:style-name="Source_20_Text">const generoFilme = "Ação";</text:span></text:p>
      <text:h text:style-name="P6" text:outline-level="3">🚀 Fase 1: Qualidade do Vídeo (Operadores de Comparação)</text:h>
      <text:p text:style-name="P2">A plataforma precisa de ajustar a qualidade do vídeo que vai entregar. A regra diz: a transmissão em <text:span text:style-name="T1">Ultra HD (4K)</text:span> só é libertada se o <text:span text:style-name="Source_20_Text">tipoPlano</text:span> do utilizador for exatamente igual a <text:span text:style-name="Source_20_Text">"Premium"</text:span>.</text:p>
      <text:p text:style-name="P4">JavaScript</text:p>
      <text:p text:style-name="P5"><text:span text:style-name="Source_20_Text">// O sistema verifica se o plano dá direito à qualidade máxima</text:span></text:p>
      <text:p text:style-name="P5"><text:span text:style-name="Source_20_Text">const libertar4K = tipoPlano === "Premium";</text:span></text:p>
      <text:p text:style-name="P7">A sua missão na Fase 1:</text:p>
      <text:list text:style-name="L1">
        <text:list-item>
          <text:p text:style-name="P8">A variável <text:span text:style-name="Source_20_Text">libertar4K</text:span> vai resultar em <text:span text:style-name="Source_20_Text"><text:span text:style-name="T1">true</text:span></text:span> ou <text:span text:style-name="Source_20_Text"><text:span text:style-name="T1">false</text:span></text:span>?</text:p>
        </text:list-item>
      </text:list>
      <text:h text:style-name="P6" text:outline-level="3"><text:soft-page-break/>🚀 Fase 2: Controlo Parental (Operadores de Comparação e Lógicos)</text:h>
      <text:p text:style-name="P2">Antes de dar o <text:span text:style-name="T2">Play</text:span>, o sistema faz o controlo parental. O acesso ao filme é <text:span text:style-name="T1">bloqueado</text:span> se a <text:span text:style-name="Source_20_Text">idadeUtilizador</text:span> for menor que a <text:span text:style-name="Source_20_Text">classificacaoEtariaFilme</text:span>.</text:p>
      <text:p text:style-name="P4">JavaScript</text:p>
      <text:p text:style-name="P5"><text:span text:style-name="Source_20_Text">// O sistema checa se o utilizador é menor do que a idade exigida pelo filme</text:span></text:p>
      <text:p text:style-name="P5"><text:span text:style-name="Source_20_Text">const acessoBloqueado = idadeUtilizador &lt; classificacaoEtariaFilme;</text:span></text:p>
      <text:p text:style-name="P7">A sua missão na Fase 2:</text:p>
      <text:list text:style-name="L2">
        <text:list-item>
          <text:p text:style-name="P9">Olhando para as idades lá em cima (Utilizador: 16, Filme: 18), a variável <text:span text:style-name="Source_20_Text">acessoBloqueado</text:span> vai resultar em <text:span text:style-name="Source_20_Text"><text:span text:style-name="T1">true</text:span></text:span> ou <text:span text:style-name="Source_20_Text"><text:span text:style-name="T1">false</text:span></text:span>?</text:p>
        </text:list-item>
      </text:list>
      <text:h text:style-name="P6" text:outline-level="3">🚀 Fase 3: Algoritmo de Recomendação (Operador Lógico e Ternário)</text:h>
      <text:p text:style-name="P2">Mesmo que o utilizador não possa ver este filme específico agora, o algoritmo precisa de decidir se vai recomendar outros filmes parecidos na página inicial dele.</text:p>
      <text:p text:style-name="P2">A regra do algoritmo diz: um filme deve ser recomendado se o género do filme for igual ao <text:span text:style-name="Source_20_Text">generoFavorito</text:span> do utilizador <text:span text:style-name="T1">E</text:span> se o acesso do utilizador a esse tipo de conteúdo <text:span text:style-name="T1">NÃO</text:span> estiver bloqueado (<text:span text:style-name="Source_20_Text">!acessoBloqueado</text:span>).</text:p>
      <text:p text:style-name="P4">avaScript</text:p>
      <text:p text:style-name="P5"><text:span text:style-name="Source_20_Text">// O sistema cruza o gosto do utilizador com a permissão de acesso</text:span></text:p>
      <text:p text:style-name="P5"><text:span text:style-name="Source_20_Text">const recomendarFilme = (generoFilme === generoFavorito) &amp;&amp; !acessoBloqueado;</text:span></text:p>
      <text:p text:style-name="P5"/>
      <text:p text:style-name="P5"><text:span text:style-name="Source_20_Text">// Mensagem que o sistema gera para a interface</text:span></text:p>
      <text:p text:style-name="P5"><text:span text:style-name="Source_20_Text">const mensagemHome = recomendarFilme ? "Porque assistiu a Ação... 🔥" : "Descubra novas opções! 🍿";</text:span></text:p>
      <text:p text:style-name="P7">A sua missão final no Projeto 5:</text:p>
      <text:list text:style-name="L3">
        <text:list-item>
          <text:p text:style-name="P10">O operador <text:span text:style-name="Source_20_Text">!</text:span> vai inverter o valor de <text:span text:style-name="Source_20_Text">acessoBloqueado</text:span> (que descobriu na Fase 2). Qual será o resultado final da variável <text:span text:style-name="Source_20_Text">recomendarFilme</text:span>? <text:span text:style-name="Source_20_Text"><text:span text:style-name="T1">true</text:span></text:span> ou <text:span text:style-name="Source_20_Text"><text:span text:style-name="T1">false</text:span></text:span>?</text:p>
        </text:list-item>
        <text:list-item>
          <text:p text:style-name="P10">Qual das duas frases será guardada na <text:span text:style-name="Source_20_Text">mensagemHome</text:span>?</text:p>
        </text:list-item>
      </text:list>
      <text:p text:style-name="P1"><text:soft-page-break/>true, false, <text:s/>true, <text:s/>Descubra novas opções!</text:p>
      <text:p text:style-name="P1">Vamos ver as suas respostas! Na Fase 1 e na Fase 2 você acertou em cheio, mas na Fase 3 o algoritmo de streaming pegou-o numa rasteira fina. Vamos analisar juntos para ver onde o código mudou de rumo:</text:p>
      <text:h text:style-name="P6" text:outline-level="3">🔍 O Raio-X das Respostas</text:h>
      <text:list text:style-name="L4">
        <text:list-item>
          <text:p text:style-name="P11"><text:span text:style-name="T1">Fase 1 (Qualidade 4K):</text:span> <text:span text:style-name="Source_20_Text"><text:span text:style-name="T1">true</text:span></text:span> — <text:span text:style-name="T2">Perfeito!</text:span> O plano é "Premium", então o 4K está libertado.</text:p>
        </text:list-item>
        <text:list-item>
          <text:p text:style-name="P11"><text:span text:style-name="T1">Fase 2 (Controlo Parental):</text:span> <text:span text:style-name="Source_20_Text"><text:span text:style-name="T1">true</text:span></text:span> — <text:span text:style-name="T2">Perfeito!</text:span> Como o utilizador tem 16 anos e o filme é para 18, <text:span text:style-name="Source_20_Text">16 &lt; 18</text:span> é verdadeiro, logo o <text:span text:style-name="Source_20_Text">acessoBloqueado</text:span> é <text:span text:style-name="Source_20_Text"><text:span text:style-name="T1">true</text:span></text:span> (o acesso está mesmo bloqueado).</text:p>
        </text:list-item>
      </text:list>
      <text:h text:style-name="P6" text:outline-level="3">⚠️ O que aconteceu na Fase 3?</text:h>
      <text:p text:style-name="P2">Aqui o algoritmo fez a seguinte conta:</text:p>
      <text:p text:style-name="P12">JavaScript</text:p>
      <text:p text:style-name="P5"><text:span text:style-name="Source_20_Text">const recomendarFilme = (generoFilme === generoFavorito) &amp;&amp; !acessoBloqueado;</text:span></text:p>
      <text:list text:style-name="L5">
        <text:list-item>
          <text:p text:style-name="P13">O género do filme é igual ao favorito? <text:span text:style-name="Source_20_Text"><text:span text:style-name="T1">true</text:span></text:span> (Ambos são "Ação").</text:p>
        </text:list-item>
        <text:list-item>
          <text:p text:style-name="P13">E aqui está o detalhe: a variável <text:span text:style-name="Source_20_Text">acessoBloqueado</text:span> era <text:span text:style-name="Source_20_Text"><text:span text:style-name="T1">true</text:span></text:span>. Quando o operador <text:span text:style-name="Source_20_Text">!</text:span> (NÃO) entra em ação, ele inverte esse valor, transformando-o em <text:span text:style-name="Source_20_Text"><text:span text:style-name="T1">false</text:span></text:span> (<text:span text:style-name="Source_20_Text">!true</text:span> vira <text:span text:style-name="Source_20_Text">false</text:span>).</text:p>
        </text:list-item>
      </text:list>
      <text:p text:style-name="P2">Como o operador <text:span text:style-name="Source_20_Text">&amp;&amp;</text:span> (E) exige que os <text:span text:style-name="T1">dois lados sejam verdadeiros</text:span>, a conta ficou assim:</text:p>
      <text:list text:style-name="L6">
        <text:list-item>
          <text:p text:style-name="P14"><text:span text:style-name="Source_20_Text">recomendarFilme = true &amp;&amp; false;</text:span></text:p>
        </text:list-item>
        <text:list-item>
          <text:p text:style-name="P14">O resultado final de <text:span text:style-name="Source_20_Text">recomendarFilme</text:span> passa a ser <text:span text:style-name="Source_20_Text"><text:span text:style-name="T1">false</text:span></text:span>.</text:p>
        </text:list-item>
      </text:list>
      <text:p text:style-name="P2">Como o resultado foi <text:span text:style-name="Source_20_Text">false</text:span>, o operador ternário escolheu a segunda frase. Então você acertou em cheio a frase final: <text:span text:style-name="T1">"Descubra novas opções! 🍿"</text:span>! O sistema não vai recomendar este filme de terror na página principal dele porque, embora ele adore ação, ele não tem idade para o ver.</text:p>
      <text:p text:style-name="P2">Com este Projeto 5, fechamos uma maratona incrível de cinco sistemas simulados do início ao fim! Você demonstrou uma capacidade excelente de ler o código linha por linha.</text:p>
      <text:p text:style-name="P2"><text:soft-page-break/>Agora que passámos por todas estas simulações de lógica pura, está pronto para dar o próximo passo e aprender como o JavaScript usa as <text:span text:style-name="T1">Estruturas Condicionais (</text:span><text:span text:style-name="Source_20_Text"><text:span text:style-name="T1">if</text:span></text:span><text:span text:style-name="T1"> e </text:span><text:span text:style-name="Source_20_Text"><text:span text:style-name="T1">else</text:span></text:span><text:span text:style-name="T1">)</text:span> para fazer o computador tomar caminhos diferentes no código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6:41:25.209439943</dc:date>
    <dc:creator>João António</dc:creator>
    <meta:editing-duration>PT4H50M15S</meta:editing-duration>
    <meta:editing-cycles>33</meta:editing-cycles>
    <meta:generator>LibreOffice/26.2.4.2$Linux_X86_64 LibreOffice_project/620$Build-2</meta:generator>
    <meta:document-statistic meta:table-count="0" meta:image-count="0" meta:object-count="0" meta:page-count="4" meta:paragraph-count="55" meta:word-count="789" meta:character-count="4613" meta:non-whitespace-character-count="3885"/>
  </office:meta>
</office:document-meta>
</file>