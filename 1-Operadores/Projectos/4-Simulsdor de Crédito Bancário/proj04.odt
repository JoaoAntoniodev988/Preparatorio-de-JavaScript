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 Flex" svg:font-family="'Google Sans Flex', 'Google Sans', 'Helvetica Neue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normal" officeooo:rsid="0033a6ec"/>
    </style:style>
    <style:style style:name="P2" style:family="paragraph" style:parent-style-name="Text_20_body">
      <style:paragraph-properties fo:line-height="114%"/>
      <style:text-properties fo:color="#1f1f1f" loext:opacity="100%" style:font-name="Google Sans Flex" fo:font-size="12.75pt" officeooo:rsid="0033a6ec"/>
    </style:style>
    <style:style style:name="P3" style:family="paragraph" style:parent-style-name="Heading_20_2">
      <style:paragraph-properties fo:margin-top="0cm" fo:margin-bottom="0.247cm" style:contextual-spacing="false" fo:line-height="114%"/>
      <style:text-properties fo:color="#1f1f1f" loext:opacity="100%" style:font-name="Google Sans Flex" fo:font-size="12.75pt" fo:font-weight="normal" officeooo:rsid="0033a6ec"/>
    </style:style>
    <style:style style:name="P4" style:family="paragraph" style:parent-style-name="Standard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normal" officeooo:rsid="0033a6ec"/>
    </style:style>
    <style:style style:name="P5" style:family="paragraph" style:parent-style-name="Preformatted_20_Text">
      <style:paragraph-properties fo:margin-top="0cm" fo:margin-bottom="0.247cm" style:contextual-spacing="false" fo:line-height="114%"/>
      <style:text-properties fo:color="#1f1f1f" loext:opacity="100%" style:font-name="Google Sans Flex" fo:font-size="12.75pt" officeooo:rsid="0033a6ec"/>
    </style:style>
    <style:style style:name="P6" style:family="paragraph" style:parent-style-name="Heading_20_3">
      <style:paragraph-properties fo:margin-top="0cm" fo:margin-bottom="0.247cm" style:contextual-spacing="false" fo:line-height="114%"/>
      <style:text-properties fo:color="#1f1f1f" loext:opacity="100%" style:font-name="Google Sans Flex" fo:font-size="12.75pt" fo:font-weight="normal" officeooo:rsid="0033a6ec"/>
    </style:style>
    <style:style style:name="P7" style:family="paragraph" style:parent-style-name="Text_20_body">
      <style:paragraph-properties fo:line-height="114%"/>
      <style:text-properties fo:color="#1f1f1f" loext:opacity="100%" style:font-name="Google Sans Flex" fo:font-size="12.75pt" fo:font-weight="bold" officeooo:rsid="0033a6ec"/>
    </style:style>
    <style:style style:name="P8" style:family="paragraph" style:parent-style-name="Text_20_body" style:list-style-name="L1">
      <style:paragraph-properties fo:line-height="114%"/>
      <style:text-properties fo:color="#1f1f1f" loext:opacity="100%" style:font-name="Google Sans Flex" fo:font-size="12.75pt" officeooo:rsid="0033a6ec"/>
    </style:style>
    <style:style style:name="P9" style:family="paragraph" style:parent-style-name="Text_20_body" style:list-style-name="L2">
      <style:paragraph-properties fo:line-height="114%"/>
      <style:text-properties fo:color="#1f1f1f" loext:opacity="100%" style:font-name="Google Sans Flex" fo:font-size="12.75pt" officeooo:rsid="0033a6ec"/>
    </style:style>
    <style:style style:name="P10" style:family="paragraph" style:parent-style-name="Text_20_body">
      <style:paragraph-properties fo:line-height="114%"/>
      <style:text-properties fo:font-variant="normal" fo:text-transform="none" fo:color="#1f1f1f" loext:opacity="100%" style:font-name="Google Sans Text" fo:font-size="12.75pt" fo:letter-spacing="normal" fo:font-style="normal" fo:font-weight="normal" officeooo:rsid="0033a6ec"/>
    </style:style>
    <style:style style:name="P11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fo:color="#1f1f1f" loext:opacity="100%" style:font-name="Google Sans Flex" fo:font-size="12.75pt" officeooo:rsid="0033a6ec"/>
    </style:style>
    <style:style style:name="P12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fo:color="#1f1f1f" loext:opacity="100%" style:font-name="Google Sans Flex" fo:font-size="12.75pt" fo:font-weight="normal" officeooo:rsid="0033a6ec"/>
    </style:style>
    <style:style style:name="P13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fo:color="#1f1f1f" loext:opacity="100%" style:font-name="Google Sans Text" fo:font-size="12.75pt" officeooo:rsid="0033a6ec"/>
    </style:style>
    <style:style style:name="P14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1f1f1f" loext:opacity="100%" style:font-name="Google Sans Flex" fo:font-size="12.75pt" officeooo:rsid="0033a6ec"/>
    </style:style>
    <style:style style:name="P15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1f1f1f" loext:opacity="100%" style:font-name="Google Sans Text" fo:font-size="12.75pt" officeooo:rsid="0033a6ec"/>
    </style:style>
    <style:style style:name="P16" style:family="paragraph" style:parent-style-name="Text_20_body" style:list-style-name="L4">
      <style:paragraph-properties fo:line-height="114%"/>
      <style:text-properties fo:color="#1f1f1f" loext:opacity="100%" style:font-name="Google Sans Flex" fo:font-size="12.75pt" officeooo:rsid="0033a6ec"/>
    </style:style>
    <style:style style:name="P17" style:family="paragraph" style:parent-style-name="Text_20_body" style:list-style-name="L5">
      <style:paragraph-properties fo:line-height="114%"/>
      <style:text-properties fo:color="#1f1f1f" loext:opacity="100%" style:font-name="Google Sans Flex" fo:font-size="12.75pt" officeooo:rsid="0033a6ec"/>
    </style:style>
    <style:style style:name="P18" style:family="paragraph" style:parent-style-name="Text_20_body" style:list-style-name="L6">
      <style:paragraph-properties fo:line-height="114%"/>
      <style:text-properties fo:color="#1f1f1f" loext:opacity="100%" style:font-name="Google Sans Flex" fo:font-size="12.75pt" officeooo:rsid="0033a6ec"/>
    </style:style>
    <style:style style:name="P19" style:family="paragraph" style:parent-style-name="Text_20_body" style:list-style-name="L7">
      <style:paragraph-properties fo:line-height="114%"/>
      <style:text-properties fo:color="#1f1f1f" loext:opacity="100%" style:font-name="Google Sans Flex" fo:font-size="12.75pt" officeooo:rsid="0033a6ec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fo:font-weight="bold"/>
    </style:style>
    <style:style style:name="T4" style:family="text">
      <style:text-properties fo:font-family="'Google Sans', sans-seri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ra para o <text:span text:style-name="T1">Projeto 4</text:span>! O seu ritmo está excelente.</text:p>
      <text:p text:style-name="P2">Desta vez, vamos programar a lógica de um <text:span text:style-name="T1">Simulador de Aprovação de Empréstimo Bancário</text:span>. Este é um sistema clássico do setor financeiro (Fintechs e Bancos) para decidir, em milissegundos, se um cliente pode receber um crédito para comprar uma casa ou um carro.</text:p>
      <text:p text:style-name="P2">Como o dinheiro do banco está em jogo, as regras são rigorosas. Vamos por partes!</text:p>
      <text:h text:style-name="P3" text:outline-level="2">🏦 Projeto 4: Simulador de Crédito Bancário</text:h>
      <text:p text:style-name="P2">Aqui estão os dados do cliente que solicitou o empréstimo:</text:p>
      <text:p text:style-name="P4">JavaScript</text:p>
      <text:p text:style-name="P5"><text:span text:style-name="Source_20_Text">// 1. Dados do Cliente e do Pedido</text:span></text:p>
      <text:p text:style-name="P5"><text:span text:style-name="Source_20_Text">const salarioMensal = 3500;</text:span></text:p>
      <text:p text:style-name="P5"><text:span text:style-name="Source_20_Text">const valorPrestacaoProposta = 900;</text:span></text:p>
      <text:p text:style-name="P5"><text:span text:style-name="Source_20_Text">let scoreCredito = 620; // Pontuação de bom pagador (vai de 0 a 1000)</text:span></text:p>
      <text:p text:style-name="P5"><text:span text:style-name="Source_20_Text">const temHistoricoNegativo = false; // Nome sujo na praça?</text:span></text:p>
      <text:h text:style-name="P6" text:outline-level="3">🚀 Fase 1: A Regra do Compromisso de Rendimento (Operadores Aritméticos e de Comparação)</text:h>
      <text:p text:style-name="P2">Os bancos têm uma regra de ouro: a prestação do empréstimo <text:span text:style-name="T1">não pode ser maior do que 30% do salário</text:span> do cliente, para evitar que ele fique sem dinheiro para comer.</text:p>
      <text:p text:style-name="P4">JavaScript</text:p>
      <text:p text:style-name="P5"><text:span text:style-name="Source_20_Text">// Calculando o limite máximo que a prestação pode ter (30% do salário)</text:span></text:p>
      <text:p text:style-name="P5"><text:span text:style-name="Source_20_Text">const limitePrestacao = salarioMensal * 0.3;</text:span></text:p>
      <text:p text:style-name="P5"/>
      <text:p text:style-name="P5"><text:span text:style-name="Source_20_Text">// Checando se a prestação proposta cabe no orçamento (ou seja, se é menor ou igual ao limite)</text:span></text:p>
      <text:p text:style-name="P5"><text:span text:style-name="Source_20_Text">const parcelaCabeNoOrçamento = valorPrestacaoProposta &lt;= limitePrestacao;</text:span></text:p>
      <text:p text:style-name="P7">A sua missão na Fase 1:</text:p>
      <text:list text:style-name="L1">
        <text:list-item>
          <text:p text:style-name="P8">Quanto vale a variável <text:span text:style-name="Source_20_Text">limitePrestacao</text:span> (quanto é 30% de 3500)?</text:p>
        </text:list-item>
        <text:list-item>
          <text:p text:style-name="P8"><text:soft-page-break/>A variável <text:span text:style-name="Source_20_Text">parcelaCabeNoOrçamento</text:span> vai resultar em <text:span text:style-name="Source_20_Text"><text:span text:style-name="T1">true</text:span></text:span> ou <text:span text:style-name="Source_20_Text"><text:span text:style-name="T1">false</text:span></text:span>? (Lembrando que a prestação proposta é 900).</text:p>
        </text:list-item>
      </text:list>
      <text:p text:style-name="P1">1050, <text:s/>true.</text:p>
      <text:p text:style-name="P1">Você acertou <text:span text:style-name="T1">exatamente</text:span> em cheio: R$ 1050 e <text:span text:style-name="Source_20_Text">true</text:span>. Foi erro meu de leitura, você gabaritou de primeira!</text:p>
      <text:p text:style-name="P2">Vamos voltar para os trilhos. Sabendo que a parcela cabe no orçamento dele, o banco foi analisar o histórico financeiro:</text:p>
      <text:p text:style-name="P4">JavaScript</text:p>
      <text:p text:style-name="P5"><text:span text:style-name="Source_20_Text">const scoreCredito = 620; </text:span></text:p>
      <text:p text:style-name="P5"><text:span text:style-name="Source_20_Text">const temHistoricoNegativo = false; </text:span></text:p>
      <text:p text:style-name="P5"/>
      <text:p text:style-name="P5"><text:span text:style-name="Source_20_Text">const bomHistorico = !temHistoricoNegativo;</text:span></text:p>
      <text:p text:style-name="P5"><text:span text:style-name="Source_20_Text">const perfilAprovado = (scoreCredito &gt;= 600) &amp;&amp; bomHistorico;</text:span></text:p>
      <text:p text:style-name="P2">Olhando para essa <text:span text:style-name="T1">Fase 2</text:span>:</text:p>
      <text:list text:style-name="L2">
        <text:list-item>
          <text:p text:style-name="P9">Qual valor será guardado na variável <text:span text:style-name="Source_20_Text">bomHistorico</text:span>?</text:p>
        </text:list-item>
        <text:list-item>
          <text:p text:style-name="P9">A variável <text:span text:style-name="Source_20_Text">perfilAprovado</text:span> vai resultar em <text:span text:style-name="Source_20_Text"><text:span text:style-name="T1">true</text:span></text:span> ou <text:span text:style-name="Source_20_Text"><text:span text:style-name="T1">false</text:span></text:span>?</text:p>
        </text:list-item>
      </text:list>
      <text:p text:style-name="P10">Perfeito! E peço desculpas novamente pelo meu nó de leitura no passo anterior. Você está afiadíssimo.</text:p>
      <text:p text:style-name="P11"><text:span text:style-name="T2">Como </text:span><text:span text:style-name="Source_20_Text"><text:span text:style-name="T2">temHistoricoNegativo</text:span></text:span><text:span text:style-name="T2"> era </text:span><text:span text:style-name="Source_20_Text"><text:span text:style-name="T2">false</text:span></text:span><text:span text:style-name="T2">, o operador </text:span><text:span text:style-name="Source_20_Text"><text:span text:style-name="T2">!</text:span></text:span><text:span text:style-name="T2"> inverteu para </text:span><text:span text:style-name="Source_20_Text"><text:span text:style-name="T3">true</text:span></text:span><text:span text:style-name="T2"> (o que significa que o cliente tem, de facto, um bom histórico). Como o score dele é 620 ($\ge 600$), ambas as condições foram verdadeiras, deixando o </text:span><text:span text:style-name="Source_20_Text"><text:span text:style-name="T2">perfilAprovado</text:span></text:span><text:span text:style-name="T2"> como </text:span><text:span text:style-name="Source_20_Text"><text:span text:style-name="T3">true</text:span></text:span><text:span text:style-name="T2">.</text:span></text:p>
      <text:h text:style-name="P12" text:outline-level="3">🚀 <text:span text:style-name="T4">Fase 3: O Veredito do Empréstimo (Operador Lógico e Ternário)</text:span></text:h>
      <text:p text:style-name="P13">Agora o computador do banco vai juntar a resposta da Fase 1 (orçamento) com a da Fase 2 (perfil) para dar o veredito final e calcular a taxa de juros básica.</text:p>
      <text:list text:style-name="L3">
        <text:list-item>
          <text:p text:style-name="P14"><text:span text:style-name="T2">O empréstimo só é </text:span><text:span text:style-name="T3">concedido</text:span><text:span text:style-name="T2"> se a </text:span><text:span text:style-name="Source_20_Text"><text:span text:style-name="T2">parcelaCabeNoOrçamento</text:span></text:span><text:span text:style-name="T2"> for </text:span><text:span text:style-name="Source_20_Text"><text:span text:style-name="T2">true</text:span></text:span><text:span text:style-name="T2"> </text:span><text:span text:style-name="T3">E</text:span><text:span text:style-name="T2"> o </text:span><text:span text:style-name="Source_20_Text"><text:span text:style-name="T2">perfilAprovado</text:span></text:span><text:span text:style-name="T2"> também for </text:span><text:span text:style-name="Source_20_Text"><text:span text:style-name="T2">true</text:span></text:span><text:span text:style-name="T2">.</text:span></text:p>
        </text:list-item>
        <text:list-item>
          <text:p text:style-name="P15">Se o empréstimo for concedido, a taxa de juros é de <text:span text:style-name="T1">5%</text:span> ao ano. Se for negado, a taxa fica em <text:span text:style-name="T1">0%</text:span> (já que não há contrato).</text:p>
        </text:list-item>
      </text:list>
      <text:p text:style-name="P4">JavaScript</text:p>
      <text:p text:style-name="P5"><text:span text:style-name="Source_20_Text">// O sistema decide se concede o crédito</text:span></text:p>
      <text:p text:style-name="P5"><text:soft-page-break/><text:span text:style-name="Source_20_Text">const emprestimoConcedido = parcelaCabeNoOrçamento &amp;&amp; perfilAprovado;</text:span></text:p>
      <text:p text:style-name="P5"/>
      <text:p text:style-name="P5"><text:span text:style-name="Source_20_Text">// O sistema define a taxa de juros com base na aprovação</text:span></text:p>
      <text:p text:style-name="P5"><text:span text:style-name="Source_20_Text">const taxaJuros = emprestimoConcedido ? 5 : 0;</text:span></text:p>
      <text:p text:style-name="P7">A sua última missão no Projeto 4:</text:p>
      <text:list text:style-name="L4">
        <text:list-item>
          <text:p text:style-name="P16">A variável <text:span text:style-name="Source_20_Text">emprestimoConcedido</text:span> vai ser <text:span text:style-name="Source_20_Text"><text:span text:style-name="T1">true</text:span></text:span> ou <text:span text:style-name="Source_20_Text"><text:span text:style-name="T1">false</text:span></text:span>?</text:p>
        </text:list-item>
        <text:list-item>
          <text:p text:style-name="P16">Qual será o valor guardado na variável <text:span text:style-name="Source_20_Text">taxaJuros</text:span>?</text:p>
        </text:list-item>
      </text:list>
      <text:p text:style-name="P1">True, 5.</text:p>
      <text:p text:style-name="P1"><text:span text:style-name="T1">Perfeito! 100% de aproveitamento!</text:span> As suas respostas foram cirúrgicas: <text:span text:style-name="Source_20_Text"><text:span text:style-name="T1">true</text:span></text:span> e <text:span text:style-name="T1">5</text:span>. Como o cliente passou em todos os testes rigorosos do banco, o empréstimo foi concedido com sucesso e a taxa de juros foi definida para 5%.</text:p>
      <text:p text:style-name="P2">O ecrã do analista financeiro mostraria exatamente isto:</text:p>
      <text:list text:style-name="L5">
        <text:list-item>
          <text:p text:style-name="P17">Empréstimo Concedido: <text:span text:style-name="T1">Sim (True)</text:span></text:p>
        </text:list-item>
        <text:list-item>
          <text:p text:style-name="P17">Taxa de Juros Aplicada: <text:span text:style-name="T1">5% ao ano</text:span></text:p>
        </text:list-item>
      </text:list>
      <text:h text:style-name="P6" text:outline-level="3">O Balanço das suas Conquistas 🏆</text:h>
      <text:p text:style-name="P2">Você acabou de passar por <text:span text:style-name="T1">4 projetos reais</text:span> seguidos, cobrindo:</text:p>
      <text:list text:style-name="L6">
        <text:list-item>
          <text:p text:style-name="P18">E-commerce (Cálculo de Carrinho)</text:p>
        </text:list-item>
        <text:list-item>
          <text:p text:style-name="P18">Gaming (Evolução de Personagem RPG)</text:p>
        </text:list-item>
        <text:list-item>
          <text:p text:style-name="P18">Segurança (Fluxo de Login e Bloqueio)</text:p>
        </text:list-item>
        <text:list-item>
          <text:p text:style-name="P18">Fintech (Simulador de Crédito Bancário)</text:p>
        </text:list-item>
      </text:list>
      <text:p text:style-name="P2">Em todos eles, você destrinchou a lógica exatamente como um interpretador de JavaScript faz. Isso mostra que a base de lógica de programação e o entendimento de como os operadores funcionam estão super consolidados na sua mente.</text:p>
      <text:p text:style-name="P1">Agora que você terminou os 4 projetos com sucesso absoluto, como quer continuar?</text:p>
      <text:list text:style-name="L7">
        <text:list-item>
          <text:p text:style-name="P19">Quer ver como transformar essa lógica em caminhos reais no código usando o próximo nível: <text:span text:style-name="T1">Estruturas Condicionais (</text:span><text:span text:style-name="Source_20_Text"><text:span text:style-name="T1">if</text:span></text:span><text:span text:style-name="T1"> e </text:span><text:span text:style-name="Source_20_Text"><text:span text:style-name="T1">else</text:span></text:span><text:span text:style-name="T1">)</text:span>?</text:p>
        </text:list-item>
        <text:list-item>
          <text:p text:style-name="P19"><text:soft-page-break/>Prefere criar mais um cenário focado em outra área que você goste (como uma aplicação de desporto ou streaming de filmes)?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 Flex" svg:font-family="'Google Sans Flex', 'Google Sans', 'Helvetica Neue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5T23:21:18.255979019</meta:creation-date>
    <dc:date>2026-06-26T16:16:11.399205535</dc:date>
    <dc:creator>João António</dc:creator>
    <meta:editing-duration>PT4H29M15S</meta:editing-duration>
    <meta:editing-cycles>31</meta:editing-cycles>
    <meta:generator>LibreOffice/26.2.4.2$Linux_X86_64 LibreOffice_project/620$Build-2</meta:generator>
    <meta:document-statistic meta:table-count="0" meta:image-count="0" meta:object-count="0" meta:page-count="4" meta:paragraph-count="61" meta:word-count="729" meta:character-count="4311" meta:non-whitespace-character-count="3656"/>
  </office:meta>
</office:document-meta>
</file>