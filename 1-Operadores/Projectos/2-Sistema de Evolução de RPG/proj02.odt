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oogle Sans Flex" svg:font-family="'Google Sans Flex', 'Google Sans', 'Helvetica Neue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line-height="114%"/>
      <style:text-properties fo:font-variant="normal" fo:text-transform="none" fo:color="#1f1f1f" loext:opacity="100%" style:font-name="Google Sans Flex" fo:font-size="12.75pt" fo:letter-spacing="normal" fo:font-style="normal" fo:font-weight="normal" officeooo:rsid="001ef461"/>
    </style:style>
    <style:style style:name="P2" style:family="paragraph" style:parent-style-name="Text_20_body">
      <style:paragraph-properties fo:line-height="114%"/>
      <style:text-properties fo:color="#1f1f1f" loext:opacity="100%" style:font-name="Google Sans Flex" fo:font-size="12.75pt" officeooo:rsid="001ef461"/>
    </style:style>
    <style:style style:name="P3" style:family="paragraph" style:parent-style-name="Heading_20_2">
      <style:paragraph-properties fo:line-height="114%"/>
      <style:text-properties fo:font-variant="normal" fo:text-transform="none" fo:color="#1f1f1f" loext:opacity="100%" style:font-name="Google Sans Flex" fo:font-size="12.75pt" fo:letter-spacing="normal" fo:font-style="normal" fo:font-weight="normal" officeooo:rsid="001ef461"/>
    </style:style>
    <style:style style:name="P4" style:family="paragraph" style:parent-style-name="Standard">
      <style:paragraph-properties fo:line-height="114%"/>
      <style:text-properties fo:font-variant="normal" fo:text-transform="none" fo:color="#1f1f1f" loext:opacity="100%" style:font-name="Google Sans Flex" fo:font-size="12.75pt" fo:letter-spacing="normal" fo:font-style="normal" fo:font-weight="normal" officeooo:rsid="001ef461"/>
    </style:style>
    <style:style style:name="P5" style:family="paragraph" style:parent-style-name="Preformatted_20_Text">
      <style:paragraph-properties fo:margin-top="0cm" fo:margin-bottom="0.247cm" style:contextual-spacing="false" fo:line-height="114%"/>
      <style:text-properties fo:color="#1f1f1f" loext:opacity="100%" style:font-name="Google Sans Flex" fo:font-size="12.75pt" officeooo:rsid="001ef461"/>
    </style:style>
    <style:style style:name="P6" style:family="paragraph" style:parent-style-name="Heading_20_3">
      <style:paragraph-properties fo:line-height="114%"/>
      <style:text-properties fo:font-variant="normal" fo:text-transform="none" fo:color="#1f1f1f" loext:opacity="100%" style:font-name="Google Sans Flex" fo:font-size="12.75pt" fo:letter-spacing="normal" fo:font-style="normal" fo:font-weight="normal" officeooo:rsid="001ef461"/>
    </style:style>
    <style:style style:name="P7" style:family="paragraph" style:parent-style-name="Text_20_body">
      <style:paragraph-properties fo:line-height="114%"/>
      <style:text-properties fo:font-variant="normal" fo:text-transform="none" fo:color="#1f1f1f" loext:opacity="100%" style:font-name="Google Sans Flex" fo:font-size="12.75pt" fo:letter-spacing="normal" fo:font-style="normal" fo:font-weight="bold" officeooo:rsid="001ef461"/>
    </style:style>
    <style:style style:name="P8" style:family="paragraph" style:parent-style-name="Text_20_body" style:list-style-name="L1">
      <style:paragraph-properties fo:line-height="114%"/>
      <style:text-properties fo:color="#1f1f1f" loext:opacity="100%" style:font-name="Google Sans Flex" fo:font-size="12.75pt" officeooo:rsid="001ef461"/>
    </style:style>
    <style:style style:name="P9" style:family="paragraph" style:parent-style-name="Text_20_body">
      <style:paragraph-properties fo:line-height="114%"/>
      <style:text-properties fo:font-variant="normal" fo:text-transform="none" fo:color="#1f1f1f" loext:opacity="100%" style:font-name="Google Sans Text" fo:font-size="12.75pt" fo:letter-spacing="normal" fo:font-style="normal" fo:font-weight="normal" officeooo:rsid="001ef461"/>
    </style:style>
    <style:style style:name="P10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fo:color="#1f1f1f" loext:opacity="100%" style:font-name="Google Sans Flex" fo:font-size="12.75pt" officeooo:rsid="001ef461"/>
    </style:style>
    <style:style style:name="P11" style:family="paragraph" style:parent-style-name="Text_20_body">
      <style:paragraph-properties fo:line-height="114%"/>
      <style:text-properties fo:color="#1f1f1f" loext:opacity="100%" style:font-name="Google Sans Flex" fo:font-size="12.75pt" fo:font-weight="bold" officeooo:rsid="001ef461"/>
    </style:style>
    <style:style style:name="P12" style:family="paragraph" style:parent-style-name="Text_20_body" style:list-style-name="L2">
      <style:paragraph-properties fo:line-height="114%"/>
      <style:text-properties fo:color="#1f1f1f" loext:opacity="100%" style:font-name="Google Sans Flex" fo:font-size="12.75pt" officeooo:rsid="001ef461"/>
    </style:style>
    <style:style style:name="P13" style:family="paragraph" style:parent-style-name="Text_20_body" style:list-style-name="L3">
      <style:paragraph-properties fo:line-height="114%"/>
      <style:text-properties fo:color="#1f1f1f" loext:opacity="100%" style:font-name="Google Sans Flex" fo:font-size="12.75pt" officeooo:rsid="001ef461"/>
    </style:style>
    <style:style style:name="P14" style:family="paragraph" style:parent-style-name="Text_20_body" style:list-style-name="L4">
      <style:paragraph-properties fo:line-height="114%"/>
      <style:text-properties fo:color="#1f1f1f" loext:opacity="100%" style:font-name="Google Sans Flex" fo:font-size="12.75pt" officeooo:rsid="001ef461"/>
    </style:style>
    <style:style style:name="P15" style:family="paragraph" style:parent-style-name="Text_20_body" style:list-style-name="L5">
      <style:paragraph-properties fo:line-height="114%"/>
      <style:text-properties fo:color="#1f1f1f" loext:opacity="100%" style:font-name="Google Sans Flex" fo:font-size="12.75pt" officeooo:rsid="001ef461"/>
    </style:style>
    <style:style style:name="T1" style:family="text">
      <style:text-properties fo:font-weight="bold"/>
    </style:style>
    <style:style style:name="T2" style:family="text">
      <style:text-properties style:font-name="Google Sans Text"/>
    </style:style>
    <style:style style:name="T3" style:family="text">
      <style:text-properties style:font-name="Google Sans Text" fo:font-weight="bold"/>
    </style:style>
    <style:style style:name="T4" style:family="text">
      <style:text-properties fo:font-style="itali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amos para o proximo projecto</text:p>
      <text:p text:style-name="P1">Bora! O Projeto 1 foi um sucesso total, então vamos subir o nível.</text:p>
      <text:p text:style-name="P2">Dessa vez, vamos programar a lógica de um <text:span text:style-name="T1">Sistema de Conquistas e Evolução de um Jogo de RPG</text:span>. O nosso código precisa calcular se o jogador subiu de nível, se ele pode usar uma arma lendária e quantos pontos faltam para o próximo nível.</text:p>
      <text:p text:style-name="P2">Vamos fazer exatamente como no anterior: <text:span text:style-name="T1">fase por fase</text:span>, sem pressa.</text:p>
      <text:h text:style-name="P3" text:outline-level="2">⚔️ Projeto 2: O Sistema de Evolução de RPG</text:h>
      <text:p text:style-name="P2">Aqui estão os dados iniciais do nosso herói:</text:p>
      <text:p text:style-name="P4">JavaScript</text:p>
      <text:p text:style-name="P5"><text:span text:style-name="Source_20_Text">// 1. Status do Jogador</text:span></text:p>
      <text:p text:style-name="P5"><text:span text:style-name="Source_20_Text">let nivelAtual = 9;</text:span></text:p>
      <text:p text:style-name="P5"><text:span text:style-name="Source_20_Text">let experienciaAtual = 950;</text:span></text:p>
      <text:p text:style-name="P5"><text:span text:style-name="Source_20_Text">const bossDerrotado = true; // Ele derrotou o grande chefe da fase!</text:span></text:p>
      <text:h text:style-name="P6" text:outline-level="3">🚀 Fase 1: Subindo de Nível (Operadores de Atribuição e Comparação)</text:h>
      <text:p text:style-name="P2">Para subir para o <text:span text:style-name="T1">Nível 10</text:span>, o jogador precisa ter <text:span text:style-name="T1">ganhado a batalha contra o boss</text:span> E a sua <text:span text:style-name="T1">experiência atual precisa ser maior ou igual a 1000</text:span>.</text:p>
      <text:p text:style-name="P2">Mas antes de checar isso, o jogo dá um bônus: como ele derrotou o boss, ele ganha <text:span text:style-name="T1">100 pontos de experiência</text:span> imediatamente.</text:p>
      <text:p text:style-name="P4">JavaScript</text:p>
      <text:p text:style-name="P5"><text:span text:style-name="Source_20_Text">// O bônus do boss é aplicado usando atribuição composta</text:span></text:p>
      <text:p text:style-name="P5"><text:span text:style-name="Source_20_Text">experiênciaAtual += 100;</text:span></text:p>
      <text:p text:style-name="P5"/>
      <text:p text:style-name="P5"><text:span text:style-name="Source_20_Text">// O sistema checa se ele cumpre os dois requisitos para subir de nível</text:span></text:p>
      <text:p text:style-name="P5"><text:span text:style-name="Source_20_Text">const subiuDeNivel = (experiênciaAtual &gt;= 1000) &amp;&amp; bossDerrotado;</text:span></text:p>
      <text:p text:style-name="P7">Sua missão na Fase 1:</text:p>
      <text:list text:style-name="L1">
        <text:list-item>
          <text:p text:style-name="P8">Qual é o novo valor da variável <text:span text:style-name="Source_20_Text">experiênciaAtual</text:span> após receber o bônus de 100?</text:p>
        </text:list-item>
        <text:list-item>
          <text:p text:style-name="P8"><text:soft-page-break/>A variável <text:span text:style-name="Source_20_Text">subiuDeNivel</text:span> vai resultar em <text:span text:style-name="Source_20_Text"><text:span text:style-name="T1">true</text:span></text:span> ou <text:span text:style-name="Source_20_Text"><text:span text:style-name="T1">false</text:span></text:span>?</text:p>
        </text:list-item>
      </text:list>
      <text:p text:style-name="P1">1050, True.</text:p>
      <text:p text:style-name="P9">Na mosca! Mais uma fase completada com sucesso.</text:p>
      <text:p text:style-name="P10"><text:span text:style-name="T2">A </text:span><text:span text:style-name="Source_20_Text"><text:span text:style-name="T2">experienciaAtual</text:span></text:span><text:span text:style-name="T2"> subiu para </text:span><text:span text:style-name="T3">1050</text:span><text:span text:style-name="T2"> ($950 + 100$). Com isso, as duas condições do </text:span><text:span text:style-name="Source_20_Text"><text:span text:style-name="T2">&amp;&amp;</text:span></text:span><text:span text:style-name="T2"> foram verdadeiras ($1050 \ge 1000$ é verdadeiro E </text:span><text:span text:style-name="Source_20_Text"><text:span text:style-name="T2">bossDerrotado</text:span></text:span><text:span text:style-name="T2"> também é verdadeiro). Logo, </text:span><text:span text:style-name="Source_20_Text"><text:span text:style-name="T2">subiuDeNivel</text:span></text:span><text:span text:style-name="T2"> é </text:span><text:span text:style-name="Source_20_Text"><text:span text:style-name="T3">true</text:span></text:span><text:span text:style-name="T2">!</text:span></text:p>
      <text:p text:style-name="P4">avaScript</text:p>
      <text:p text:style-name="P5"><text:span text:style-name="Source_20_Text">// Se 'subiuDeNivel' for true, aumentamos o nível em 1. Se for false, aumenta 0.</text:span></text:p>
      <text:p text:style-name="P5"><text:span text:style-name="Source_20_Text">const aumentoDeNivel = subiuDeNivel ? 1 : 0;</text:span></text:p>
      <text:p text:style-name="P5"/>
      <text:p text:style-name="P5"><text:span text:style-name="Source_20_Text">nivelAtual += aumentoDeNivel;</text:span></text:p>
      <text:p text:style-name="P11">Sua missão na Fase 2:</text:p>
      <text:list text:style-name="L2">
        <text:list-item>
          <text:p text:style-name="P12">Qual valor será guardado na variável <text:span text:style-name="Source_20_Text">aumentoDeNivel</text:span>?</text:p>
        </text:list-item>
        <text:list-item>
          <text:p text:style-name="P12">Qual será o novo valor da variável <text:span text:style-name="Source_20_Text">nivelAtual</text:span> após a linha <text:span text:style-name="Source_20_Text">nivelAtual += aumentoDeNivel</text:span>?</text:p>
        </text:list-item>
      </text:list>
      <text:p text:style-name="P1">1, 10.</text:p>
      <text:h text:style-name="P6" text:outline-level="3">🚀 Fase 3: A Espada Lendária (Operadores de Comparação e Lógicos)</text:h>
      <text:p text:style-name="P2">O jogador encontrou o baú com a <text:span text:style-name="T1">Espada Lendária de Nuvem</text:span>. Porém, essa arma é tão poderosa que o jogo impõe uma restrição de segurança baseada em duas regras:</text:p>
      <text:list text:style-name="L3">
        <text:list-item>
          <text:p text:style-name="P13">O jogador precisa estar no <text:span text:style-name="T1">nível 10 ou superior</text:span>.</text:p>
        </text:list-item>
        <text:list-item>
          <text:p text:style-name="P13"><text:span text:style-name="T1">OU</text:span>, caso ele não tenha o nível, ele precisa ter a conquista de ter derrotado o Boss (<text:span text:style-name="Source_20_Text">bossDerrotado === true</text:span>).</text:p>
        </text:list-item>
      </text:list>
      <text:p text:style-name="P1"/>
      <text:p text:style-name="P1">True, sim.</text:p>
      <text:p text:style-name="P7">Veredito final: Herói lendário desbloqueado com sucesso! 🎉</text:p>
      <text:p text:style-name="P2">A variável <text:span text:style-name="Source_20_Text">podeEquiparEspada</text:span> deu <text:span text:style-name="Source_20_Text"><text:span text:style-name="T1">true</text:span></text:span> porque ele gabaritou os dois lados do operador <text:span text:style-name="Source_20_Text">||</text:span> (OU): ele alcançou o nível 10 <text:span text:style-name="T1">E</text:span> tinha derrotado o boss. O console final do jogo mostraria com orgulho:</text:p>
      <text:list text:style-name="L4">
        <text:list-item>
          <text:p text:style-name="P14"><text:soft-page-break/>Nível do Jogador: <text:span text:style-name="T1">10</text:span></text:p>
        </text:list-item>
        <text:list-item>
          <text:p text:style-name="P14">Experiência Total: <text:span text:style-name="T1">1050 XP</text:span></text:p>
        </text:list-item>
        <text:list-item>
          <text:p text:style-name="P14">Pode usar a Espada Lendária? <text:span text:style-name="T1">Sim!</text:span></text:p>
        </text:list-item>
      </text:list>
      <text:p text:style-name="P2">Você destruiu esse segundo projeto! Viu como a lógica de um jogo de videogame — que parece super complexa por fora — nada mais é do que uma sequência de operadores matemáticos, lógicos e ternários conversando entre si?</text:p>
      <text:p text:style-name="P2">Com esses dois projetos, você provou que não só entendeu a teoria, mas sabe exatamente como aplicar os operadores no mundo real.</text:p>
      <text:p text:style-name="P2">Como você quer seguir agora?</text:p>
      <text:list text:style-name="L5">
        <text:list-item>
          <text:p text:style-name="P15">Queremos montar o <text:span text:style-name="T1">Projeto 3</text:span> (por exemplo, um <text:span text:style-name="T4">Sistema de Segurança/Login</text:span> ou um <text:span text:style-name="T4">Calculador de Desconto de Imposto</text:span>)?</text:p>
        </text:list-item>
        <text:list-item>
          <text:p text:style-name="P15">Quer passar para o próximo assunto de JavaScript (como estruturas condicionais <text:span text:style-name="Source_20_Text">if / else</text:span>)?</text:p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oogle Sans Flex" svg:font-family="'Google Sans Flex', 'Google Sans', 'Helvetica Neue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6-25T23:21:18.255979019</meta:creation-date>
    <dc:date>2026-06-26T14:44:28.074651984</dc:date>
    <dc:creator>João António</dc:creator>
    <meta:editing-duration>PT3H25M6S</meta:editing-duration>
    <meta:editing-cycles>22</meta:editing-cycles>
    <meta:generator>LibreOffice/26.2.4.2$Linux_X86_64 LibreOffice_project/620$Build-2</meta:generator>
    <meta:document-statistic meta:table-count="0" meta:image-count="0" meta:object-count="0" meta:page-count="3" meta:paragraph-count="48" meta:word-count="569" meta:character-count="3228" meta:non-whitespace-character-count="2716"/>
  </office:meta>
</office:document-meta>
</file>