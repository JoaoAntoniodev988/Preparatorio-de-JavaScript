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officeooo:rsid="001ef461"/>
    </style:style>
    <style:style style:name="P2" style:family="paragraph" style:parent-style-name="Text_20_body" style:list-style-name="L1">
      <style:paragraph-properties fo:line-height="114%"/>
      <style:text-properties officeooo:rsid="001ef461"/>
    </style:style>
    <style:style style:name="P3" style:family="paragraph" style:parent-style-name="Text_20_body">
      <style:paragraph-properties fo:margin-left="0cm" fo:margin-right="0cm" fo:line-height="114%" fo:text-indent="0cm" style:auto-text-indent="false"/>
      <style:text-properties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officeooo:rsid="001ef461"/>
    </style:style>
    <style:style style:name="P5" style:family="paragraph" style:parent-style-name="Heading_20_3">
      <style:paragraph-properties fo:line-height="114%"/>
      <style:text-properties officeooo:rsid="001ef461"/>
    </style:style>
    <style:style style:name="P6" style:family="paragraph" style:parent-style-name="Heading_20_3">
      <style:paragraph-properties fo:margin-top="0cm" fo:margin-bottom="0.247cm" style:contextual-spacing="false" fo:line-height="114%"/>
      <style:text-properties officeooo:rsid="001ef461"/>
    </style:style>
    <style:style style:name="P7" style:family="paragraph" style:parent-style-name="Text_20_body">
      <style:paragraph-properties fo:line-height="114%"/>
      <style:text-properties style:font-name="Google Sans Text" officeooo:rsid="001ef461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1ef461"/>
    </style:style>
    <style:style style:name="P9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1ef461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1ef461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rsid="001ef461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officeooo:rsid="001ef461"/>
    </style:style>
    <style:style style:name="P13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1ef461"/>
    </style:style>
    <style:style style:name="P14" style:family="paragraph" style:parent-style-name="Text_20_body" style:list-style-name="L3">
      <style:paragraph-properties fo:line-height="114%"/>
      <style:text-properties officeooo:rsid="001ef461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ente escolha! O <text:span text:style-name="T1">Operador Ternário</text:span> é um dos recursos mais elegantes do JavaScript. Ele funciona como um "atalho" para tomar uma decisão rápida e atribuir um valor a uma variável, tudo em uma única linha.</text:p>
      <text:p text:style-name="P1">Ele tem esse nome porque é o único operador do JavaScript que recebe <text:span text:style-name="T1">três elementos</text:span>:</text:p>
      <text:list text:style-name="L1">
        <text:list-item>
          <text:p text:style-name="P2">A <text:span text:style-name="T1">condição</text:span> (a pergunta).</text:p>
        </text:list-item>
        <text:list-item>
          <text:p text:style-name="P2">O valor se a resposta for <text:span text:style-name="T1">verdadeira</text:span> (após o sinal de <text:span text:style-name="Source_20_Text">?</text:span>).</text:p>
        </text:list-item>
        <text:list-item>
          <text:p text:style-name="P2">O valor se a resposta for <text:span text:style-name="T1">falsa</text:span> (após o sinal de <text:span text:style-name="Source_20_Text">:</text:span>).</text:p>
        </text:list-item>
      </text:list>
      <text:p text:style-name="P1">A estrutura básica dele é sempre assim:</text:p>
      <text:p text:style-name="P3">JavaScript</text:p>
      <text:p text:style-name="P4"><text:span text:style-name="Source_20_Text">const resultado = condição ? "Valor se Verdadeiro" : "Valor se Falso";</text:span></text:p>
      <text:p text:style-name="P1">Vamos para a prática!</text:p>
      <text:h text:style-name="P5" text:outline-level="3">Desafio 1: Aprovado ou Reprovado?</text:h>
      <text:p text:style-name="P1">Imagine que você está criando o sistema de notas de uma escola. Se o aluno tirar uma nota <text:span text:style-name="T1">maior ou igual a 7</text:span>, ele está "Aprovado". Se tirar menos, está "Reprovado".</text:p>
      <text:p text:style-name="P1">Olha como o operador ternário resolve isso em uma linha:</text:p>
      <text:p text:style-name="P3">JavaScript</text:p>
      <text:p text:style-name="P4"><text:span text:style-name="Source_20_Text">const notaAluno = 8;</text:span></text:p>
      <text:p text:style-name="P4"/>
      <text:p text:style-name="P4"><text:span text:style-name="Source_20_Text">// O JS olha a pergunta: 8 &gt;= 7? </text:span></text:p>
      <text:p text:style-name="P4"><text:span text:style-name="Source_20_Text">// Se sim, escolhe o primeiro texto. Se não, escolhe o segundo.</text:span></text:p>
      <text:p text:style-name="P4"><text:span text:style-name="Source_20_Text">const statusAluno = notaAluno &gt;= 7 ? "Aprovado" : "Reprovado";</text:span></text:p>
      <text:p text:style-name="P4"/>
      <text:p text:style-name="P4"><text:span text:style-name="Source_20_Text">console.log(statusAluno);</text:span></text:p>
      <text:p text:style-name="P1">Se você rodar esse código, o que vai aparecer no <text:span text:style-name="Source_20_Text">console.log</text:span>: <text:span text:style-name="T1">"Aprovado"</text:span> ou <text:span text:style-name="T1">"Reprovado"</text:span>?</text:p>
      <text:h text:style-name="P5" text:outline-level="3">Desafio 2: Cobrança de Frete</text:h>
      <text:p text:style-name="P1">Agora você está no carrinho de compras de um site. Se o valor da compra for <text:span text:style-name="T1">maior ou igual a R$ 100,00</text:span>, o frete é <text:span text:style-name="T1">grátis</text:span> (R$ 0). Caso contrário, o frete custa <text:span text:style-name="T1">R$ 15,00</text:span>.</text:p>
      <text:p text:style-name="P1">Tente completar os espaços em branco com os símbolos do ternário (<text:span text:style-name="Source_20_Text">?</text:span> e <text:span text:style-name="Source_20_Text">:</text:span>):</text:p>
      <text:p text:style-name="P3">JavaScript</text:p>
      <text:p text:style-name="P4"><text:span text:style-name="Source_20_Text">const valorCarrinho = 60;</text:span></text:p>
      <text:p text:style-name="P4"/>
      <text:p text:style-name="P4"><text:span text:style-name="Source_20_Text">const valorFrete = valorCarrinho &gt;= 100 ___ 0 ___ 15;</text:span></text:p>
      <text:p text:style-name="P4"/>
      <text:p text:style-name="P4"><text:span text:style-name="Source_20_Text">console.log(valorFrete);</text:span></text:p>
      <text:p text:style-name="P1"><text:soft-page-break/>Quais símbolos entram nos espaços e qual será o número final impresso no <text:span text:style-name="Source_20_Text">console.log(valorFrete)</text:span>?</text:p>
      <text:p text:style-name="P1">O primeiro deu <text:span text:style-name="T1">"Aprovado"</text:span> porque 8 é maior ou igual a 7 (verdadeiro). O segundo deu <text:span text:style-name="T1">15</text:span> porque 60 não é maior ou igual a 100 (falso), então o JavaScript pulou o <text:span text:style-name="Source_20_Text">0</text:span> e pegou o valor após os dois pontos.</text:p>
      <text:p text:style-name="P1">Antes de passarmos para a nossa tradicional pausa para ver o uso real, deixa eu te mostrar um truque muito massa. O operador ternário não serve só para retornar textos ou números; você pode colocar variáveis ou expressões matemáticas dentro dele!</text:p>
      <text:p text:style-name="P1">Olha esse desafio extra:</text:p>
      <text:h text:style-name="P6" text:outline-level="3">Desafio Extra: O Desconto do Cliente VIP</text:h>
      <text:p text:style-name="P1">Neste sistema, se o cliente for VIP, ele ganha <text:span text:style-name="T1">R$ 20,00</text:span> de desconto. Se não for VIP, ele ganha apenas <text:span text:style-name="T1">R$ 5,00</text:span>.</text:p>
      <text:p text:style-name="P3">JavaScript</text:p>
      <text:p text:style-name="P4"><text:span text:style-name="Source_20_Text">const ehVip = true;</text:span></text:p>
      <text:p text:style-name="P4"><text:span text:style-name="Source_20_Text">const valorTotal = 100;</text:span></text:p>
      <text:p text:style-name="P4"/>
      <text:p text:style-name="P4"><text:span text:style-name="Source_20_Text">// O ternário vai decidir quanto vale a variável 'desconto'</text:span></text:p>
      <text:p text:style-name="P4"><text:span text:style-name="Source_20_Text">const desconto = ehVip ? 20 : 5;</text:span></text:p>
      <text:p text:style-name="P4"/>
      <text:p text:style-name="P4"><text:span text:style-name="Source_20_Text">// Agora fazemos a conta matemática usando o resultado do ternário</text:span></text:p>
      <text:p text:style-name="P4"><text:span text:style-name="Source_20_Text">const valorFinal = valorTotal - desconto;</text:span></text:p>
      <text:p text:style-name="P4"/>
      <text:p text:style-name="P4"><text:span text:style-name="Source_20_Text">console.log(valorFinal);</text:span></text:p>
      <text:p text:style-name="P1">Qual será o resultado final impresso no <text:span text:style-name="Source_20_Text">console.log(valorFinal)</text:span>?</text:p>
      <text:p text:style-name="P7">Sem problemas nenhum, vamos destrinchar juntos! Esse desafio deu um nó porque ele misturou o operador ternário com uma conta matemática logo em seguida.</text:p>
      <text:p text:style-name="P8">E você vai ver que o resultado final não é 8. Vamos passo a passo para entender a lógica.</text:p>
      <text:h text:style-name="P9" text:outline-level="3">O Passo a Passo do Código</text:h>
      <text:p text:style-name="P8">O segredo aqui é que o computador resolve uma linha de cada vez, de cima para baixo.</text:p>
      <text:p text:style-name="P10">Passo 1: Definir as informações</text:p>
      <text:p text:style-name="P8">JavaScript</text:p>
      <text:p text:style-name="P11"><text:span text:style-name="Source_20_Text"><text:span text:style-name="T2">const ehVip = true; <text:s text:c="6"/>// Guardamos que o cliente É VIP.</text:span></text:span></text:p>
      <text:p text:style-name="P11"><text:span text:style-name="Source_20_Text"><text:span text:style-name="T2">const valorTotal = 100; <text:s text:c="2"/>// O valor da compra dele é R$ 100.</text:span></text:span></text:p>
      <text:p text:style-name="P10"><text:soft-page-break/>Passo 2: A decisão do Ternário</text:p>
      <text:p text:style-name="P12"><text:span text:style-name="T2">Aqui o JavaScript vai olhar para a variável </text:span><text:span text:style-name="Source_20_Text"><text:span text:style-name="T2">desconto</text:span></text:span><text:span text:style-name="T2"> e calcular o valor dela usando o ternário:</text:span></text:p>
      <text:p text:style-name="P8">JavaScript</text:p>
      <text:p text:style-name="P11"><text:span text:style-name="Source_20_Text"><text:span text:style-name="T2">const desconto = ehVip ? 20 : 5;</text:span></text:span></text:p>
      <text:list text:style-name="L2">
        <text:list-item>
          <text:p text:style-name="P13"><text:span text:style-name="T2">O JavaScript faz a pergunta: </text:span><text:span text:style-name="Source_20_Text"><text:span text:style-name="T2">ehVip</text:span></text:span><text:span text:style-name="T2"> é verdadeiro? </text:span><text:span text:style-name="T3">Sim (</text:span><text:span text:style-name="Source_20_Text"><text:span text:style-name="T3">true</text:span></text:span><text:span text:style-name="T3">)</text:span><text:span text:style-name="T2">.</text:span></text:p>
        </text:list-item>
        <text:list-item>
          <text:p text:style-name="P13"><text:span text:style-name="T2">Como é verdadeiro, ele escolhe o primeiro valor (o que vem antes dos dois pontos): </text:span><text:span text:style-name="Source_20_Text"><text:span text:style-name="T3">20</text:span></text:span><text:span text:style-name="T2">.</text:span></text:p>
        </text:list-item>
        <text:list-item>
          <text:p text:style-name="P13"><text:span text:style-name="T2">Então, a partir de agora, a variável </text:span><text:span text:style-name="Source_20_Text"><text:span text:style-name="T2">desconto</text:span></text:span><text:span text:style-name="T2"> vale </text:span><text:span text:style-name="T3">20</text:span><text:span text:style-name="T2">.</text:span></text:p>
        </text:list-item>
      </text:list>
      <text:p text:style-name="P10">Passo 3: A Conta Matemática</text:p>
      <text:p text:style-name="P12"><text:span text:style-name="T2">Agora que o JavaScript já sabe que a variável </text:span><text:span text:style-name="Source_20_Text"><text:span text:style-name="T2">desconto</text:span></text:span><text:span text:style-name="T2"> vale 20, ele chega nessa linha:</text:span></text:p>
      <text:p text:style-name="P8">JavaScript</text:p>
      <text:p text:style-name="P11"><text:span text:style-name="Source_20_Text"><text:span text:style-name="T2">const valorFinal = valorTotal - desconto;</text:span></text:span></text:p>
      <text:p text:style-name="P8">Substituindo os nomes pelos números que estão guardados neles, a conta que o computador faz é:</text:p>
      <text:p text:style-name="P8">$$\text{valorFinal} = 100 - 20$$</text:p>
      <text:p text:style-name="P1">Portanto, o <text:span text:style-name="Source_20_Text">console.log(valorFinal)</text:span> vai imprimir: <text:span text:style-name="Source_20_Text"><text:span text:style-name="T1">80</text:span></text:span>.</text:p>
      <text:h text:style-name="P6" text:outline-level="3">Entendi! Onde isso é usado na vida real?</text:h>
      <text:p text:style-name="P1">O operador ternário é o rei das <text:span text:style-name="T1">pequenas decisões personalizadas</text:span> em sites. Ele serve para o código escolher entre duas opções rapidamente sem precisar de um bloco de código gigante.</text:p>
      <text:list text:style-name="L3">
        <text:list-item>
          <text:p text:style-name="P14"><text:span text:style-name="T1">Mensagens de Boas-Vindas:</text:span> Quando você entra no seu perfil, o site checa se você colocou uma foto. Se sim, ele mostra a foto. Se não, o ternário escolhe mostrar aquele ícone cinza de usuário padrão.</text:p>
        </text:list-item>
        <text:list-item>
          <text:p text:style-name="P14"><text:span text:style-name="T1">Notificações:</text:span> Sabe quando aparece no site: "Você tem 1 mensagem" ou "Você tem 2 mensagen<text:span text:style-name="T1">s</text:span>"? O programador usa o ternário para checar a quantidade. Se for maior que 1, ele adiciona o "s" no final da palavra.</text:p>
        </text:list-item>
        <text:list-item>
          <text:p text:style-name="P14"><text:span text:style-name="T1">Estilização (Cores):</text:span> Se o saldo do cliente no banco for menor que zero, o ternário escolhe a cor <text:span text:style-name="Source_20_Text">"vermelha"</text:span> para o texto. Se for maior, ele escolhe a cor <text:span text:style-name="Source_20_Text">"verde"</text:span>.</text:p>
        </text:list-item>
      </text:list>
      <text:p text:style-name="P1">Conseguiu visualizar por que o resultado deu <text:span text:style-name="T1">80</text:span> e como o ternário guardou o valor dentro da variável <text:span text:style-name="Source_20_Text">desconto</text:span>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02:10:29.930733251</dc:date>
    <dc:creator>João António</dc:creator>
    <meta:editing-duration>PT1H31M25S</meta:editing-duration>
    <meta:editing-cycles>9</meta:editing-cycles>
    <meta:generator>LibreOffice/26.2.4.2$Linux_X86_64 LibreOffice_project/620$Build-2</meta:generator>
    <meta:document-statistic meta:table-count="0" meta:image-count="0" meta:object-count="0" meta:page-count="3" meta:paragraph-count="69" meta:word-count="838" meta:character-count="4681" meta:non-whitespace-character-count="3912"/>
  </office:meta>
</office:document-meta>
</file>